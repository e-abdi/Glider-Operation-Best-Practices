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onsolas" svg:font-family="Consolas" style:font-family-generic="modern"/>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28in"/>
    </style:style>
    <style:style style:name="co2" style:family="table-column">
      <style:table-column-properties fo:break-before="auto" style:column-width="0.7075in"/>
    </style:style>
    <style:style style:name="co3" style:family="table-column">
      <style:table-column-properties fo:break-before="auto" style:column-width="2.172in"/>
    </style:style>
    <style:style style:name="co4" style:family="table-column">
      <style:table-column-properties fo:break-before="auto" style:column-width="3.7417in"/>
    </style:style>
    <style:style style:name="co5" style:family="table-column">
      <style:table-column-properties fo:break-before="auto" style:column-width="2.102in"/>
    </style:style>
    <style:style style:name="co6" style:family="table-column">
      <style:table-column-properties fo:break-before="auto" style:column-width="1.0929in"/>
    </style:style>
    <style:style style:name="co7" style:family="table-column">
      <style:table-column-properties fo:break-before="auto" style:column-width="1.2126in"/>
    </style:style>
    <style:style style:name="co8" style:family="table-column">
      <style:table-column-properties fo:break-before="auto" style:column-width="1.8846in"/>
    </style:style>
    <style:style style:name="co9" style:family="table-column">
      <style:table-column-properties fo:break-before="auto" style:column-width="0.8126in"/>
    </style:style>
    <style:style style:name="co10" style:family="table-column">
      <style:table-column-properties fo:break-before="auto" style:column-width="1.0583in"/>
    </style:style>
    <style:style style:name="co11" style:family="table-column">
      <style:table-column-properties fo:break-before="auto" style:column-width="1.9902in"/>
    </style:style>
    <style:style style:name="co12" style:family="table-column">
      <style:table-column-properties fo:break-before="auto" style:column-width="5.2626in"/>
    </style:style>
    <style:style style:name="co13" style:family="table-column">
      <style:table-column-properties fo:break-before="auto" style:column-width="6.8744in"/>
    </style:style>
    <style:style style:name="co14" style:family="table-column">
      <style:table-column-properties fo:break-before="auto" style:column-width="0.6689in"/>
    </style:style>
    <style:style style:name="co15" style:family="table-column">
      <style:table-column-properties fo:break-before="auto" style:column-width="0.8339in"/>
    </style:style>
    <style:style style:name="co16" style:family="table-column">
      <style:table-column-properties fo:break-before="auto" style:column-width="2.4874in"/>
    </style:style>
    <style:style style:name="co17" style:family="table-column">
      <style:table-column-properties fo:break-before="auto" style:column-width="1.4437in"/>
    </style:style>
    <style:style style:name="co18" style:family="table-column">
      <style:table-column-properties fo:break-before="auto" style:column-width="1.2472in"/>
    </style:style>
    <style:style style:name="co19" style:family="table-column">
      <style:table-column-properties fo:break-before="auto" style:column-width="5.4165in"/>
    </style:style>
    <style:style style:name="ro1" style:family="table-row">
      <style:table-row-properties style:row-height="0.6665in" fo:break-before="auto" style:use-optimal-row-height="false"/>
    </style:style>
    <style:style style:name="ro2" style:family="table-row">
      <style:table-row-properties style:row-height="0.198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2083in" fo:break-before="auto" style:use-optimal-row-height="false"/>
    </style:style>
    <style:style style:name="ro5" style:family="table-row">
      <style:table-row-properties style:row-height="0.448in" fo:break-before="auto" style:use-optimal-row-height="false"/>
    </style:style>
    <style:style style:name="ro6" style:family="table-row">
      <style:table-row-properties style:row-height="0.4165in" fo:break-before="auto" style:use-optimal-row-height="false"/>
    </style:style>
    <style:style style:name="ro7" style:family="table-row">
      <style:table-row-properties style:row-height="0.1874in" fo:break-before="auto" style:use-optimal-row-height="false"/>
    </style:style>
    <style:style style:name="ro8" style:family="table-row">
      <style:table-row-properties style:row-height="0.1665in" fo:break-before="auto" style:use-optimal-row-height="false"/>
    </style:style>
    <style:style style:name="ro9" style:family="table-row">
      <style:table-row-properties style:row-height="0.3957in" fo:break-before="auto" style:use-optimal-row-height="false"/>
    </style:style>
    <style:style style:name="ro10" style:family="table-row">
      <style:table-row-properties style:row-height="0.198in" fo:break-before="auto" style:use-optimal-row-height="false"/>
    </style:style>
    <style:style style:name="ro11" style:family="table-row">
      <style:table-row-properties style:row-height="0.3937in" fo:break-before="auto" style:use-optimal-row-height="true"/>
    </style:style>
    <style:style style:name="ro12" style:family="table-row">
      <style:table-row-properties style:row-height="0.5799in" fo:break-before="auto" style:use-optimal-row-height="true"/>
    </style:style>
    <style:style style:name="ro13" style:family="table-row">
      <style:table-row-properties style:row-height="0.7665in" fo:break-before="auto" style:use-optimal-row-height="true"/>
    </style:style>
    <style:style style:name="ro14" style:family="table-row">
      <style:table-row-properties style:row-height="0.698in" fo:break-before="auto" style:use-optimal-row-height="false"/>
    </style:style>
    <style:style style:name="ro15" style:family="table-row">
      <style:table-row-properties style:row-height="2.8189in" fo:break-before="auto" style:use-optimal-row-height="true"/>
    </style:style>
    <style:style style:name="ro16" style:family="table-row">
      <style:table-row-properties style:row-height="0.8437in" fo:break-before="auto" style:use-optimal-row-height="false"/>
    </style:style>
    <style:style style:name="ro17" style:family="table-row">
      <style:table-row-properties style:row-height="0.4374in" fo:break-before="auto" style:use-optimal-row-height="false"/>
    </style:style>
    <style:style style:name="ro18" style:family="table-row">
      <style:table-row-properties style:row-height="0.2083in" fo:break-before="auto" style:use-optimal-row-height="true"/>
    </style:style>
    <style:style style:name="ro19" style:family="table-row">
      <style:table-row-properties style:row-height="0.2898in" fo:break-before="auto" style:use-optimal-row-height="true"/>
    </style:style>
    <style:style style:name="ro20" style:family="table-row">
      <style:table-row-properties style:row-height="0.8752in" fo:break-before="auto" style:use-optimal-row-height="false"/>
    </style:style>
    <style:style style:name="ro21" style:family="table-row">
      <style:table-row-properties style:row-height="0.6354in" fo:break-before="auto" style:use-optimal-row-height="false"/>
    </style:style>
    <style:style style:name="ro22" style:family="table-row">
      <style:table-row-properties style:row-height="1.0311in" fo:break-before="auto" style:use-optimal-row-height="false"/>
    </style:style>
    <style:style style:name="ro23" style:family="table-row">
      <style:table-row-properties style:row-height="0.7083in" fo:break-before="auto" style:use-optimal-row-height="false"/>
    </style:style>
    <style:style style:name="ro24" style:family="table-row">
      <style:table-row-properties style:row-height="0.7291in" fo:break-before="auto" style:use-optimal-row-height="false"/>
    </style:style>
    <style:style style:name="ro25" style:family="table-row">
      <style:table-row-properties style:row-height="0.3437in" fo:break-before="auto" style:use-optimal-row-height="false"/>
    </style:style>
    <style:style style:name="ta1" style:family="table" style:master-page-name="PageStyle_5f_Checklist">
      <style:table-properties table:display="true" style:writing-mode="lr-tb"/>
    </style:style>
    <style:style style:name="ta2" style:family="table" style:master-page-name="PageStyle_5f_hidden_5f_lists">
      <style:table-properties table:display="false" style:writing-mode="lr-tb"/>
    </style:style>
    <style:style style:name="ta3" style:family="table" style:master-page-name="PageStyle_5f_automation-nation">
      <style:table-properties table:display="false" style:writing-mode="lr-tb"/>
    </style:style>
    <style:style style:name="ta4" style:family="table" style:master-page-name="PageStyle_5f_NOTES">
      <style:table-properties table:display="true" style:writing-mode="lr-tb"/>
    </style:style>
    <style:style style:name="ta5" style:family="table" style:master-page-name="PageStyle_5f_Change_20_Log">
      <style:table-properties table:display="true" style:writing-mode="lr-tb"/>
    </style:style>
    <number:number-style style:name="N81">
      <number:scientific-number number:decimal-places="2" number:min-decimal-places="2" number:min-integer-digits="1" number:min-exponent-digits="2" number:exponent-interval="1" number:forced-exponent-sign="true"/>
    </number:number-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loext:char-complex-color loext:theme-type="dark1" loext:color-type="theme"/>
      </style:text-properties>
    </style:style>
    <style:style style:name="ce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style>
    <style:style style:name="ce4"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6" style:family="table-cell" style:parent-style-name="Default">
      <style:table-cell-properties fo:border-bottom="none" fo:background-color="#d9d9d9"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style>
    <style:style style:name="ce7" style:family="table-cell" style:parent-style-name="Default">
      <style:table-cell-properties fo:border-bottom="none" fo:background-color="#d9d9d9"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style>
    <style:style style:name="ce8" style:family="table-cell" style:parent-style-name="Default">
      <style:table-cell-properties fo:border-bottom="1.76pt solid #000000" fo:background-color="#d9d9d9"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style>
    <style:style style:name="ce9" style:family="table-cell" style:parent-style-name="Default">
      <style:table-cell-properties fo:border-bottom="none" fo:background-color="#ffffff"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loext:background-complex-color loext:theme-type="light1" loext:color-type="theme"/>
      </style:table-cell-properties>
      <style:paragraph-properties fo:text-align="center"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loext:char-complex-color loext:theme-type="dark1" loext:color-type="theme"/>
      </style:text-properties>
    </style:style>
    <style:style style:name="ce10" style:family="table-cell" style:parent-style-name="Default">
      <style:table-cell-properties fo:border-bottom="1.76pt solid #000000" fo:background-color="#b4c7e7"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loext:char-complex-color loext:theme-type="dark1" loext:color-type="theme"/>
      </style:text-properties>
    </style:style>
    <style:style style:name="ce11" style:family="table-cell" style:parent-style-name="Default">
      <style:table-cell-properties fo:border-bottom="none" fo:background-color="#fff2cc"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fo:border-bottom="0.74pt solid #d9d9d9" fo:background-color="#d9d9d9"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loext:background-complex-color loext:theme-type="light1" loext:color-type="theme">
          <loext:transformation loext:type="lummod" loext:value="8500"/>
        </loext:background-complex-color>
      </style:table-cell-properties>
      <style:paragraph-properties css3t:text-justify="auto" fo:margin-left="0in" style:writing-mode="page"/>
    </style:style>
    <style:style style:name="ce13" style:family="table-cell" style:parent-style-name="Default">
      <style:table-cell-properties fo:border-bottom="0.74pt solid #d9d9d9" fo:background-color="#d9d9d9" style:diagonal-bl-tr="none" style:diagonal-tl-br="none" style:text-align-source="value-type" style:repeat-content="false" fo:wrap-option="wrap" fo:border-left="1.76pt solid #000000" style:direction="ltr" fo:border-right="none"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ackground-complex-color loext:theme-type="light1" loext:color-type="theme">
          <loext:transformation loext:type="lummod" loext:value="8500"/>
        </loext:background-complex-color>
        <loext:border-top-complex-color loext:theme-type="light1" loext:color-type="theme">
          <loext:transformation loext:type="lummod" loext:value="8500"/>
        </loext:border-top-complex-color>
      </style:table-cell-properties>
      <style:paragraph-properties css3t:text-justify="auto" fo:margin-left="0in" style:writing-mode="page"/>
    </style:style>
    <style:style style:name="ce14" style:family="table-cell" style:parent-style-name="Default">
      <style:table-cell-properties fo:border-bottom="none" fo:background-color="#d9d9d9" style:diagonal-bl-tr="none" style:diagonal-tl-br="none" style:text-align-source="value-type" style:repeat-content="false" fo:wrap-option="wrap" fo:border-left="1.76pt solid #000000" style:direction="ltr" fo:border-right="none" style:rotation-angle="0" style:rotation-align="none" style:shrink-to-fit="false" fo:border-top="0.74pt solid #d9d9d9" style:vertical-align="middle" loext:vertical-justify="auto">
        <loext:background-complex-color loext:theme-type="light1" loext:color-type="theme">
          <loext:transformation loext:type="lummod" loext:value="8500"/>
        </loext:background-complex-color>
        <loext:border-top-complex-color loext:theme-type="light1" loext:color-type="theme">
          <loext:transformation loext:type="lummod" loext:value="8500"/>
        </loext:border-top-complex-color>
      </style:table-cell-properties>
      <style:paragraph-properties css3t:text-justify="auto" fo:margin-left="0in" style:writing-mode="page"/>
    </style:style>
    <style:style style:name="ce15" style:family="table-cell" style:parent-style-name="Default">
      <style:table-cell-properties fo:border-bottom="none" fo:background-color="#d9d9d9"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middle"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style>
    <style:style style:name="ce16" style:family="table-cell" style:parent-style-name="Default">
      <style:table-cell-properties fo:border-bottom="none" fo:background-color="#8faadc"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6000"/>
          <loext:transformation loext:type="lumoff" loext:value="3999"/>
        </loext:background-complex-color>
      </style:table-cell-properties>
      <style:paragraph-properties css3t:text-justify="auto" fo:margin-left="0in" style:writing-mode="page"/>
    </style:style>
    <style:style style:name="ce17" style:family="table-cell" style:parent-style-name="Default">
      <style:table-cell-properties fo:border-bottom="none" fo:background-color="#d9d9d9"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middle"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loext:char-complex-color loext:theme-type="dark1" loext:color-type="theme"/>
      </style:text-properties>
    </style:style>
    <style:style style:name="ce18" style:family="table-cell" style:parent-style-name="Default">
      <style:table-cell-properties fo:border-bottom="none" fo:background-color="#d9d9d9" style:diagonal-bl-tr="none" style:diagonal-tl-br="none" style:text-align-source="fix" style:repeat-content="false" fo:wrap-option="wrap" fo:border-left="1.76pt solid #000000" style:direction="ltr" fo:border-right="none" style:rotation-angle="0" style:rotation-align="none" style:shrink-to-fit="false" fo:border-top="0.74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19" style:family="table-cell" style:parent-style-name="Default">
      <style:table-cell-properties fo:border-bottom="none" fo:background-color="#d9d9d9"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20" style:family="table-cell" style:parent-style-name="Default">
      <style:table-cell-properties fo:border-bottom="1.76pt solid #000000" fo:background-color="#8faadc"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loext:char-complex-color loext:theme-type="dark1" loext:color-type="theme"/>
      </style:text-properties>
    </style:style>
    <style:style style:name="ce22" style:family="table-cell" style:parent-style-name="Default">
      <style:table-cell-properties fo:border-bottom="1.76pt solid #000000"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loext:char-complex-color loext:theme-type="dark1" loext:color-type="theme"/>
      </style:text-properties>
    </style:style>
    <style:style style:name="ce23"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5pt" fo:font-style="normal" fo:text-shadow="none" style:text-underline-style="none" fo:font-weight="normal" style:font-size-asian="15pt" style:font-style-asian="normal" style:font-weight-asian="normal" style:font-size-complex="15pt" style:font-style-complex="normal" style:font-weight-complex="normal">
        <loext:char-complex-color loext:theme-type="dark1" loext:color-type="theme"/>
      </style:text-properties>
    </style:style>
    <style:style style:name="ce24" style:family="table-cell" style:parent-style-name="Default">
      <style:table-cell-properties fo:border-bottom="0.74pt solid #bfbfbf"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bottom" loext:vertical-justify="auto">
        <loext:border-bottom-complex-color loext:theme-type="light1" loext:color-type="theme">
          <loext:transformation loext:type="lummod" loext:value="7500"/>
        </loext:border-bottom-complex-color>
      </style:table-cell-properties>
      <style:paragraph-properties fo:text-align="end" css3t:text-justify="auto" fo:margin-left="0in" style:writing-mode="page"/>
    </style:style>
    <style:style style:name="ce25" style:family="table-cell" style:parent-style-name="Default">
      <style:table-cell-properties fo:border-bottom="0.74pt solid #bfbfbf" style:diagonal-bl-tr="none" style:diagonal-tl-br="none" style:text-align-source="fix" style:repeat-content="false" fo:wrap-option="wrap" fo:border-left="1.76pt solid #000000" style:direction="ltr" fo:border-right="none" style:rotation-angle="0" style:rotation-align="none" style:shrink-to-fit="false" fo:border-top="0.74pt solid #bfbfbf" style:vertical-align="bottom" loext:vertical-justify="auto">
        <loext:border-bottom-complex-color loext:theme-type="light1" loext:color-type="theme">
          <loext:transformation loext:type="lummod" loext:value="7500"/>
        </loext:border-bottom-complex-color>
        <loext:border-top-complex-color loext:theme-type="light1" loext:color-type="theme">
          <loext:transformation loext:type="lummod" loext:value="7500"/>
        </loext:border-top-complex-color>
      </style:table-cell-properties>
      <style:paragraph-properties fo:text-align="end" css3t:text-justify="auto" fo:margin-left="0in" style:writing-mode="page"/>
    </style:style>
    <style:style style:name="ce26"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0.74pt solid #bfbfbf" style:vertical-align="bottom" loext:vertical-justify="auto">
        <loext:border-top-complex-color loext:theme-type="light1" loext:color-type="theme">
          <loext:transformation loext:type="lummod" loext:value="7500"/>
        </loext:border-top-complex-color>
      </style:table-cell-properties>
      <style:paragraph-properties fo:text-align="end" css3t:text-justify="auto" fo:margin-left="0in" style:writing-mode="page"/>
    </style:style>
    <style:style style:name="ce27" style:family="table-cell" style:parent-style-name="Default">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bottom" loext:vertical-justify="auto"/>
      <style:paragraph-properties css3t:text-justify="auto" fo:margin-left="0in" style:writing-mode="page"/>
    </style:style>
    <style:style style:name="ce28"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29"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style>
    <style:style style:name="ce30"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31"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3" style:family="table-cell" style:parent-style-name="Default">
      <style:table-cell-properties fo:border-bottom="1.76pt solid #000000" fo:background-color="#d9d9d9"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style>
    <style:style style:name="ce34"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loext:background-complex-color loext:theme-type="light1" loext:color-type="theme"/>
      </style:table-cell-properties>
      <style:paragraph-properties fo:text-align="center"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loext:char-complex-color loext:theme-type="dark1" loext:color-type="theme"/>
      </style:text-properties>
    </style:style>
    <style:style style:name="ce35" style:family="table-cell" style:parent-style-name="Default">
      <style:table-cell-properties fo:border-bottom="1.76pt solid #000000" fo:background-color="#b4c7e7"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loext:char-complex-color loext:theme-type="dark1" loext:color-type="theme"/>
      </style:text-properties>
    </style:style>
    <style:style style:name="ce36"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7" style:family="table-cell" style:parent-style-name="Default">
      <style:table-cell-properties fo:border-bottom="0.74pt solid #d9d9d9"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style:table-cell-properties>
      <style:paragraph-properties css3t:text-justify="auto" fo:margin-left="0in" style:writing-mode="page"/>
      <style:map style:condition="cell-content()=&quot;-&quot;" style:apply-style-name="ConditionalStyle_5f_41" style:base-cell-address="Checklist.D35"/>
    </style:style>
    <style:style style:name="ce38" style:family="table-cell" style:parent-style-name="Default">
      <style:table-cell-properties fo:border-bottom="0.74pt solid #d9d9d9" style:diagonal-bl-tr="none" style:diagonal-tl-br="none" style:text-align-source="value-type" style:repeat-content="false" fo:wrap-option="wrap" fo:border-left="none" style:direction="ltr" fo:border-right="none"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css3t:text-justify="auto" fo:margin-left="0in" style:writing-mode="page"/>
      <style:map style:condition="cell-content()=&quot;-&quot;" style:apply-style-name="ConditionalStyle_5f_41" style:base-cell-address="Checklist.D35"/>
    </style:style>
    <style:style style:name="ce39"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start" css3t:text-justify="auto" fo:margin-left="0in" style:writing-mode="page"/>
      <style:map style:condition="cell-content()=&quot;-&quot;" style:apply-style-name="ConditionalStyle_5f_41" style:base-cell-address="Checklist.D35"/>
    </style:style>
    <style:style style:name="ce4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d9d9d9" style:vertical-align="middle" loext:vertical-justify="auto">
        <loext:border-top-complex-color loext:theme-type="light1" loext:color-type="theme">
          <loext:transformation loext:type="lummod" loext:value="8500"/>
        </loext:border-top-complex-color>
      </style:table-cell-properties>
      <style:paragraph-properties fo:text-align="start" css3t:text-justify="auto" fo:margin-left="0in" style:writing-mode="page"/>
      <style:map style:condition="cell-content()=&quot;-&quot;" style:apply-style-name="ConditionalStyle_5f_41" style:base-cell-address="Checklist.D35"/>
    </style:style>
    <style:style style:name="ce41"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style:table-cell-properties>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map style:condition="cell-content()=&quot;-&quot;" style:apply-style-name="ConditionalStyle_5f_41" style:base-cell-address="Checklist.D35"/>
    </style:style>
    <style:style style:name="ce42" style:family="table-cell" style:parent-style-name="Default">
      <style:table-cell-properties fo:background-color="#b4c7e7" style:text-align-source="value-type"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3" style:family="table-cell" style:parent-style-name="Default">
      <style:table-cell-properties fo:background-color="#b4c7e7" style:text-align-source="fix" style:repeat-content="false" fo:wrap-option="wrap" fo:border="none" style:direction="ltr" style:rotation-angle="0" style:rotation-align="none" style:shrink-to-fit="fals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4"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style:table-cell-properties>
      <style:paragraph-properties fo:text-align="start" css3t:text-justify="auto" fo:margin-left="0in" style:writing-mode="page"/>
      <style:map style:condition="cell-content()=&quot;-&quot;" style:apply-style-name="ConditionalStyle_5f_41" style:base-cell-address="Checklist.D35"/>
    </style:style>
    <style:style style:name="ce45" style:family="table-cell" style:parent-style-name="Default">
      <style:table-cell-properties fo:background-color="#b4c7e7" style:text-align-source="value-type" style:repeat-content="false" fo:wrap-option="wrap" fo:border="none" style:direction="ltr" style:rotation-angle="0" style:rotation-align="none" style:shrink-to-fit="fals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map style:condition="cell-content()=&quot;-&quot;" style:apply-style-name="ConditionalStyle_5f_41" style:base-cell-address="Checklist.D35"/>
    </style:style>
    <style:style style:name="ce47"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map style:condition="cell-content()=&quot;-&quot;" style:apply-style-name="ConditionalStyle_5f_41" style:base-cell-address="Checklist.D35"/>
    </style:style>
    <style:style style:name="ce48" style:family="table-cell" style:parent-style-name="Default">
      <style:table-cell-properties fo:background-color="#8faadc"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start" css3t:text-justify="auto" fo:margin-left="0in" style:writing-mode="page"/>
    </style:style>
    <style:style style:name="ce49"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order-bottom-complex-color loext:theme-type="light1" loext:color-type="theme">
          <loext:transformation loext:type="lummod" loext:value="8500"/>
        </loext:border-bottom-complex-color>
      </style:table-cell-properties>
      <style:paragraph-properties fo:text-align="start" css3t:text-justify="auto" fo:margin-left="0in" style:writing-mode="page"/>
      <style:map style:condition="cell-content()=&quot;-&quot;" style:apply-style-name="ConditionalStyle_5f_41" style:base-cell-address="Checklist.D35"/>
    </style:style>
    <style:style style:name="ce50" style:family="table-cell" style:parent-style-name="Default">
      <style:table-cell-properties fo:border-bottom="1.76pt solid #000000" fo:background-color="#8faadc"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css3t:text-justify="auto" fo:margin-left="0in" style:writing-mode="page"/>
    </style:style>
    <style:style style:name="ce5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5pt" fo:font-style="normal" fo:text-shadow="none" style:text-underline-style="none" fo:font-weight="normal" style:font-size-asian="15pt" style:font-style-asian="normal" style:font-weight-asian="normal" style:font-size-complex="15pt" style:font-style-complex="normal" style:font-weight-complex="normal">
        <loext:char-complex-color loext:theme-type="dark1" loext:color-type="theme"/>
      </style:text-properties>
    </style:style>
    <style:style style:name="ce52" style:family="table-cell" style:parent-style-name="Default">
      <style:table-cell-properties fo:border-bottom="0.74pt solid #bfbfbf" fo:background-color="#bdd7ee"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bottom" loext:vertical-justify="auto">
        <loext:border-bottom-complex-color loext:theme-type="light1" loext:color-type="theme">
          <loext:transformation loext:type="lummod" loext:value="7500"/>
        </loext:border-bottom-complex-color>
        <loext:background-complex-color loext:theme-type="accent5" loext:color-type="theme">
          <loext:transformation loext:type="lummod" loext:value="4000"/>
          <loext:transformation loext:type="lumoff" loext:value="5999"/>
        </loext:background-complex-color>
      </style:table-cell-properties>
      <style:paragraph-properties css3t:text-justify="auto" fo:margin-left="0in" style:writing-mode="page"/>
    </style:style>
    <style:style style:name="ce53" style:family="table-cell" style:parent-style-name="Default">
      <style:table-cell-properties fo:border-bottom="0.74pt solid #bfbfbf" fo:background-color="#bdd7ee" style:diagonal-bl-tr="none" style:diagonal-tl-br="none" style:text-align-source="value-type" style:repeat-content="false" fo:wrap-option="wrap" fo:border-left="none" style:direction="ltr" fo:border-right="1.76pt solid #000000" style:rotation-angle="0" style:rotation-align="none" style:shrink-to-fit="false" fo:border-top="0.74pt solid #bfbfbf" style:vertical-align="bottom" loext:vertical-justify="auto">
        <loext:border-bottom-complex-color loext:theme-type="light1" loext:color-type="theme">
          <loext:transformation loext:type="lummod" loext:value="7500"/>
        </loext:border-bottom-complex-color>
        <loext:background-complex-color loext:theme-type="accent5" loext:color-type="theme">
          <loext:transformation loext:type="lummod" loext:value="4000"/>
          <loext:transformation loext:type="lumoff" loext:value="5999"/>
        </loext:background-complex-color>
        <loext:border-top-complex-color loext:theme-type="light1" loext:color-type="theme">
          <loext:transformation loext:type="lummod" loext:value="7500"/>
        </loext:border-top-complex-color>
      </style:table-cell-properties>
      <style:paragraph-properties css3t:text-justify="auto" fo:margin-left="0in" style:writing-mode="page"/>
    </style:style>
    <style:style style:name="ce54" style:family="table-cell" style:parent-style-name="Default">
      <style:table-cell-properties fo:border-bottom="1.76pt solid #000000" fo:background-color="#bdd7ee" style:diagonal-bl-tr="none" style:diagonal-tl-br="none" style:text-align-source="value-type" style:repeat-content="false" fo:wrap-option="wrap" fo:border-left="none" style:direction="ltr" fo:border-right="1.76pt solid #000000" style:rotation-angle="0" style:rotation-align="none" style:shrink-to-fit="false" fo:border-top="0.74pt solid #bfbfbf" style:vertical-align="bottom" loext:vertical-justify="auto">
        <loext:background-complex-color loext:theme-type="accent5" loext:color-type="theme">
          <loext:transformation loext:type="lummod" loext:value="4000"/>
          <loext:transformation loext:type="lumoff" loext:value="5999"/>
        </loext:background-complex-color>
        <loext:border-top-complex-color loext:theme-type="light1" loext:color-type="theme">
          <loext:transformation loext:type="lummod" loext:value="7500"/>
        </loext:border-top-complex-color>
      </style:table-cell-properties>
      <style:paragraph-properties css3t:text-justify="auto" fo:margin-left="0in" style:writing-mode="page"/>
    </style:style>
    <style:style style:name="ce55" style:family="table-cell" style:parent-style-name="Default">
      <style:table-cell-properties fo:border-bottom="none" fo:background-color="#bdd7ee"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bottom" loext:vertical-justify="auto">
        <loext:background-complex-color loext:theme-type="accent5" loext:color-type="theme">
          <loext:transformation loext:type="lummod" loext:value="4000"/>
          <loext:transformation loext:type="lumoff" loext:value="5999"/>
        </loext:background-complex-color>
      </style:table-cell-properties>
      <style:paragraph-properties css3t:text-justify="auto" fo:margin-left="0in" style:writing-mode="page"/>
    </style:style>
    <style:style style:name="ce56" style:family="table-cell" style:parent-style-name="Default">
      <style:table-cell-properties fo:border-bottom="1.76pt solid #000000" fo:background-color="#bdd7e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loext:background-complex-color loext:theme-type="accent5" loext:color-type="theme">
          <loext:transformation loext:type="lummod" loext:value="4000"/>
          <loext:transformation loext:type="lumoff" loext:value="5999"/>
        </loext:background-complex-color>
      </style:table-cell-properties>
      <style:paragraph-properties css3t:text-justify="auto" fo:margin-left="0in" style:writing-mode="page"/>
    </style:style>
    <style:style style:name="ce57"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58"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59"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60" style:family="table-cell" style:parent-style-name="Default">
      <style:table-cell-properties fo:border-bottom="0.74pt solid #d9d9d9" style:diagonal-bl-tr="none" style:diagonal-tl-br="none" style:text-align-source="fix" style:repeat-content="false" fo:wrap-option="wrap" fo:border-left="0.74pt solid #d9d9d9"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style:table-cell-properties>
      <style:paragraph-properties fo:text-align="start" css3t:text-justify="auto" fo:margin-left="0.1043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loext:char-complex-color loext:theme-type="dark1" loext:color-type="theme"/>
      </style:text-properties>
      <style:map style:condition="cell-content()=&quot;-&quot;" style:apply-style-name="ConditionalStyle_5f_41" style:base-cell-address="Checklist.D35"/>
    </style:style>
    <style:style style:name="ce61" style:family="table-cell" style:parent-style-name="Default">
      <style:table-cell-properties fo:border-bottom="0.74pt solid #d9d9d9" style:diagonal-bl-tr="none" style:diagonal-tl-br="none" style:text-align-source="fix" style:repeat-content="false" fo:wrap-option="wrap" fo:border-left="0.74pt solid #d9d9d9" style:direction="ltr" fo:border-right="none"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1043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loext:char-complex-color loext:theme-type="dark1" loext:color-type="theme"/>
      </style:text-properties>
      <style:map style:condition="cell-content()=&quot;-&quot;" style:apply-style-name="ConditionalStyle_5f_41" style:base-cell-address="Checklist.D35"/>
    </style:style>
    <style:style style:name="ce62" style:family="table-cell" style:parent-style-name="Default">
      <style:table-cell-properties fo:border-bottom="0.74pt solid #d9d9d9" style:diagonal-bl-tr="none" style:diagonal-tl-br="none" style:text-align-source="fix" style:repeat-content="false" fo:wrap-option="wrap" fo:border-left="0.74pt solid #d9d9d9" style:direction="ltr" fo:border-right="none"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1043in"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loext:char-complex-color loext:theme-type="dark1" loext:color-type="theme"/>
      </style:text-properties>
      <style:map style:condition="cell-content()=&quot;-&quot;" style:apply-style-name="ConditionalStyle_5f_41" style:base-cell-address="Checklist.D35"/>
    </style:style>
    <style:style style:name="ce63" style:family="table-cell" style:parent-style-name="Default">
      <style:table-cell-properties fo:border-bottom="none" style:diagonal-bl-tr="none" style:diagonal-tl-br="none" style:text-align-source="fix" style:repeat-content="false" fo:wrap-option="wrap" fo:border-left="0.74pt solid #d9d9d9" style:direction="ltr" fo:border-right="none" style:rotation-angle="0" style:rotation-align="none" style:shrink-to-fit="false" fo:border-top="0.74pt soli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1043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loext:char-complex-color loext:theme-type="dark1" loext:color-type="theme"/>
      </style:text-properties>
      <style:map style:condition="cell-content()=&quot;-&quot;" style:apply-style-name="ConditionalStyle_5f_41" style:base-cell-address="Checklist.D35"/>
    </style:style>
    <style:style style:name="ce64" style:family="table-cell" style:parent-style-name="Default">
      <style:table-cell-properties fo:border-bottom="0.74pt solid #d9d9d9" style:diagonal-bl-tr="none" style:diagonal-tl-br="none" style:text-align-source="fix" style:repeat-content="false" fo:wrap-option="wrap" fo:border-left="0.74pt solid #d9d9d9"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style:table-cell-properties>
      <style:paragraph-properties fo:text-align="start" css3t:text-justify="auto" fo:margin-left="0.1043in"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loext:char-complex-color loext:theme-type="dark1" loext:color-type="theme"/>
      </style:text-properties>
      <style:map style:condition="cell-content()=&quot;-&quot;" style:apply-style-name="ConditionalStyle_5f_41" style:base-cell-address="Checklist.D35"/>
    </style:style>
    <style:style style:name="ce65" style:family="table-cell" style:parent-style-name="Default">
      <style:table-cell-properties fo:background-color="#b4c7e7"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66" style:family="table-cell" style:parent-style-name="Default">
      <style:table-cell-properties fo:border-bottom="0.74pt solid #d9d9d9" style:diagonal-bl-tr="none" style:diagonal-tl-br="none" style:text-align-source="fix" style:repeat-content="false" fo:wrap-option="wrap" fo:border-left="0.74pt solid #d9d9d9"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style:table-cell-properties>
      <style:paragraph-properties fo:text-align="start" css3t:text-justify="auto" fo:margin-left="0.1043in" style:writing-mode="page"/>
      <style:map style:condition="cell-content()=&quot;-&quot;" style:apply-style-name="ConditionalStyle_5f_41" style:base-cell-address="Checklist.D35"/>
    </style:style>
    <style:style style:name="ce67" style:family="table-cell" style:parent-style-name="Default">
      <style:table-cell-properties fo:border-bottom="0.74pt solid #d9d9d9" style:diagonal-bl-tr="none" style:diagonal-tl-br="none" style:text-align-source="fix" style:repeat-content="false" fo:wrap-option="wrap" fo:border-left="0.74pt solid #d9d9d9" style:direction="ltr" fo:border-right="none"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1043in" style:writing-mode="page"/>
      <style:map style:condition="cell-content()=&quot;-&quot;" style:apply-style-name="ConditionalStyle_5f_41" style:base-cell-address="Checklist.D35"/>
    </style:style>
    <style:style style:name="ce68" style:family="table-cell" style:parent-style-name="Default">
      <style:table-cell-properties fo:border-bottom="none" style:diagonal-bl-tr="none" style:diagonal-tl-br="none" style:text-align-source="fix" style:repeat-content="false" fo:wrap-option="wrap" fo:border-left="0.74pt solid #d9d9d9" style:direction="ltr" fo:border-right="none" style:rotation-angle="0" style:rotation-align="none" style:shrink-to-fit="false" fo:border-top="0.74pt soli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1043in" style:writing-mode="page"/>
      <style:map style:condition="cell-content()=&quot;-&quot;" style:apply-style-name="ConditionalStyle_5f_41" style:base-cell-address="Checklist.D35"/>
    </style:style>
    <style:style style:name="ce69" style:family="table-cell" style:parent-style-name="Default">
      <style:table-cell-properties fo:border-bottom="none" style:diagonal-bl-tr="none" style:diagonal-tl-br="none" style:text-align-source="fix" style:repeat-content="false" fo:wrap-option="wrap" fo:border-left="0.74pt solid #d9d9d9"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start" css3t:text-justify="auto" fo:margin-left="0.1043in" style:writing-mode="page"/>
      <style:map style:condition="cell-content()=&quot;-&quot;" style:apply-style-name="ConditionalStyle_5f_41" style:base-cell-address="Checklist.D35"/>
    </style:style>
    <style:style style:name="ce70" style:family="table-cell" style:parent-style-name="Default">
      <style:table-cell-properties fo:border-bottom="none" style:diagonal-bl-tr="none" style:diagonal-tl-br="none" style:text-align-source="fix" style:repeat-content="false" fo:wrap-option="wrap" fo:border-left="0.74pt solid #d9d9d9" style:direction="ltr" fo:border-right="none" style:rotation-angle="0" style:rotation-align="none" style:shrink-to-fit="false" fo:border-top="0.74pt soli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1043in" style:writing-mode="page"/>
      <style:text-properties fo:color="#000000" style:text-outline="false" style:text-line-through-style="none" style:text-line-through-typ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loext:char-complex-color loext:theme-type="dark1" loext:color-type="theme"/>
      </style:text-properties>
      <style:map style:condition="cell-content()=&quot;-&quot;" style:apply-style-name="ConditionalStyle_5f_41" style:base-cell-address="Checklist.D35"/>
    </style:style>
    <style:style style:name="ce71" style:family="table-cell" style:parent-style-name="Default">
      <style:table-cell-properties fo:border-bottom="0.74pt solid #d9d9d9" style:diagonal-bl-tr="none" style:diagonal-tl-br="none" style:text-align-source="fix" style:repeat-content="false" fo:wrap-option="wrap" fo:border-left="0.74pt solid #d9d9d9" style:direction="ltr" fo:border-right="none" style:rotation-angle="0" style:rotation-align="none" style:shrink-to-fit="false" fo:border-top="0.74pt solid #000000"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style:table-cell-properties>
      <style:paragraph-properties fo:text-align="start" css3t:text-justify="auto" fo:margin-left="0.1043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loext:char-complex-color loext:theme-type="dark1" loext:color-type="theme"/>
      </style:text-properties>
      <style:map style:condition="cell-content()=&quot;-&quot;" style:apply-style-name="ConditionalStyle_5f_41" style:base-cell-address="Checklist.D35"/>
    </style:style>
    <style:style style:name="ce7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table-cell-properties fo:border-bottom="none" fo:background-color="#d9d9d9"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4"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5" style:family="table-cell" style:parent-style-name="Default">
      <style:table-cell-properties fo:border-bottom="1.76pt solid #000000" fo:background-color="#d9d9d9"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6" style:family="table-cell" style:parent-style-name="Default">
      <style:table-cell-properties fo:border-bottom="none" fo:background-color="#ffd966"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bottom" loext:vertical-justify="auto">
        <loext:background-complex-color loext:theme-type="accent4" loext:color-type="theme">
          <loext:transformation loext:type="lummod" loext:value="6000"/>
          <loext:transformation loext:type="lumoff" loext:value="3999"/>
        </loext:background-complex-color>
      </style:table-cell-properties>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7" style:family="table-cell" style:parent-style-name="Default">
      <style:table-cell-properties fo:border-bottom="none" fo:background-color="#ffd966"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loext:background-complex-color loext:theme-type="accent4" loext:color-type="theme">
          <loext:transformation loext:type="lummod" loext:value="6000"/>
          <loext:transformation loext:type="lumoff" loext:value="3999"/>
        </loext:background-complex-color>
      </style:table-cell-properties>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8" style:family="table-cell" style:parent-style-name="Default">
      <style:table-cell-properties fo:background-color="#ffd966" style:text-align-source="value-type" style:repeat-content="false" fo:wrap-option="wrap" style:direction="ltr" style:rotation-angle="0" style:rotation-align="none" style:shrink-to-fit="false" style:vertical-align="bottom" loext:vertical-justify="auto">
        <loext:background-complex-color loext:theme-type="accent4" loext:color-type="theme">
          <loext:transformation loext:type="lummod" loext:value="6000"/>
          <loext:transformation loext:type="lumoff" loext:value="3999"/>
        </loext:background-complex-color>
      </style:table-cell-properties>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9" style:family="table-cell" style:parent-style-name="Default">
      <style:table-cell-properties fo:border-bottom="1.76pt solid #000000" fo:background-color="#ffd966"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loext:background-complex-color loext:theme-type="accent4" loext:color-type="theme">
          <loext:transformation loext:type="lummod" loext:value="6000"/>
          <loext:transformation loext:type="lumoff" loext:value="3999"/>
        </loext:background-complex-color>
      </style:table-cell-properties>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80" style:family="table-cell" style:parent-style-name="Default">
      <style:table-cell-properties fo:border-bottom="1.76pt solid #000000" fo:background-color="#b4c7e7"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a&quot;" style:apply-style-name="ConditionalStyle_5f_40" style:base-cell-address="Checklist.F35"/>
      <style:map style:condition="cell-content()=&quot;na&quot;" style:apply-style-name="ConditionalStyle_5f_39" style:base-cell-address="Checklist.F35"/>
      <style:map style:condition="cell-content()=&quot;y&quot;" style:apply-style-name="ConditionalStyle_5f_38" style:base-cell-address="Checklist.F35"/>
      <style:map style:condition="cell-content()=&quot;n&quot;" style:apply-style-name="ConditionalStyle_5f_37" style:base-cell-address="Checklist.F35"/>
    </style:style>
    <style:style style:name="ce82"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a&quot;" style:apply-style-name="ConditionalStyle_5f_40" style:base-cell-address="Checklist.F35"/>
      <style:map style:condition="cell-content()=&quot;na&quot;" style:apply-style-name="ConditionalStyle_5f_39" style:base-cell-address="Checklist.F35"/>
      <style:map style:condition="cell-content()=&quot;y&quot;" style:apply-style-name="ConditionalStyle_5f_38" style:base-cell-address="Checklist.F35"/>
      <style:map style:condition="cell-content()=&quot;n&quot;" style:apply-style-name="ConditionalStyle_5f_37" style:base-cell-address="Checklist.F35"/>
    </style:style>
    <style:style style:name="ce8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othing&quot;" style:apply-style-name="ConditionalStyle_5f_35" style:base-cell-address="Checklist.F49"/>
    </style:style>
    <style:style style:name="ce8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a&quot;" style:apply-style-name="ConditionalStyle_5f_34" style:base-cell-address="Checklist.F52"/>
      <style:map style:condition="cell-content()=&quot;na&quot;" style:apply-style-name="ConditionalStyle_5f_33" style:base-cell-address="Checklist.F52"/>
      <style:map style:condition="cell-content()=&quot;y&quot;" style:apply-style-name="ConditionalStyle_5f_32" style:base-cell-address="Checklist.F52"/>
      <style:map style:condition="cell-content()=&quot;n&quot;" style:apply-style-name="ConditionalStyle_5f_31" style:base-cell-address="Checklist.F52"/>
    </style:style>
    <style:style style:name="ce85" style:family="table-cell" style:parent-style-name="Default">
      <style:table-cell-properties fo:border-bottom="none" fo:background-color="#b4c7e7"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b4c7e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4000"/>
          <loext:transformation loext:type="lumoff" loext:value="5999"/>
        </loext:char-complex-color>
      </style:text-properties>
      <style:map style:condition="cell-content()=&quot;n/a&quot;" style:apply-style-name="ConditionalStyle_5f_34" style:base-cell-address="Checklist.F52"/>
      <style:map style:condition="cell-content()=&quot;na&quot;" style:apply-style-name="ConditionalStyle_5f_33" style:base-cell-address="Checklist.F52"/>
      <style:map style:condition="cell-content()=&quot;y&quot;" style:apply-style-name="ConditionalStyle_5f_32" style:base-cell-address="Checklist.F52"/>
      <style:map style:condition="cell-content()=&quot;n&quot;" style:apply-style-name="ConditionalStyle_5f_31" style:base-cell-address="Checklist.F52"/>
    </style:style>
    <style:style style:name="ce8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a&quot;" style:apply-style-name="ConditionalStyle_5f_34" style:base-cell-address="Checklist.F52"/>
      <style:map style:condition="cell-content()=&quot;na&quot;" style:apply-style-name="ConditionalStyle_5f_33" style:base-cell-address="Checklist.F52"/>
      <style:map style:condition="cell-content()=&quot;y&quot;" style:apply-style-name="ConditionalStyle_5f_32" style:base-cell-address="Checklist.F52"/>
      <style:map style:condition="cell-content()=&quot;n&quot;" style:apply-style-name="ConditionalStyle_5f_31" style:base-cell-address="Checklist.F52"/>
    </style:style>
    <style:style style:name="ce8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a&quot;" style:apply-style-name="ConditionalStyle_5f_29" style:base-cell-address="Checklist.F88"/>
      <style:map style:condition="cell-content()=&quot;na&quot;" style:apply-style-name="ConditionalStyle_5f_28" style:base-cell-address="Checklist.F88"/>
      <style:map style:condition="cell-content()=&quot;y&quot;" style:apply-style-name="ConditionalStyle_5f_27" style:base-cell-address="Checklist.F88"/>
      <style:map style:condition="cell-content()=&quot;n&quot;" style:apply-style-name="ConditionalStyle_5f_26" style:base-cell-address="Checklist.F88"/>
    </style:style>
    <style:style style:name="ce88"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y&quot;" style:apply-style-name="ConditionalStyle_5f_25" style:base-cell-address="Checklist.F94"/>
      <style:map style:condition="cell-content()=&quot;n&quot;" style:apply-style-name="ConditionalStyle_5f_24" style:base-cell-address="Checklist.F94"/>
      <style:map style:condition="cell-content()=&quot;n/a&quot;" style:apply-style-name="ConditionalStyle_5f_23" style:base-cell-address="Checklist.F94"/>
      <style:map style:condition="cell-content()=&quot;na&quot;" style:apply-style-name="ConditionalStyle_5f_22" style:base-cell-address="Checklist.F94"/>
    </style:style>
    <style:style style:name="ce89" style:family="table-cell" style:parent-style-name="Default">
      <style:table-cell-properties fo:border-bottom="none" fo:background-color="#b4c7e7"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b4c7e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4000"/>
          <loext:transformation loext:type="lumoff" loext:value="5999"/>
        </loext:char-complex-color>
      </style:text-properties>
      <style:map style:condition="cell-content()=&quot;y&quot;" style:apply-style-name="ConditionalStyle_5f_25" style:base-cell-address="Checklist.F94"/>
      <style:map style:condition="cell-content()=&quot;n&quot;" style:apply-style-name="ConditionalStyle_5f_24" style:base-cell-address="Checklist.F94"/>
      <style:map style:condition="cell-content()=&quot;n/a&quot;" style:apply-style-name="ConditionalStyle_5f_23" style:base-cell-address="Checklist.F94"/>
      <style:map style:condition="cell-content()=&quot;na&quot;" style:apply-style-name="ConditionalStyle_5f_22" style:base-cell-address="Checklist.F94"/>
    </style:style>
    <style:style style:name="ce90" style:family="table-cell" style:parent-style-name="Default">
      <style:table-cell-properties fo:background-color="#8faadc"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a&quot;" style:apply-style-name="ConditionalStyle_5f_21" style:base-cell-address="Checklist.F134"/>
      <style:map style:condition="cell-content()=&quot;na&quot;" style:apply-style-name="ConditionalStyle_5f_20" style:base-cell-address="Checklist.F134"/>
      <style:map style:condition="cell-content()=&quot;y&quot;" style:apply-style-name="ConditionalStyle_5f_19" style:base-cell-address="Checklist.F134"/>
      <style:map style:condition="cell-content()=&quot;n&quot;" style:apply-style-name="ConditionalStyle_5f_18" style:base-cell-address="Checklist.F134"/>
    </style:style>
    <style:style style:name="ce92"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othing&quot;" style:apply-style-name="ConditionalStyle_5f_17" style:base-cell-address="Checklist.F142"/>
    </style:style>
    <style:style style:name="ce93" style:family="table-cell" style:parent-style-name="Default">
      <style:table-cell-properties fo:border-bottom="none" fo:background-color="#b4c7e7"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b4c7e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4000"/>
          <loext:transformation loext:type="lumoff" loext:value="5999"/>
        </loext:char-complex-color>
      </style:text-properties>
      <style:map style:condition="cell-content()=&quot;n/a&quot;" style:apply-style-name="ConditionalStyle_5f_16" style:base-cell-address="Checklist.F145"/>
      <style:map style:condition="cell-content()=&quot;na&quot;" style:apply-style-name="ConditionalStyle_5f_15" style:base-cell-address="Checklist.F145"/>
      <style:map style:condition="cell-content()=&quot;y&quot;" style:apply-style-name="ConditionalStyle_5f_14" style:base-cell-address="Checklist.F145"/>
      <style:map style:condition="cell-content()=&quot;n&quot;" style:apply-style-name="ConditionalStyle_5f_13" style:base-cell-address="Checklist.F145"/>
    </style:style>
    <style:style style:name="ce9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a&quot;" style:apply-style-name="ConditionalStyle_5f_16" style:base-cell-address="Checklist.F145"/>
      <style:map style:condition="cell-content()=&quot;na&quot;" style:apply-style-name="ConditionalStyle_5f_15" style:base-cell-address="Checklist.F145"/>
      <style:map style:condition="cell-content()=&quot;y&quot;" style:apply-style-name="ConditionalStyle_5f_14" style:base-cell-address="Checklist.F145"/>
      <style:map style:condition="cell-content()=&quot;n&quot;" style:apply-style-name="ConditionalStyle_5f_13" style:base-cell-address="Checklist.F145"/>
    </style:style>
    <style:style style:name="ce95"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a&quot;" style:apply-style-name="ConditionalStyle_5f_9" style:base-cell-address="Checklist.F177"/>
      <style:map style:condition="cell-content()=&quot;na&quot;" style:apply-style-name="ConditionalStyle_5f_12" style:base-cell-address="Checklist.F177"/>
      <style:map style:condition="cell-content()=&quot;y&quot;" style:apply-style-name="ConditionalStyle_5f_11" style:base-cell-address="Checklist.F177"/>
      <style:map style:condition="cell-content()=&quot;n&quot;" style:apply-style-name="ConditionalStyle_5f_10" style:base-cell-address="Checklist.F177"/>
    </style:style>
    <style:style style:name="ce9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map style:condition="cell-content()=&quot;nothing&quot;" style:apply-style-name="ConditionalStyle_5f_8" style:base-cell-address="Checklist.F186"/>
    </style:style>
    <style:style style:name="ce9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othing&quot;" style:apply-style-name="ConditionalStyle_5f_8" style:base-cell-address="Checklist.F186"/>
    </style:style>
    <style:style style:name="ce98" style:family="table-cell" style:parent-style-name="Default">
      <style:table-cell-properties fo:border-bottom="1.76pt solid #000000" fo:background-color="#8faadc"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0" style:family="table-cell" style:parent-style-name="Default">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1" style:family="table-cell" style:parent-style-name="Default">
      <style:table-cell-properties fo:background-color="#d9d9d9" style:text-align-source="fix" style:repeat-content="false" fo:wrap-option="wrap"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2" style:family="table-cell" style:parent-style-name="Default">
      <style:table-cell-properties fo:border-bottom="1.76pt solid #000000" fo:background-color="#d9d9d9"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3" style:family="table-cell" style:parent-style-name="Default">
      <style:table-cell-properties fo:border-bottom="1.76pt solid #000000" fo:background-color="#ffd966"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loext:background-complex-color loext:theme-type="accent4"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4" style:family="table-cell" style:parent-style-name="Default">
      <style:table-cell-properties fo:border-bottom="0.74pt solid #bfbfbf"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bottom" loext:vertical-justify="auto">
        <loext:border-bottom-complex-color loext:theme-type="light1" loext:color-type="theme">
          <loext:transformation loext:type="lummod" loext:value="7500"/>
        </loext:border-bottom-complex-color>
      </style:table-cell-properties>
      <style:paragraph-properties fo:text-align="end" css3t:text-justify="auto" fo:margin-left="0.1043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5" style:family="table-cell" style:parent-style-name="Default">
      <style:table-cell-properties fo:border-bottom="0.74pt solid #bfbfbf" style:diagonal-bl-tr="none" style:diagonal-tl-br="none" style:text-align-source="fix" style:repeat-content="false" fo:wrap-option="wrap" fo:border-left="1.76pt solid #000000" style:direction="ltr" fo:border-right="none" style:rotation-angle="0" style:rotation-align="none" style:shrink-to-fit="false" fo:border-top="0.74pt solid #bfbfbf" style:vertical-align="bottom" loext:vertical-justify="auto">
        <loext:border-bottom-complex-color loext:theme-type="light1" loext:color-type="theme">
          <loext:transformation loext:type="lummod" loext:value="7500"/>
        </loext:border-bottom-complex-color>
        <loext:border-top-complex-color loext:theme-type="light1" loext:color-type="theme">
          <loext:transformation loext:type="lummod" loext:value="7500"/>
        </loext:border-top-complex-color>
      </style:table-cell-properties>
      <style:paragraph-properties fo:text-align="end" css3t:text-justify="auto" fo:margin-left="0.1043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6"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0.74pt solid #bfbfbf" style:vertical-align="bottom" loext:vertical-justify="auto">
        <loext:border-top-complex-color loext:theme-type="light1" loext:color-type="theme">
          <loext:transformation loext:type="lummod" loext:value="7500"/>
        </loext:border-top-complex-color>
      </style:table-cell-properties>
      <style:paragraph-properties fo:text-align="end" css3t:text-justify="auto" fo:margin-left="0.1043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7" style:family="table-cell" style:parent-style-name="Default">
      <style:table-cell-properties fo:border-bottom="1.76pt solid #000000" fo:background-color="#b4c7e7"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cell-content()=&quot;Section Complete&quot;" style:apply-style-name="ConditionalStyle_5f_7" style:base-cell-address="Checklist.G33"/>
      <style:map style:condition="cell-content()=&quot;Section Incomplete&quot;" style:apply-style-name="ConditionalStyle_5f_6" style:base-cell-address="Checklist.G33"/>
    </style:style>
    <style:style style:name="ce10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map style:condition="cell-content()=&quot;complete&quot;" style:apply-style-name="ConditionalStyle_5f_5" style:base-cell-address="Checklist.G34"/>
      <style:map style:condition="cell-content()=&quot;incomplete&quot;" style:apply-style-name="ConditionalStyle_5f_4" style:base-cell-address="Checklist.G34"/>
    </style:style>
    <style:style style:name="ce109"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a&quot;" style:apply-style-name="ConditionalStyle_5f_40" style:base-cell-address="Checklist.F35"/>
      <style:map style:condition="cell-content()=&quot;na&quot;" style:apply-style-name="ConditionalStyle_5f_39" style:base-cell-address="Checklist.F35"/>
      <style:map style:condition="cell-content()=&quot;y&quot;" style:apply-style-name="ConditionalStyle_5f_38" style:base-cell-address="Checklist.F35"/>
      <style:map style:condition="cell-content()=&quot;n&quot;" style:apply-style-name="ConditionalStyle_5f_37" style:base-cell-address="Checklist.F35"/>
    </style:style>
    <style:style style:name="ce11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a&quot;" style:apply-style-name="ConditionalStyle_5f_40" style:base-cell-address="Checklist.F35"/>
      <style:map style:condition="cell-content()=&quot;na&quot;" style:apply-style-name="ConditionalStyle_5f_39" style:base-cell-address="Checklist.F35"/>
      <style:map style:condition="cell-content()=&quot;y&quot;" style:apply-style-name="ConditionalStyle_5f_38" style:base-cell-address="Checklist.F35"/>
      <style:map style:condition="cell-content()=&quot;n&quot;" style:apply-style-name="ConditionalStyle_5f_37" style:base-cell-address="Checklist.F35"/>
    </style:style>
    <style:style style:name="ce111"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othing&quot;" style:apply-style-name="ConditionalStyle_5f_35" style:base-cell-address="Checklist.F49"/>
    </style:style>
    <style:style style:name="ce112"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a&quot;" style:apply-style-name="ConditionalStyle_5f_34" style:base-cell-address="Checklist.F52"/>
      <style:map style:condition="cell-content()=&quot;na&quot;" style:apply-style-name="ConditionalStyle_5f_33" style:base-cell-address="Checklist.F52"/>
      <style:map style:condition="cell-content()=&quot;y&quot;" style:apply-style-name="ConditionalStyle_5f_32" style:base-cell-address="Checklist.F52"/>
      <style:map style:condition="cell-content()=&quot;n&quot;" style:apply-style-name="ConditionalStyle_5f_31" style:base-cell-address="Checklist.F52"/>
    </style:style>
    <style:style style:name="ce113" style:family="table-cell" style:parent-style-name="Default">
      <style:table-cell-properties fo:border-bottom="none" fo:background-color="#b4c7e7"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b4c7e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4000"/>
          <loext:transformation loext:type="lumoff" loext:value="5999"/>
        </loext:char-complex-color>
      </style:text-properties>
      <style:map style:condition="cell-content()=&quot;n/a&quot;" style:apply-style-name="ConditionalStyle_5f_34" style:base-cell-address="Checklist.F52"/>
      <style:map style:condition="cell-content()=&quot;na&quot;" style:apply-style-name="ConditionalStyle_5f_33" style:base-cell-address="Checklist.F52"/>
      <style:map style:condition="cell-content()=&quot;y&quot;" style:apply-style-name="ConditionalStyle_5f_32" style:base-cell-address="Checklist.F52"/>
      <style:map style:condition="cell-content()=&quot;n&quot;" style:apply-style-name="ConditionalStyle_5f_31" style:base-cell-address="Checklist.F52"/>
    </style:style>
    <style:style style:name="ce114"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a&quot;" style:apply-style-name="ConditionalStyle_5f_34" style:base-cell-address="Checklist.F52"/>
      <style:map style:condition="cell-content()=&quot;na&quot;" style:apply-style-name="ConditionalStyle_5f_33" style:base-cell-address="Checklist.F52"/>
      <style:map style:condition="cell-content()=&quot;y&quot;" style:apply-style-name="ConditionalStyle_5f_32" style:base-cell-address="Checklist.F52"/>
      <style:map style:condition="cell-content()=&quot;n&quot;" style:apply-style-name="ConditionalStyle_5f_31" style:base-cell-address="Checklist.F52"/>
    </style:style>
    <style:style style:name="ce1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map style:condition="cell-content()=&quot;complete&quot;" style:apply-style-name="ConditionalStyle_5f_3" style:base-cell-address="Checklist.G87"/>
      <style:map style:condition="cell-content()=&quot;incomplete&quot;" style:apply-style-name="ConditionalStyle_5f_2" style:base-cell-address="Checklist.G87"/>
    </style:style>
    <style:style style:name="ce116"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a&quot;" style:apply-style-name="ConditionalStyle_5f_29" style:base-cell-address="Checklist.F88"/>
      <style:map style:condition="cell-content()=&quot;na&quot;" style:apply-style-name="ConditionalStyle_5f_28" style:base-cell-address="Checklist.F88"/>
      <style:map style:condition="cell-content()=&quot;y&quot;" style:apply-style-name="ConditionalStyle_5f_27" style:base-cell-address="Checklist.F88"/>
      <style:map style:condition="cell-content()=&quot;n&quot;" style:apply-style-name="ConditionalStyle_5f_26" style:base-cell-address="Checklist.F88"/>
    </style:style>
    <style:style style:name="ce117"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y&quot;" style:apply-style-name="ConditionalStyle_5f_25" style:base-cell-address="Checklist.F94"/>
      <style:map style:condition="cell-content()=&quot;n&quot;" style:apply-style-name="ConditionalStyle_5f_24" style:base-cell-address="Checklist.F94"/>
      <style:map style:condition="cell-content()=&quot;n/a&quot;" style:apply-style-name="ConditionalStyle_5f_23" style:base-cell-address="Checklist.F94"/>
      <style:map style:condition="cell-content()=&quot;na&quot;" style:apply-style-name="ConditionalStyle_5f_22" style:base-cell-address="Checklist.F94"/>
    </style:style>
    <style:style style:name="ce118" style:family="table-cell" style:parent-style-name="Default">
      <style:table-cell-properties fo:border-bottom="none" fo:background-color="#b4c7e7"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b4c7e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4000"/>
          <loext:transformation loext:type="lumoff" loext:value="5999"/>
        </loext:char-complex-color>
      </style:text-properties>
      <style:map style:condition="cell-content()=&quot;y&quot;" style:apply-style-name="ConditionalStyle_5f_25" style:base-cell-address="Checklist.F94"/>
      <style:map style:condition="cell-content()=&quot;n&quot;" style:apply-style-name="ConditionalStyle_5f_24" style:base-cell-address="Checklist.F94"/>
      <style:map style:condition="cell-content()=&quot;n/a&quot;" style:apply-style-name="ConditionalStyle_5f_23" style:base-cell-address="Checklist.F94"/>
      <style:map style:condition="cell-content()=&quot;na&quot;" style:apply-style-name="ConditionalStyle_5f_22" style:base-cell-address="Checklist.F94"/>
    </style:style>
    <style:style style:name="ce119"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a&quot;" style:apply-style-name="ConditionalStyle_5f_21" style:base-cell-address="Checklist.F134"/>
      <style:map style:condition="cell-content()=&quot;na&quot;" style:apply-style-name="ConditionalStyle_5f_20" style:base-cell-address="Checklist.F134"/>
      <style:map style:condition="cell-content()=&quot;y&quot;" style:apply-style-name="ConditionalStyle_5f_19" style:base-cell-address="Checklist.F134"/>
      <style:map style:condition="cell-content()=&quot;n&quot;" style:apply-style-name="ConditionalStyle_5f_18" style:base-cell-address="Checklist.F134"/>
    </style:style>
    <style:style style:name="ce12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othing&quot;" style:apply-style-name="ConditionalStyle_5f_17" style:base-cell-address="Checklist.F142"/>
    </style:style>
    <style:style style:name="ce121" style:family="table-cell" style:parent-style-name="Default">
      <style:table-cell-properties fo:border-bottom="none" fo:background-color="#b4c7e7"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b4c7e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4000"/>
          <loext:transformation loext:type="lumoff" loext:value="5999"/>
        </loext:char-complex-color>
      </style:text-properties>
      <style:map style:condition="cell-content()=&quot;n/a&quot;" style:apply-style-name="ConditionalStyle_5f_16" style:base-cell-address="Checklist.F145"/>
      <style:map style:condition="cell-content()=&quot;na&quot;" style:apply-style-name="ConditionalStyle_5f_15" style:base-cell-address="Checklist.F145"/>
      <style:map style:condition="cell-content()=&quot;y&quot;" style:apply-style-name="ConditionalStyle_5f_14" style:base-cell-address="Checklist.F145"/>
      <style:map style:condition="cell-content()=&quot;n&quot;" style:apply-style-name="ConditionalStyle_5f_13" style:base-cell-address="Checklist.F145"/>
    </style:style>
    <style:style style:name="ce122"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a&quot;" style:apply-style-name="ConditionalStyle_5f_16" style:base-cell-address="Checklist.F145"/>
      <style:map style:condition="cell-content()=&quot;na&quot;" style:apply-style-name="ConditionalStyle_5f_15" style:base-cell-address="Checklist.F145"/>
      <style:map style:condition="cell-content()=&quot;y&quot;" style:apply-style-name="ConditionalStyle_5f_14" style:base-cell-address="Checklist.F145"/>
      <style:map style:condition="cell-content()=&quot;n&quot;" style:apply-style-name="ConditionalStyle_5f_13" style:base-cell-address="Checklist.F145"/>
    </style:style>
    <style:style style:name="ce123"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124"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a&quot;" style:apply-style-name="ConditionalStyle_5f_9" style:base-cell-address="Checklist.F177"/>
      <style:map style:condition="cell-content()=&quot;na&quot;" style:apply-style-name="ConditionalStyle_5f_12" style:base-cell-address="Checklist.F177"/>
      <style:map style:condition="cell-content()=&quot;y&quot;" style:apply-style-name="ConditionalStyle_5f_11" style:base-cell-address="Checklist.F177"/>
      <style:map style:condition="cell-content()=&quot;n&quot;" style:apply-style-name="ConditionalStyle_5f_10" style:base-cell-address="Checklist.F177"/>
    </style:style>
    <style:style style:name="ce12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map style:condition="cell-content()=&quot;nothing&quot;" style:apply-style-name="ConditionalStyle_5f_8" style:base-cell-address="Checklist.F186"/>
    </style:style>
    <style:style style:name="ce126"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map style:condition="cell-content()=&quot;nothing&quot;" style:apply-style-name="ConditionalStyle_5f_8" style:base-cell-address="Checklist.F186"/>
    </style:style>
    <style:style style:name="ce127" style:family="table-cell" style:parent-style-name="Default">
      <style:table-cell-properties fo:border-bottom="1.76pt solid #000000" fo:background-color="#8faadc"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8" style:family="table-cell" style:parent-style-name="Default">
      <style:table-cell-properties fo:border-bottom="none" fo:background-color="#d9d9d9"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style>
    <style:style style:name="ce129" style:family="table-cell" style:parent-style-name="Default">
      <style:table-cell-properties fo:border-bottom="0.74pt solid #bfbfbf"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loext:border-bottom-complex-color loext:theme-type="light1" loext:color-type="theme">
          <loext:transformation loext:type="lummod" loext:value="7500"/>
        </loext:border-bottom-complex-color>
      </style:table-cell-properties>
      <style:paragraph-properties fo:text-align="end" css3t:text-justify="auto" fo:margin-left="0.1043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30" style:family="table-cell" style:parent-style-name="Default">
      <style:table-cell-properties fo:border-bottom="0.74pt solid #bfbfbf" style:diagonal-bl-tr="none" style:diagonal-tl-br="none" style:text-align-source="fix" style:repeat-content="false" fo:wrap-option="wrap" fo:border-left="none" style:direction="ltr" fo:border-right="none" style:rotation-angle="0" style:rotation-align="none" style:shrink-to-fit="false" fo:border-top="0.74pt solid #bfbfbf" style:vertical-align="bottom" loext:vertical-justify="auto">
        <loext:border-bottom-complex-color loext:theme-type="light1" loext:color-type="theme">
          <loext:transformation loext:type="lummod" loext:value="7500"/>
        </loext:border-bottom-complex-color>
        <loext:border-top-complex-color loext:theme-type="light1" loext:color-type="theme">
          <loext:transformation loext:type="lummod" loext:value="7500"/>
        </loext:border-top-complex-color>
      </style:table-cell-properties>
      <style:paragraph-properties fo:text-align="end" css3t:text-justify="auto" fo:margin-left="0.1043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31"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0.74pt solid #bfbfbf" style:vertical-align="bottom" loext:vertical-justify="auto">
        <loext:border-top-complex-color loext:theme-type="light1" loext:color-type="theme">
          <loext:transformation loext:type="lummod" loext:value="7500"/>
        </loext:border-top-complex-color>
      </style:table-cell-properties>
      <style:paragraph-properties fo:text-align="end" css3t:text-justify="auto" fo:margin-left="0.1043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32" style:family="table-cell" style:parent-style-name="Default">
      <style:table-cell-properties fo:border-bottom="1.76pt solid #000000" fo:background-color="#ffd966"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loext:background-complex-color loext:theme-type="accent4"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style>
    <style:style style:name="ce133" style:family="table-cell" style:parent-style-name="Default">
      <style:table-cell-properties fo:background-color="#d9d9d9" style:text-align-source="fix" style:repeat-content="false" fo:wrap-option="wrap"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style>
    <style:style style:name="ce134" style:family="table-cell" style:parent-style-name="Default">
      <style:table-cell-properties fo:border-bottom="1.76pt solid #000000" fo:background-color="#d9d9d9"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style>
    <style:style style:name="ce135" style:family="table-cell" style:parent-style-name="Default">
      <style:table-cell-properties fo:border-bottom="none" fo:background-color="#d0cece"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middle" loext:vertical-justify="auto">
        <loext:background-complex-color loext:theme-type="light2" loext:color-type="theme">
          <loext:transformation loext:type="lummod" loext:value="9000"/>
        </loext:background-complex-color>
      </style:table-cell-properties>
      <style:paragraph-properties css3t:text-justify="auto" fo:margin-left="0in" style:writing-mode="page"/>
    </style:style>
    <style:style style:name="ce136" style:family="table-cell" style:parent-style-name="Default">
      <style:table-cell-properties fo:border-bottom="0.74pt solid #d9d9d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in" style:writing-mode="page"/>
    </style:style>
    <style:style style:name="ce137" style:family="table-cell" style:parent-style-name="Default">
      <style:table-cell-properties fo:border-bottom="0.74pt solid #d9d9d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in" style:writing-mode="page"/>
    </style:style>
    <style:style style:name="ce138" style:family="table-cell" style:parent-style-name="Default" style:data-style-name="N152">
      <style:table-cell-properties fo:border-bottom="0.74pt solid #d9d9d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in" style:writing-mode="page"/>
    </style:style>
    <style:style style:name="ce139"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d9d9d9" style:vertical-align="middle" loext:vertical-justify="auto">
        <loext:border-top-complex-color loext:theme-type="light1" loext:color-type="theme">
          <loext:transformation loext:type="lummod" loext:value="8500"/>
        </loext:border-top-complex-color>
      </style:table-cell-properties>
      <style:paragraph-properties fo:text-align="center" css3t:text-justify="auto" fo:margin-left="0in" style:writing-mode="page"/>
    </style:style>
    <style:style style:name="ce140" style:family="table-cell" style:parent-style-name="Default">
      <style:table-cell-properties fo:border-bottom="none" fo:background-color="#d0cec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in" style:writing-mode="page"/>
    </style:style>
    <style:style style:name="ce141" style:family="table-cell" style:parent-style-name="Default" style:data-style-name="N152">
      <style:table-cell-properties fo:border-bottom="0.74pt solid #d9d9d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in" style:writing-mode="page"/>
    </style:style>
    <style:style style:name="ce142" style:family="table-cell" style:parent-style-name="Default" style:data-style-name="N15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d9d9d9" style:vertical-align="middle" loext:vertical-justify="auto">
        <loext:border-top-complex-color loext:theme-type="light1" loext:color-type="theme">
          <loext:transformation loext:type="lummod" loext:value="8500"/>
        </loext:border-top-complex-color>
      </style:table-cell-properties>
      <style:paragraph-properties fo:text-align="center" css3t:text-justify="auto" fo:margin-left="0in" style:writing-mode="page"/>
    </style:style>
    <style:style style:name="ce143" style:family="table-cell" style:parent-style-name="Default">
      <style:table-cell-properties fo:border-bottom="none" fo:background-color="#b4c7e7"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style>
    <style:style style:name="ce144" style:family="table-cell" style:parent-style-name="Default">
      <style:table-cell-properties fo:border-bottom="0.74pt solid #d9d9d9" fo:background-color="#ffff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in" style:writing-mode="page"/>
    </style:style>
    <style:style style:name="ce145"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146" style:family="table-cell" style:parent-style-name="Default">
      <style:table-cell-properties fo:background-color="#8faadc"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style>
    <style:style style:name="ce147" style:family="table-cell" style:parent-style-name="Default">
      <style:table-cell-properties fo:border-bottom="0.74pt solid #d9d9d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in" style:writing-mode="page"/>
    </style:style>
    <style:style style:name="ce148"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loext:char-complex-color loext:theme-type="dark1" loext:color-type="theme"/>
      </style:text-properties>
    </style:style>
    <style:style style:name="ce149" style:family="table-cell" style:parent-style-name="Default">
      <style:table-cell-properties fo:border-bottom="0.74pt solid #bfbfbf" fo:background-color="#bdd7e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bottom" loext:vertical-justify="auto">
        <loext:border-bottom-complex-color loext:theme-type="light1" loext:color-type="theme">
          <loext:transformation loext:type="lummod" loext:value="7500"/>
        </loext:border-bottom-complex-color>
        <loext:background-complex-color loext:theme-type="accent5"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style>
    <style:style style:name="ce150" style:family="table-cell" style:parent-style-name="Default">
      <style:table-cell-properties fo:border-bottom="0.74pt solid #bfbfbf" fo:background-color="#bdd7ee" style:diagonal-bl-tr="none" style:diagonal-tl-br="none" style:text-align-source="fix" style:repeat-content="false" fo:wrap-option="wrap" fo:border-left="none" style:direction="ltr" fo:border-right="1.76pt solid #000000" style:rotation-angle="0" style:rotation-align="none" style:shrink-to-fit="false" fo:border-top="0.74pt solid #bfbfbf" style:vertical-align="bottom" loext:vertical-justify="auto">
        <loext:border-bottom-complex-color loext:theme-type="light1" loext:color-type="theme">
          <loext:transformation loext:type="lummod" loext:value="7500"/>
        </loext:border-bottom-complex-color>
        <loext:background-complex-color loext:theme-type="accent5" loext:color-type="theme">
          <loext:transformation loext:type="lummod" loext:value="4000"/>
          <loext:transformation loext:type="lumoff" loext:value="5999"/>
        </loext:background-complex-color>
        <loext:border-top-complex-color loext:theme-type="light1" loext:color-type="theme">
          <loext:transformation loext:type="lummod" loext:value="7500"/>
        </loext:border-top-complex-color>
      </style:table-cell-properties>
      <style:paragraph-properties fo:text-align="center" css3t:text-justify="auto" fo:margin-left="0in" style:writing-mode="page"/>
    </style:style>
    <style:style style:name="ce151" style:family="table-cell" style:parent-style-name="Default">
      <style:table-cell-properties fo:border-bottom="1.76pt solid #000000" fo:background-color="#bdd7ee" style:diagonal-bl-tr="none" style:diagonal-tl-br="none" style:text-align-source="fix" style:repeat-content="false" fo:wrap-option="wrap" fo:border-left="none" style:direction="ltr" fo:border-right="1.76pt solid #000000" style:rotation-angle="0" style:rotation-align="none" style:shrink-to-fit="false" fo:border-top="0.74pt solid #bfbfbf" style:vertical-align="bottom" loext:vertical-justify="auto">
        <loext:background-complex-color loext:theme-type="accent5" loext:color-type="theme">
          <loext:transformation loext:type="lummod" loext:value="4000"/>
          <loext:transformation loext:type="lumoff" loext:value="5999"/>
        </loext:background-complex-color>
        <loext:border-top-complex-color loext:theme-type="light1" loext:color-type="theme">
          <loext:transformation loext:type="lummod" loext:value="7500"/>
        </loext:border-top-complex-color>
      </style:table-cell-properties>
      <style:paragraph-properties fo:text-align="center" css3t:text-justify="auto" fo:margin-left="0in" style:writing-mode="page"/>
    </style:style>
    <style:style style:name="ce152" style:family="table-cell" style:parent-style-name="Default">
      <style:table-cell-properties fo:border-bottom="1.76pt solid #000000" fo:background-color="#ffd966"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loext:background-complex-color loext:theme-type="accent4" loext:color-type="theme">
          <loext:transformation loext:type="lummod" loext:value="6000"/>
          <loext:transformation loext:type="lumoff" loext:value="3999"/>
        </loext:background-complex-color>
      </style:table-cell-properties>
      <style:paragraph-properties css3t:text-justify="auto" fo:margin-left="0in" style:writing-mode="page"/>
    </style:style>
    <style:style style:name="ce153" style:family="table-cell" style:parent-style-name="Default">
      <style:table-cell-properties fo:border-bottom="1.76pt solid #000000" fo:background-color="#ffffff"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loext:background-complex-color loext:theme-type="light1" loext:color-type="theme"/>
      </style:table-cell-properties>
      <style:paragraph-properties fo:text-align="center"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loext:char-complex-color loext:theme-type="dark1" loext:color-type="theme"/>
      </style:text-properties>
    </style:style>
    <style:style style:name="ce154" style:family="table-cell" style:parent-style-name="Default">
      <style:table-cell-properties fo:border-bottom="1.76pt solid #000000" fo:background-color="#b4c7e7"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55" style:family="table-cell" style:parent-style-name="Default">
      <style:table-cell-properties fo:border-bottom="none" fo:background-color="#d0cece"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middle" loext:vertical-justify="auto">
        <loext:background-complex-color loext:theme-type="light2" loext:color-type="theme">
          <loext:transformation loext:type="lummod" loext:value="9000"/>
        </loext:background-complex-color>
      </style:table-cell-properties>
      <style:paragraph-properties css3t:text-justify="auto" fo:margin-left="0in" style:writing-mode="page"/>
    </style:style>
    <style:style style:name="ce156" style:family="table-cell" style:parent-style-name="Default">
      <style:table-cell-properties fo:border-bottom="0.74pt solid #d9d9d9"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style:table-cell-properties>
      <style:paragraph-properties css3t:text-justify="auto" fo:margin-left="0in" style:writing-mode="page"/>
    </style:style>
    <style:style style:name="ce157" style:family="table-cell" style:parent-style-name="Default">
      <style:table-cell-properties fo:border-bottom="0.74pt solid #d9d9d9" style:diagonal-bl-tr="none" style:diagonal-tl-br="none" style:text-align-source="value-type" style:repeat-content="false" fo:wrap-option="wrap" fo:border-left="none" style:direction="ltr" fo:border-right="1.76pt solid #000000"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css3t:text-justify="auto" fo:margin-left="0in" style:writing-mode="page"/>
    </style:style>
    <style:style style:name="ce158"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0.74pt solid #d9d9d9" style:vertical-align="middle" loext:vertical-justify="auto">
        <loext:border-top-complex-color loext:theme-type="light1" loext:color-type="theme">
          <loext:transformation loext:type="lummod" loext:value="8500"/>
        </loext:border-top-complex-color>
      </style:table-cell-properties>
      <style:paragraph-properties css3t:text-justify="auto" fo:margin-left="0in" style:writing-mode="page"/>
    </style:style>
    <style:style style:name="ce159" style:family="table-cell" style:parent-style-name="Default">
      <style:table-cell-properties fo:border-bottom="none" fo:background-color="#d0cece" style:text-align-source="value-type" style:repeat-content="false" fo:wrap-option="wrap" fo:border-left="none" style:direction="ltr" fo:border-right="1.76pt solid #000000" style:rotation-angle="0" style:rotation-align="none" style:shrink-to-fit="false" fo:border-top="none" style:vertical-align="middle" loext:vertical-justify="auto">
        <loext:background-complex-color loext:theme-type="light2" loext:color-type="theme">
          <loext:transformation loext:type="lummod" loext:value="9000"/>
        </loext:background-complex-color>
      </style:table-cell-properties>
      <style:paragraph-properties css3t:text-justify="auto" fo:margin-left="0in" style:writing-mode="page"/>
    </style:style>
    <style:style style:name="ce160" style:family="table-cell" style:parent-style-name="Default">
      <style:table-cell-properties fo:border-bottom="none" fo:background-color="#b4c7e7" style:text-align-source="value-type" style:repeat-content="false" fo:wrap-option="wrap" fo:border-left="none" style:direction="ltr" fo:border-right="1.76pt solid #000000" style:rotation-angle="0" style:rotation-align="none" style:shrink-to-fit="false" fo:border-top="non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css3t:text-justify="auto" fo:margin-left="0in" style:writing-mode="page"/>
    </style:style>
    <style:style style:name="ce161" style:family="table-cell" style:parent-style-name="Default">
      <style:table-cell-properties fo:border-bottom="0.74pt solid #d9d9d9" style:diagonal-bl-tr="none" style:diagonal-tl-br="none" style:text-align-source="value-type" style:repeat-content="false" fo:wrap-option="wrap" fo:border-left="none" style:direction="ltr" fo:border-right="1.76pt solid #000000"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fo:border-bottom="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in" style:writing-mode="page"/>
    </style:style>
    <style:style style:name="ce163" style:family="table-cell" style:parent-style-name="Default">
      <style:table-cell-properties fo:border-bottom="1.76pt solid #000000" fo:background-color="#8faadc"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style>
    <style:style style:name="ce164" style:family="table-cell" style:parent-style-name="Default">
      <style:table-cell-properties fo:border-bottom="0.74pt solid #d9d9d9" style:diagonal-bl-tr="none" style:diagonal-tl-br="none" style:text-align-source="fix" style:repeat-content="false" fo:wrap-option="wrap" fo:border-left="none" style:direction="ltr" fo:border-right="1.76pt solid #000000"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in" style:writing-mode="page"/>
    </style:style>
    <style:style style:name="ce165" style:family="table-cell" style:parent-style-name="Default">
      <style:table-cell-properties fo:border-bottom="0.74pt solid #d9d9d9"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loext:border-bottom-complex-color loext:theme-type="light1" loext:color-type="theme">
          <loext:transformation loext:type="lummod" loext:value="8500"/>
        </loext:border-bottom-complex-color>
      </style:table-cell-properties>
      <style:paragraph-properties css3t:text-justify="auto" fo:margin-left="0in" style:writing-mode="page"/>
    </style:style>
    <style:style style:name="ce166"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d9d9d9" style:vertical-align="middle" loext:vertical-justify="auto">
        <loext:border-top-complex-color loext:theme-type="light1" loext:color-type="theme">
          <loext:transformation loext:type="lummod" loext:value="8500"/>
        </loext:border-top-complex-color>
      </style:table-cell-properties>
      <style:paragraph-properties css3t:text-justify="auto" fo:margin-left="0in" style:writing-mode="page"/>
    </style:style>
    <style:style style:name="ce167" style:family="table-cell" style:parent-style-name="Default">
      <style:table-cell-properties fo:border-bottom="1.76pt solid #000000" fo:background-color="#8faadc" style:diagonal-bl-tr="none" style:diagonal-tl-br="none" style:text-align-source="fix" style:repeat-content="false" fo:wrap-option="wrap" fo:border-left="none" style:direction="ltr" fo:border-right="1.76pt solid #000000" style:rotation-angle="0" style:rotation-align="none" style:shrink-to-fit="false" fo:border-top="non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style>
    <style:style style:name="ce168" style:family="table-cell" style:parent-style-name="Default">
      <style:table-cell-properties fo:border-bottom="1.76pt solid #000000" fo:background-color="#ffffff"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loext:background-complex-color loext:theme-type="light1" loext:color-type="theme"/>
      </style:table-cell-properties>
      <style:paragraph-properties fo:text-align="center"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loext:char-complex-color loext:theme-type="dark1" loext:color-type="theme"/>
      </style:text-properties>
    </style:style>
    <style:style style:name="ce169" style:family="table-cell" style:parent-style-name="Default">
      <style:table-cell-properties fo:border-bottom="none" fo:background-color="#d0cece"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middle" loext:vertical-justify="auto">
        <loext:background-complex-color loext:theme-type="light2" loext:color-type="theme">
          <loext:transformation loext:type="lummod" loext:value="9000"/>
        </loext:background-complex-color>
      </style:table-cell-properties>
      <style:paragraph-properties css3t:text-justify="auto" fo:margin-left="0in" style:writing-mode="page"/>
    </style:style>
    <style:style style:name="ce170" style:family="table-cell" style:parent-style-name="Default">
      <style:table-cell-properties fo:border-bottom="0.74pt solid #d9d9d9"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style:table-cell-properties>
      <style:paragraph-properties css3t:text-justify="auto" fo:margin-left="0in" style:writing-mode="page"/>
    </style:style>
    <style:style style:name="ce171" style:family="table-cell" style:parent-style-name="Default">
      <style:table-cell-properties fo:border-bottom="0.74pt solid #d9d9d9" style:diagonal-bl-tr="none" style:diagonal-tl-br="none" style:text-align-source="value-type" style:repeat-content="false" fo:wrap-option="wrap" fo:border-left="none" style:direction="ltr" fo:border-right="none"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css3t:text-justify="auto" fo:margin-left="0in" style:writing-mode="page"/>
    </style:style>
    <style:style style:name="ce172" style:family="table-cell" style:parent-style-name="Default">
      <style:table-cell-properties fo:background-color="#d0cece" style:text-align-source="value-type" style:repeat-content="false" fo:wrap-option="wrap" style:direction="ltr" style:rotation-angle="0" style:rotation-align="none" style:shrink-to-fit="false" style:vertical-align="middle" loext:vertical-justify="auto">
        <loext:background-complex-color loext:theme-type="light2" loext:color-type="theme">
          <loext:transformation loext:type="lummod" loext:value="9000"/>
        </loext:background-complex-color>
      </style:table-cell-properties>
      <style:paragraph-properties css3t:text-justify="auto" fo:margin-left="0in" style:writing-mode="page"/>
    </style:style>
    <style:style style:name="ce173" style:family="table-cell" style:parent-style-name="Default">
      <style:table-cell-properties fo:background-color="#b4c7e7" style:text-align-source="value-type"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css3t:text-justify="auto" fo:margin-left="0in" style:writing-mode="page"/>
    </style:style>
    <style:style style:name="ce17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175" style:family="table-cell" style:parent-style-name="Default">
      <style:table-cell-properties fo:border-bottom="0.74pt solid #d9d9d9" style:diagonal-bl-tr="none" style:diagonal-tl-br="none" style:text-align-source="value-type" style:repeat-content="false" fo:wrap-option="wrap" fo:border-left="none" style:direction="ltr" fo:border-right="none"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1.76pt solid #000000" fo:background-color="#8faadc"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style>
    <style:style style:name="ce177"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in" style:writing-mode="page"/>
    </style:style>
    <style:style style:name="ce178" style:family="table-cell" style:parent-style-name="Default">
      <style:table-cell-properties fo:border-bottom="0.74pt solid #d9d9d9"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loext:border-bottom-complex-color loext:theme-type="light1" loext:color-type="theme">
          <loext:transformation loext:type="lummod" loext:value="8500"/>
        </loext:border-bottom-complex-color>
      </style:table-cell-properties>
      <style:paragraph-properties css3t:text-justify="auto" fo:margin-left="0in" style:writing-mode="page"/>
    </style:style>
    <style:style style:name="ce179" style:family="table-cell" style:parent-style-name="Default">
      <style:table-cell-properties fo:border-bottom="1.76pt solid #000000" fo:background-color="#8faadc"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style>
    <style:style style:name="ce180" style:family="table-cell" style:parent-style-name="Default">
      <style:table-cell-properties fo:border-bottom="none" fo:background-color="#ffd966"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bottom" loext:vertical-justify="auto">
        <loext:background-complex-color loext:theme-type="accent4" loext:color-type="theme">
          <loext:transformation loext:type="lummod" loext:value="6000"/>
          <loext:transformation loext:type="lumoff" loext:value="3999"/>
        </loext:background-complex-color>
      </style:table-cell-properties>
      <style:paragraph-properties css3t:text-justify="auto" fo:margin-left="0in" style:writing-mode="page"/>
    </style:style>
    <style:style style:name="ce181" style:family="table-cell" style:parent-style-name="Default">
      <style:table-cell-properties fo:border-bottom="none" fo:background-color="#ffd966"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loext:background-complex-color loext:theme-type="accent4" loext:color-type="theme">
          <loext:transformation loext:type="lummod" loext:value="6000"/>
          <loext:transformation loext:type="lumoff" loext:value="3999"/>
        </loext:background-complex-color>
      </style:table-cell-properties>
      <style:paragraph-properties css3t:text-justify="auto" fo:margin-left="0in" style:writing-mode="page"/>
    </style:style>
    <style:style style:name="ce182" style:family="table-cell" style:parent-style-name="Default">
      <style:table-cell-properties fo:border-bottom="1.76pt solid #000000" fo:background-color="#ffd966"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loext:background-complex-color loext:theme-type="accent4" loext:color-type="theme">
          <loext:transformation loext:type="lummod" loext:value="6000"/>
          <loext:transformation loext:type="lumoff" loext:value="3999"/>
        </loext:background-complex-color>
      </style:table-cell-properties>
      <style:paragraph-properties css3t:text-justify="auto" fo:margin-left="0in" style:writing-mode="page"/>
    </style:style>
    <style:style style:name="ce183" style:family="table-cell" style:parent-style-name="Default">
      <style:table-cell-properties fo:border-bottom="none" fo:background-color="#d9d9d9"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style>
    <style:style style:name="ce184" style:family="table-cell" style:parent-style-name="Default">
      <style:table-cell-properties fo:border-bottom="none" fo:background-color="#d9d9d9"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style>
    <style:style style:name="ce185" style:family="table-cell" style:parent-style-name="Default">
      <style:table-cell-properties fo:border-bottom="1.76pt solid #000000" fo:background-color="#d9d9d9"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style>
    <style:style style:name="ce186" style:family="table-cell" style:parent-style-name="Default">
      <style:table-cell-properties fo:border-bottom="none" fo:background-color="#d0cec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loext:background-complex-color loext:theme-type="light2" loext:color-type="theme">
          <loext:transformation loext:type="lummod" loext:value="9000"/>
        </loext:background-complex-color>
      </style:table-cell-properties>
      <style:paragraph-properties css3t:text-justify="auto" fo:margin-left="0in" style:writing-mode="page"/>
    </style:style>
    <style:style style:name="ce187" style:family="table-cell" style:parent-style-name="Default">
      <style:table-cell-properties fo:border-bottom="none" fo:background-color="#b4c7e7"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css3t:text-justify="auto" fo:margin-left="0in" style:writing-mode="page"/>
    </style:style>
    <style:style style:name="ce188"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in" style:writing-mode="page"/>
    </style:style>
    <style:style style:name="ce189"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bottom" loext:vertical-justify="auto"/>
      <style:paragraph-properties css3t:text-justify="auto" fo:margin-left="0in" style:writing-mode="page"/>
    </style:style>
    <style:style style:name="ce190" style:family="table-cell" style:parent-style-name="Default">
      <style:table-cell-properties fo:border-bottom="none"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bottom" loext:vertical-justify="auto">
        <loext:background-complex-color loext:theme-type="light1" loext:color-type="theme"/>
      </style:table-cell-properties>
      <style:paragraph-properties css3t:text-justify="auto" fo:margin-left="0in" style:writing-mode="page"/>
    </style:style>
    <style:style style:name="ce191" style:family="table-cell" style:parent-style-name="Default">
      <style:table-cell-properties fo:border-bottom="1.76pt solid #000000" fo:background-color="#b4c7e7"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bottom" loext:vertical-justify="auto">
        <loext:background-complex-color loext:theme-type="accent1" loext:color-type="theme">
          <loext:transformation loext:type="lummod" loext:value="4000"/>
          <loext:transformation loext:type="lumoff" loext:value="5999"/>
        </loext:background-complex-color>
      </style:table-cell-properties>
      <style:paragraph-properties css3t:text-justify="auto" fo:margin-left="0in" style:writing-mode="page"/>
    </style:style>
    <style:style style:name="ce192" style:family="table-cell" style:parent-style-name="Default">
      <style:table-cell-properties fo:border-bottom="none" fo:background-color="#d0cec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loext:background-complex-color loext:theme-type="light2" loext:color-type="theme">
          <loext:transformation loext:type="lummod" loext:value="9000"/>
        </loext:background-complex-color>
      </style:table-cell-properties>
      <style:paragraph-properties css3t:text-justify="auto" fo:margin-left="0in" style:writing-mode="page"/>
    </style:style>
    <style:style style:name="ce193" style:family="table-cell" style:parent-style-name="Default">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94" style:family="table-cell" style:parent-style-name="Default">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in" style:writing-mode="page"/>
      <style:map style:condition="cell-content()=&quot; &quot;" style:apply-style-name="ConditionalStyle_5f_1" style:base-cell-address="Checklist.N44"/>
    </style:style>
    <style:style style:name="ce195" style:family="table-cell" style:parent-style-name="Default">
      <style:table-cell-properties fo:border-bottom="none" fo:background-color="#b4c7e7"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loext:background-complex-color loext:theme-type="accent1" loext:color-type="theme">
          <loext:transformation loext:type="lummod" loext:value="4000"/>
          <loext:transformation loext:type="lumoff" loext:value="5999"/>
        </loext:background-complex-color>
      </style:table-cell-properties>
      <style:paragraph-properties css3t:text-justify="auto" fo:margin-left="0in" style:writing-mode="page"/>
    </style:style>
    <style:style style:name="ce196" style:family="table-cell" style:parent-style-name="Default">
      <style:table-cell-properties fo:border-bottom="1.76pt solid #000000" fo:background-color="#8faadc"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css3t:text-justify="auto" fo:margin-left="0in" style:writing-mode="page"/>
    </style:style>
    <style:style style:name="ce197"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style>
    <style:style style:name="ce198"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bottom" loext:vertical-justify="auto">
        <loext:background-complex-color loext:theme-type="light1" loext:color-type="theme"/>
      </style:table-cell-properties>
      <style:paragraph-properties css3t:text-justify="auto" fo:margin-left="0in" style:writing-mode="page"/>
    </style:style>
    <style:style style:name="ce199" style:family="table-cell" style:parent-style-name="Default">
      <style:table-cell-properties fo:border-bottom="1.76pt solid #000000" fo:background-color="#b4c7e7"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bottom" loext:vertical-justify="auto">
        <loext:background-complex-color loext:theme-type="accent1" loext:color-type="theme">
          <loext:transformation loext:type="lummod" loext:value="4000"/>
          <loext:transformation loext:type="lumoff" loext:value="5999"/>
        </loext:background-complex-color>
      </style:table-cell-properties>
      <style:paragraph-properties css3t:text-justify="auto" fo:margin-left="0in" style:writing-mode="page"/>
    </style:style>
    <style:style style:name="ce200" style:family="table-cell" style:parent-style-name="Default">
      <style:table-cell-properties fo:background-color="#d0cece" style:text-align-source="value-type" style:repeat-content="false" fo:wrap-option="wrap" style:direction="ltr" style:rotation-angle="0" style:rotation-align="none" style:shrink-to-fit="false" style:vertical-align="bottom" loext:vertical-justify="auto">
        <loext:background-complex-color loext:theme-type="light2" loext:color-type="theme">
          <loext:transformation loext:type="lummod" loext:value="9000"/>
        </loext:background-complex-color>
      </style:table-cell-properties>
      <style:paragraph-properties css3t:text-justify="auto" fo:margin-left="0in" style:writing-mode="page"/>
    </style:style>
    <style:style style:name="ce201" style:family="table-cell" style:parent-style-name="Default">
      <style:table-cell-properties fo:background-color="#b4c7e7" style:text-align-source="value-type" style:repeat-content="false" fo:wrap-option="wrap" style:direction="ltr" style:rotation-angle="0" style:rotation-align="none" style:shrink-to-fit="false" style:vertical-align="bottom" loext:vertical-justify="auto">
        <loext:background-complex-color loext:theme-type="accent1" loext:color-type="theme">
          <loext:transformation loext:type="lummod" loext:value="4000"/>
          <loext:transformation loext:type="lumoff" loext:value="5999"/>
        </loext:background-complex-color>
      </style:table-cell-properties>
      <style:paragraph-properties css3t:text-justify="auto" fo:margin-left="0in" style:writing-mode="page"/>
    </style:style>
    <style:style style:name="ce202" style:family="table-cell" style:parent-style-name="Default">
      <style:table-cell-properties fo:border-bottom="1.76pt solid #000000" fo:background-color="#8faadc"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css3t:text-justify="auto" fo:margin-left="0in" style:writing-mode="page"/>
    </style:style>
    <style:style style:name="ce203"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bottom" loext:vertical-justify="auto"/>
      <style:paragraph-properties css3t:text-justify="auto" fo:margin-left="0in" style:writing-mode="page"/>
    </style:style>
    <style:style style:name="ce204"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bottom" loext:vertical-justify="auto">
        <loext:background-complex-color loext:theme-type="light1" loext:color-type="theme"/>
      </style:table-cell-properties>
      <style:paragraph-properties css3t:text-justify="auto" fo:margin-left="0in" style:writing-mode="page"/>
    </style:style>
    <style:style style:name="ce205" style:family="table-cell" style:parent-style-name="Default">
      <style:table-cell-properties fo:border-bottom="1.76pt solid #000000" fo:background-color="#b4c7e7"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bottom" loext:vertical-justify="auto">
        <loext:background-complex-color loext:theme-type="accent1" loext:color-type="theme">
          <loext:transformation loext:type="lummod" loext:value="4000"/>
          <loext:transformation loext:type="lumoff" loext:value="5999"/>
        </loext:background-complex-color>
      </style:table-cell-properties>
      <style:paragraph-properties css3t:text-justify="auto" fo:margin-left="0in" style:writing-mode="page"/>
    </style:style>
    <style:style style:name="ce206" style:family="table-cell" style:parent-style-name="Default">
      <style:table-cell-properties fo:border-bottom="none" fo:background-color="#d0cec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loext:background-complex-color loext:theme-type="light2" loext:color-type="theme">
          <loext:transformation loext:type="lummod" loext:value="9000"/>
        </loext:background-complex-color>
      </style:table-cell-properties>
      <style:paragraph-properties css3t:text-justify="auto" fo:margin-left="0in" style:writing-mode="page"/>
    </style:style>
    <style:style style:name="ce207"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style:paragraph-properties css3t:text-justify="auto" fo:margin-left="0in" style:writing-mode="page"/>
    </style:style>
    <style:style style:name="ce208" style:family="table-cell" style:parent-style-name="Default">
      <style:table-cell-properties fo:border-bottom="none" fo:background-color="#b4c7e7"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loext:background-complex-color loext:theme-type="accent1" loext:color-type="theme">
          <loext:transformation loext:type="lummod" loext:value="4000"/>
          <loext:transformation loext:type="lumoff" loext:value="5999"/>
        </loext:background-complex-color>
      </style:table-cell-properties>
      <style:paragraph-properties css3t:text-justify="auto" fo:margin-left="0in" style:writing-mode="page"/>
    </style:style>
    <style:style style:name="ce209" style:family="table-cell" style:parent-style-name="Default">
      <style:table-cell-properties fo:border-bottom="1.76pt solid #000000" fo:background-color="#8faadc"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css3t:text-justify="auto" fo:margin-left="0in" style:writing-mode="page"/>
    </style:style>
    <style:style style:name="ce210" style:family="table-cell" style:parent-style-name="Default">
      <style:table-cell-properties fo:border-bottom="none" fo:background-color="#b4c7e7"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style>
    <style:style style:name="ce211"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212"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c9d1d9"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215"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21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217" style:family="table-cell" style:parent-style-name="Default">
      <style:table-cell-properties fo:border-bottom="none" fo:background-color="#b4c7e7"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style>
    <style:style style:name="ce218"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0"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221"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22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style>
    <style:style style:name="ce223" style:family="table-cell" style:parent-style-name="Default" style:data-style-name="N8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24" style:family="table-cell" style:parent-style-name="Default">
      <style:table-cell-properties fo:border-bottom="none" style:diagonal-bl-tr="none" style:diagonal-tl-br="none" fo:border-left="0.74pt solid #000000" fo:border-right="none" style:rotation-align="none" fo:border-top="0.74pt solid #000000"/>
    </style:style>
    <style:style style:name="ce225" style:family="table-cell" style:parent-style-name="Default">
      <style:table-cell-properties fo:border-bottom="none" style:diagonal-bl-tr="none" style:diagonal-tl-br="none" fo:border-left="0.74pt solid #000000" fo:border-right="none" style:rotation-align="none" fo:border-top="none"/>
    </style:style>
    <style:style style:name="ce226" style:family="table-cell" style:parent-style-name="Default">
      <style:table-cell-properties fo:border-bottom="none" style:diagonal-bl-tr="none" style:diagonal-tl-br="none" fo:border-left="none" fo:border-right="none" style:rotation-align="none" fo:border-top="0.74pt solid #000000"/>
    </style:style>
    <style:style style:name="ce227" style:family="table-cell" style:parent-style-name="Default">
      <style:table-cell-properties fo:border-bottom="none" style:diagonal-bl-tr="none" style:diagonal-tl-br="none" fo:border-left="none" fo:border-right="0.74pt solid #000000" style:rotation-align="none" fo:border-top="0.74pt solid #000000"/>
    </style:style>
    <style:style style:name="ce228" style:family="table-cell" style:parent-style-name="Default">
      <style:table-cell-properties fo:border-bottom="none" style:diagonal-bl-tr="none" style:diagonal-tl-br="none" fo:border-left="none" fo:border-right="0.74pt solid #000000" style:rotation-align="none" fo:border-top="none"/>
    </style:style>
    <style:style style:name="ce229" style:family="table-cell" style:parent-style-name="Default">
      <style:table-cell-properties fo:border-bottom="0.74pt solid #000000" style:diagonal-bl-tr="none" style:diagonal-tl-br="none" fo:border-left="none" fo:border-right="0.74pt solid #000000" style:rotation-align="none" fo:border-top="none"/>
    </style:style>
    <style:style style:name="ce230" style:family="table-cell" style:parent-style-name="Default">
      <style:table-cell-properties fo:border-bottom="0.74pt solid #000000" style:diagonal-bl-tr="none" style:diagonal-tl-br="none" fo:border-left="0.74pt solid #000000" fo:border-right="none" style:rotation-align="none" fo:border-top="none"/>
    </style:style>
    <style:style style:name="ce231" style:family="table-cell" style:parent-style-name="Default">
      <style:table-cell-properties fo:border-bottom="0.74pt solid #000000" style:diagonal-bl-tr="none" style:diagonal-tl-br="none" fo:border-left="none" fo:border-right="none" style:rotation-align="none" fo:border-top="none"/>
    </style:style>
    <style:style style:name="ce232" style:family="table-cell" style:parent-style-name="Default">
      <style:table-cell-properties fo:background-color="#b4c7e7" style:diagonal-bl-tr="none" style:diagonal-tl-br="none" fo:border="0.74pt solid #000000" style:rotation-align="none">
        <loext:background-complex-color loext:theme-type="accent1" loext:color-type="theme">
          <loext:transformation loext:type="lummod" loext:value="4000"/>
          <loext:transformation loext:type="lumoff" loext:value="5999"/>
        </loext:background-complex-color>
      </style:table-cell-properties>
    </style:style>
    <style:style style:name="ce233" style:family="table-cell" style:parent-style-name="Default">
      <style:table-cell-properties style:diagonal-bl-tr="none" style:diagonal-tl-br="none" fo:border="0.74pt solid #000000" style:rotation-align="none"/>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hidden_lists.$D$2:.$D$5])" table:allow-empty-cell="true" table:display-list="unsorted" table:base-cell-address="'Change Log'.F35">
          <table:help-message table:display="true"/>
          <table:error-message table:message-type="stop" table:display="true"/>
        </table:content-validation>
        <table:content-validation table:name="val2" table:condition="of:cell-content-is-in-list(&quot;altimeter type?&quot;;&quot;altimeter&quot;;&quot;altimeter-323&quot;)" table:allow-empty-cell="true" table:display-list="unsorted" table:base-cell-address="'Change Log'.H101">
          <table:help-message table:display="true"/>
          <table:error-message table:message-type="stop" table:display="true"/>
        </table:content-validation>
        <table:content-validation table:name="val3" table:condition="of:cell-content-is-in-list(&quot;field&quot;;&quot;lab&quot;)" table:allow-empty-cell="true" table:display-list="unsorted" table:base-cell-address="'Change Log'.I16">
          <table:help-message table:display="true"/>
          <table:error-message table:message-type="stop" table:display="true"/>
        </table:content-validation>
        <table:content-validation table:name="val4" table:condition="of:cell-content-is-in-list(&quot;G2&quot;;&quot;G3&quot;)" table:allow-empty-cell="true" table:display-list="unsorted" table:base-cell-address="'Change Log'.I17">
          <table:help-message table:display="true"/>
          <table:error-message table:message-type="stop" table:display="true"/>
        </table:content-validation>
        <table:content-validation table:name="val5" table:condition="of:cell-content-is-in-list([$hidden_lists.$B$2:.$B$5])" table:allow-empty-cell="true" table:display-list="unsorted" table:base-cell-address="'Change Log'.I18">
          <table:help-message table:display="true"/>
          <table:error-message table:message-type="stop" table:display="true"/>
        </table:content-validation>
        <table:content-validation table:name="val6" table:condition="of:cell-content-is-in-list([$hidden_lists.$C$2:.$C$7])" table:allow-empty-cell="true" table:display-list="unsorted" table:base-cell-address="'Change Log'.I19">
          <table:help-message table:display="true"/>
          <table:error-message table:message-type="stop" table:display="true"/>
        </table:content-validation>
        <table:content-validation table:name="val7" table:condition="of:cell-content-is-in-list(&quot;yes&quot;;&quot;no&quot;)" table:allow-empty-cell="true" table:display-list="unsorted" table:base-cell-address="'Change Log'.I20">
          <table:help-message table:display="true"/>
          <table:error-message table:message-type="stop" table:display="true"/>
        </table:content-validation>
        <table:content-validation table:name="val8" table:condition="of:cell-content-is-in-list(&quot;in-coming&quot;;&quot;out-going&quot;;&quot;staying-in-lab&quot;)" table:allow-empty-cell="true" table:display-list="unsorted" table:base-cell-address="'Change Log'.I22">
          <table:help-message table:display="true"/>
          <table:error-message table:message-type="stop" table:display="true"/>
        </table:content-validation>
      </table:content-validations>
      <table:table table:name="Checklist"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72"/>
        <table:table-column table:style-name="co7" table:default-cell-style-name="ce99"/>
        <table:table-column table:style-name="co8" table:default-cell-style-name="ce1"/>
        <table:table-column table:style-name="co1" table:default-cell-style-name="ce1"/>
        <table:table-column table:style-name="co9" table:default-cell-style-name="ce1"/>
        <table:table-column table:style-name="co1" table:number-columns-repeated="3" table:default-cell-style-name="ce1"/>
        <table:table-column table:style-name="co10" table:visibility="collapse" table:number-columns-repeated="4" table:default-cell-style-name="ce1"/>
        <table:table-column table:style-name="co1" table:number-columns-repeated="2"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3" table:default-cell-style-name="ce1"/>
        <table:table-column table:style-name="co1" table:number-columns-repeated="16360" table:default-cell-style-name="ce1"/>
        <table:table-row table:style-name="ro1">
          <table:table-cell table:number-columns-repeated="2"/>
          <table:table-cell table:style-name="ce2" office:value-type="string" calcext:value-type="string">
            <text:p>SOP-Link in grey</text:p>
          </table:table-cell>
          <table:table-cell table:style-name="ce21" office:value-type="string" calcext:value-type="string">
            <text:p>task</text:p>
          </table:table-cell>
          <table:table-cell table:style-name="ce21" office:value-type="string" calcext:value-type="string">
            <text:p>command</text:p>
          </table:table-cell>
          <table:table-cell table:style-name="ce21" office:value-type="string" calcext:value-type="string">
            <text:p>task complete</text:p>
          </table:table-cell>
          <table:table-cell table:style-name="ce21" office:value-type="string" calcext:value-type="string">
            <text:p>section complete</text:p>
          </table:table-cell>
          <table:table-cell table:style-name="ce21" office:value-type="string" calcext:value-type="string">
            <text:p>User Input / Value</text:p>
          </table:table-cell>
          <table:table-cell table:style-name="ce148" office:value-type="string" calcext:value-type="string" table:number-columns-spanned="5" table:number-rows-spanned="1">
            <text:p>Comments</text:p>
          </table:table-cell>
          <table:covered-table-cell table:number-columns-repeated="3" table:style-name="ce21"/>
          <table:covered-table-cell table:style-name="ce148"/>
          <table:table-cell table:style-name="ce189" office:value-type="string" calcext:value-type="string">
            <text:p>Extra</text:p>
          </table:table-cell>
          <table:table-cell table:number-columns-repeated="2" table:style-name="ce197" office:value-type="string" calcext:value-type="string">
            <text:p>Extra</text:p>
          </table:table-cell>
          <table:table-cell table:style-name="ce203" office:value-type="string" calcext:value-type="string">
            <text:p>Extra</text:p>
          </table:table-cell>
          <table:table-cell table:number-columns-repeated="16367"/>
        </table:table-row>
        <table:table-row table:style-name="ro2">
          <table:table-cell table:number-columns-repeated="16384"/>
        </table:table-row>
        <table:table-row table:style-name="ro2">
          <table:table-cell table:number-columns-repeated="3"/>
          <table:table-cell table:style-name="ce22" office:value-type="string" calcext:value-type="string" table:number-columns-spanned="8" table:number-rows-spanned="2">
            <text:p>Slocum Functional Checkout Procedure</text:p>
          </table:table-cell>
          <table:covered-table-cell table:number-columns-repeated="7" table:style-name="ce51"/>
          <table:table-cell table:number-columns-repeated="16373"/>
        </table:table-row>
        <table:table-row table:style-name="ro2">
          <table:table-cell table:number-columns-repeated="3"/>
          <table:covered-table-cell table:number-columns-repeated="8" table:style-name="ce23"/>
          <table:table-cell table:number-columns-repeated="16373"/>
        </table:table-row>
        <table:table-row table:style-name="ro2">
          <table:table-cell table:number-columns-repeated="16384"/>
        </table:table-row>
        <table:table-row table:style-name="ro3">
          <table:table-cell table:number-columns-repeated="2"/>
          <table:table-cell table:style-name="ce3" table:number-columns-spanned="1" table:number-rows-spanned="8"/>
          <table:table-cell table:style-name="ce24" office:value-type="string" calcext:value-type="string">
            <text:p>Glider Name:</text:p>
          </table:table-cell>
          <table:table-cell table:style-name="ce52"/>
          <table:table-cell table:style-name="ce73"/>
          <table:table-cell table:style-name="ce100"/>
          <table:table-cell table:style-name="ce128" table:number-columns-repeated="5"/>
          <table:table-cell table:style-name="ce183"/>
          <table:table-cell table:number-columns-repeated="16371"/>
        </table:table-row>
        <table:table-row table:style-name="ro3">
          <table:table-cell table:number-columns-repeated="2"/>
          <table:covered-table-cell table:style-name="ce4"/>
          <table:table-cell table:style-name="ce25" office:value-type="string" calcext:value-type="string">
            <text:p>Current Engineer:</text:p>
          </table:table-cell>
          <table:table-cell table:style-name="ce53"/>
          <table:table-cell table:style-name="ce74"/>
          <table:table-cell table:style-name="ce101"/>
          <table:table-cell table:style-name="ce29" table:number-columns-repeated="5"/>
          <table:table-cell table:style-name="ce184"/>
          <table:table-cell table:number-columns-repeated="16371"/>
        </table:table-row>
        <table:table-row table:style-name="ro3">
          <table:table-cell table:number-columns-repeated="2"/>
          <table:covered-table-cell table:style-name="ce4"/>
          <table:table-cell table:style-name="ce26" office:value-type="string" calcext:value-type="string">
            <text:p>Date Started: </text:p>
          </table:table-cell>
          <table:table-cell table:style-name="ce54"/>
          <table:table-cell table:style-name="ce74"/>
          <table:table-cell table:style-name="ce101"/>
          <table:table-cell table:style-name="ce29" table:number-columns-repeated="5"/>
          <table:table-cell table:style-name="ce184"/>
          <table:table-cell table:number-columns-repeated="16371"/>
        </table:table-row>
        <table:table-row table:style-name="ro2">
          <table:table-cell table:number-columns-repeated="2"/>
          <table:covered-table-cell table:style-name="ce4"/>
          <table:table-cell table:style-name="ce6"/>
          <table:table-cell table:style-name="ce29"/>
          <table:table-cell table:style-name="ce74"/>
          <table:table-cell table:style-name="ce101"/>
          <table:table-cell table:style-name="ce29" table:number-columns-repeated="5"/>
          <table:table-cell table:style-name="ce184"/>
          <table:table-cell table:number-columns-repeated="16371"/>
        </table:table-row>
        <table:table-row table:style-name="ro2">
          <table:table-cell table:number-columns-repeated="2"/>
          <table:covered-table-cell table:style-name="ce4"/>
          <table:table-cell table:style-name="ce7"/>
          <table:table-cell table:style-name="ce29"/>
          <table:table-cell table:style-name="ce74"/>
          <table:table-cell table:style-name="ce101"/>
          <table:table-cell table:style-name="ce29" table:number-columns-repeated="5"/>
          <table:table-cell table:style-name="ce184"/>
          <table:table-cell table:number-columns-repeated="16371"/>
        </table:table-row>
        <table:table-row table:style-name="ro2">
          <table:table-cell table:number-columns-repeated="2"/>
          <table:covered-table-cell table:style-name="ce4"/>
          <table:table-cell table:style-name="ce7"/>
          <table:table-cell table:style-name="ce29"/>
          <table:table-cell table:style-name="ce74"/>
          <table:table-cell table:style-name="ce101"/>
          <table:table-cell table:style-name="ce29" table:number-columns-repeated="5"/>
          <table:table-cell table:style-name="ce184"/>
          <table:table-cell table:number-columns-repeated="16371"/>
        </table:table-row>
        <table:table-row table:style-name="ro2">
          <table:table-cell table:number-columns-repeated="2"/>
          <table:covered-table-cell table:style-name="ce4"/>
          <table:table-cell table:style-name="ce7"/>
          <table:table-cell table:style-name="ce29"/>
          <table:table-cell table:style-name="ce74"/>
          <table:table-cell table:style-name="ce101"/>
          <table:table-cell table:style-name="ce29" table:number-columns-repeated="5"/>
          <table:table-cell table:style-name="ce184"/>
          <table:table-cell table:number-columns-repeated="16371"/>
        </table:table-row>
        <table:table-row table:style-name="ro2">
          <table:table-cell table:number-columns-repeated="2"/>
          <table:covered-table-cell table:style-name="ce5"/>
          <table:table-cell table:style-name="ce8"/>
          <table:table-cell table:style-name="ce33"/>
          <table:table-cell table:style-name="ce75"/>
          <table:table-cell table:style-name="ce102"/>
          <table:table-cell table:style-name="ce33" table:number-columns-repeated="5"/>
          <table:table-cell table:style-name="ce185"/>
          <table:table-cell table:number-columns-repeated="16371"/>
        </table:table-row>
        <table:table-row table:style-name="ro3">
          <table:table-cell table:number-columns-repeated="3"/>
          <table:table-cell office:value-type="string" calcext:value-type="string">
            <text:p>Step</text:p>
          </table:table-cell>
          <table:table-cell office:value-type="string" calcext:value-type="string">
            <text:p>Need to complete?</text:p>
          </table:table-cell>
          <table:table-cell table:number-columns-repeated="16379"/>
        </table:table-row>
        <table:table-row table:style-name="ro4">
          <table:table-cell table:number-columns-repeated="2"/>
          <table:table-cell table:style-name="ce6"/>
          <table:table-cell table:style-name="ce27" office:value-type="string" calcext:value-type="string">
            <text:p>Indoor</text:p>
          </table:table-cell>
          <table:table-cell table:style-name="ce55" office:value-type="string" calcext:value-type="string">
            <text:p>y</text:p>
          </table:table-cell>
          <table:table-cell table:style-name="ce76"/>
          <table:table-cell table:style-name="ce103" office:value-type="string" calcext:value-type="string" table:number-columns-spanned="4" table:number-rows-spanned="1">
            <text:p>Please Fill this before completing sheet</text:p>
          </table:table-cell>
          <table:covered-table-cell table:number-columns-repeated="3" table:style-name="ce103"/>
          <table:table-cell table:style-name="ce180"/>
          <table:table-cell table:style-name="ce128"/>
          <table:table-cell table:style-name="ce183"/>
          <table:table-cell table:number-columns-repeated="16371"/>
        </table:table-row>
        <table:table-row table:style-name="ro3">
          <table:table-cell table:number-columns-repeated="2"/>
          <table:table-cell table:style-name="ce7"/>
          <table:table-cell table:style-name="ce28" office:value-type="string" calcext:value-type="string">
            <text:p>Outdoor</text:p>
          </table:table-cell>
          <table:table-cell table:style-name="ce56" office:value-type="string" calcext:value-type="string">
            <text:p>n</text:p>
          </table:table-cell>
          <table:table-cell table:style-name="ce77"/>
          <table:table-cell table:style-name="ce104" office:value-type="string" calcext:value-type="string" table:number-columns-spanned="2" table:number-rows-spanned="1">
            <text:p>Are you in the field or lab? --&gt;</text:p>
          </table:table-cell>
          <table:covered-table-cell table:style-name="ce129"/>
          <table:table-cell table:style-name="ce149" table:content-validation-name="val3" office:value-type="string" calcext:value-type="string" table:number-columns-spanned="2" table:number-rows-spanned="1">
            <text:p>lab</text:p>
          </table:table-cell>
          <table:covered-table-cell table:style-name="ce149" table:content-validation-name="val3"/>
          <table:table-cell table:style-name="ce181"/>
          <table:table-cell table:style-name="ce29"/>
          <table:table-cell table:style-name="ce184"/>
          <table:table-cell/>
          <table:table-cell table:style-name="ce72"/>
          <table:table-cell table:number-columns-repeated="16369"/>
        </table:table-row>
        <table:table-row table:style-name="ro3">
          <table:table-cell table:number-columns-repeated="2"/>
          <table:table-cell table:style-name="ce7"/>
          <table:table-cell table:style-name="ce29" table:number-columns-repeated="2"/>
          <table:table-cell table:style-name="ce77"/>
          <table:table-cell table:style-name="ce105" office:value-type="string" calcext:value-type="string" table:number-columns-spanned="2" table:number-rows-spanned="1">
            <text:p>Is this a G2 or G3 glider? --&gt; </text:p>
          </table:table-cell>
          <table:covered-table-cell table:style-name="ce130"/>
          <table:table-cell table:style-name="ce150" table:content-validation-name="val4" office:value-type="string" calcext:value-type="string" table:number-columns-spanned="2" table:number-rows-spanned="1">
            <text:p>G3</text:p>
          </table:table-cell>
          <table:covered-table-cell table:style-name="ce150" table:content-validation-name="val4"/>
          <table:table-cell table:style-name="ce181"/>
          <table:table-cell table:style-name="ce29"/>
          <table:table-cell table:style-name="ce184"/>
          <table:table-cell/>
          <table:table-cell table:style-name="ce72"/>
          <table:table-cell table:number-columns-repeated="16369"/>
        </table:table-row>
        <table:table-row table:style-name="ro3">
          <table:table-cell table:number-columns-repeated="2"/>
          <table:table-cell table:style-name="ce7"/>
          <table:table-cell table:style-name="ce29" table:number-columns-repeated="2"/>
          <table:table-cell table:style-name="ce77"/>
          <table:table-cell table:style-name="ce105" office:value-type="string" calcext:value-type="string" table:number-columns-spanned="2" table:number-rows-spanned="1">
            <text:p>What pump is on the glider? --&gt;</text:p>
          </table:table-cell>
          <table:covered-table-cell table:style-name="ce130"/>
          <table:table-cell table:style-name="ce150" table:content-validation-name="val5" office:value-type="float" office:value="1000" calcext:value-type="float" table:number-columns-spanned="2" table:number-rows-spanned="1">
            <text:p>1000</text:p>
          </table:table-cell>
          <table:covered-table-cell table:style-name="ce150" table:content-validation-name="val5"/>
          <table:table-cell table:style-name="ce181"/>
          <table:table-cell table:style-name="ce29"/>
          <table:table-cell table:style-name="ce184"/>
          <table:table-cell/>
          <table:table-cell table:style-name="ce72"/>
          <table:table-cell table:number-columns-repeated="16369"/>
        </table:table-row>
        <table:table-row table:style-name="ro3">
          <table:table-cell table:number-columns-repeated="2"/>
          <table:table-cell table:style-name="ce7"/>
          <table:table-cell table:style-name="ce29" table:number-columns-repeated="2"/>
          <table:table-cell table:style-name="ce77"/>
          <table:table-cell table:style-name="ce105" office:value-type="string" calcext:value-type="string" table:number-columns-spanned="2" table:number-rows-spanned="1">
            <text:p>What battery type is on the glider? --&gt;</text:p>
          </table:table-cell>
          <table:covered-table-cell table:style-name="ce130"/>
          <table:table-cell table:style-name="ce150" table:content-validation-name="val6" office:value-type="string" calcext:value-type="string" table:number-columns-spanned="2" table:number-rows-spanned="1">
            <text:p>lith-ion</text:p>
          </table:table-cell>
          <table:covered-table-cell table:style-name="ce150" table:content-validation-name="val6"/>
          <table:table-cell table:style-name="ce181"/>
          <table:table-cell table:style-name="ce29"/>
          <table:table-cell table:style-name="ce184"/>
          <table:table-cell/>
          <table:table-cell table:style-name="ce72"/>
          <table:table-cell table:number-columns-repeated="16369"/>
        </table:table-row>
        <table:table-row table:style-name="ro3">
          <table:table-cell table:number-columns-repeated="2"/>
          <table:table-cell table:style-name="ce7"/>
          <table:table-cell table:style-name="ce29" table:number-columns-repeated="2"/>
          <table:table-cell table:style-name="ce77"/>
          <table:table-cell table:style-name="ce105" office:value-type="string" calcext:value-type="string" table:number-columns-spanned="2" table:number-rows-spanned="1">
            <text:p>Is a thruster installed? --&gt; </text:p>
          </table:table-cell>
          <table:covered-table-cell table:style-name="ce130"/>
          <table:table-cell table:style-name="ce150" table:content-validation-name="val7" office:value-type="string" calcext:value-type="string" table:number-columns-spanned="2" table:number-rows-spanned="1">
            <text:p>yes</text:p>
          </table:table-cell>
          <table:covered-table-cell table:style-name="ce150" table:content-validation-name="val7"/>
          <table:table-cell table:style-name="ce181"/>
          <table:table-cell table:style-name="ce29"/>
          <table:table-cell table:style-name="ce184"/>
          <table:table-cell/>
          <table:table-cell table:style-name="ce72"/>
          <table:table-cell table:number-columns-repeated="16369"/>
        </table:table-row>
        <table:table-row table:style-name="ro4">
          <table:table-cell table:number-columns-repeated="2"/>
          <table:table-cell table:style-name="ce7"/>
          <table:table-cell table:style-name="ce30" office:value-type="string" calcext:value-type="string" table:number-columns-spanned="2" table:number-rows-spanned="1">
            <text:p>Equipment required</text:p>
          </table:table-cell>
          <table:covered-table-cell table:style-name="ce57"/>
          <table:table-cell table:style-name="ce78"/>
          <table:table-cell table:style-name="ce105" office:value-type="string" calcext:value-type="string" table:number-columns-spanned="2" table:number-rows-spanned="1">
            <text:p>is a recovery nose installed? --&gt; </text:p>
          </table:table-cell>
          <table:covered-table-cell table:style-name="ce130"/>
          <table:table-cell table:style-name="ce150" table:content-validation-name="val7" office:value-type="string" calcext:value-type="string" table:number-columns-spanned="2" table:number-rows-spanned="1">
            <text:p>yes</text:p>
          </table:table-cell>
          <table:covered-table-cell table:style-name="ce150" table:content-validation-name="val7"/>
          <table:table-cell table:style-name="ce181"/>
          <table:table-cell table:style-name="ce29"/>
          <table:table-cell table:style-name="ce184"/>
          <table:table-cell/>
          <table:table-cell table:style-name="ce72"/>
          <table:table-cell table:number-columns-repeated="16369"/>
        </table:table-row>
        <table:table-row table:style-name="ro5">
          <table:table-cell table:number-columns-repeated="2"/>
          <table:table-cell table:style-name="ce7"/>
          <table:table-cell table:style-name="ce31" office:value-type="string" calcext:value-type="string" table:number-columns-spanned="2" table:number-rows-spanned="1">
            <text:p>Dockserver connections (iridium or local)</text:p>
          </table:table-cell>
          <table:covered-table-cell table:style-name="ce58"/>
          <table:table-cell table:style-name="ce78"/>
          <table:table-cell table:style-name="ce106" office:value-type="string" calcext:value-type="string" table:number-columns-spanned="2" table:number-rows-spanned="1">
            <text:p>is this in-coming or out-going refub or staying in lab? --&gt; </text:p>
          </table:table-cell>
          <table:covered-table-cell table:style-name="ce131"/>
          <table:table-cell table:style-name="ce151" table:content-validation-name="val8" office:value-type="string" calcext:value-type="string" table:number-columns-spanned="2" table:number-rows-spanned="1">
            <text:p>staying-in-lab</text:p>
          </table:table-cell>
          <table:covered-table-cell table:style-name="ce151" table:content-validation-name="val8"/>
          <table:table-cell table:style-name="ce181"/>
          <table:table-cell table:style-name="ce29"/>
          <table:table-cell table:style-name="ce184"/>
          <table:table-cell/>
          <table:table-cell table:style-name="ce72"/>
          <table:table-cell table:number-columns-repeated="16369"/>
        </table:table-row>
        <table:table-row table:style-name="ro3">
          <table:table-cell table:number-columns-repeated="2"/>
          <table:table-cell table:style-name="ce7"/>
          <table:table-cell table:style-name="ce31" office:value-type="string" calcext:value-type="string" table:number-columns-spanned="2" table:number-rows-spanned="1">
            <text:p>Green shorting plug</text:p>
          </table:table-cell>
          <table:covered-table-cell table:style-name="ce58"/>
          <table:table-cell table:style-name="ce79" table:number-columns-repeated="2"/>
          <table:table-cell table:style-name="ce132"/>
          <table:table-cell table:style-name="ce152" table:number-columns-repeated="2"/>
          <table:table-cell table:style-name="ce182"/>
          <table:table-cell table:style-name="ce29"/>
          <table:table-cell table:style-name="ce184"/>
          <table:table-cell table:number-columns-repeated="16371"/>
        </table:table-row>
        <table:table-row table:style-name="ro3">
          <table:table-cell table:number-columns-repeated="2"/>
          <table:table-cell table:style-name="ce7"/>
          <table:table-cell table:style-name="ce31" office:value-type="string" calcext:value-type="string" table:number-columns-spanned="2" table:number-rows-spanned="1">
            <text:p>RF chirp</text:p>
          </table:table-cell>
          <table:covered-table-cell table:style-name="ce58"/>
          <table:table-cell table:style-name="ce74" table:number-columns-repeated="2"/>
          <table:table-cell table:style-name="ce133"/>
          <table:table-cell table:style-name="ce29" table:number-columns-repeated="4"/>
          <table:table-cell table:style-name="ce184"/>
          <table:table-cell table:number-columns-repeated="16371"/>
        </table:table-row>
        <table:table-row table:style-name="ro6">
          <table:table-cell table:number-columns-repeated="2"/>
          <table:table-cell table:style-name="ce7"/>
          <table:table-cell table:style-name="ce31" office:value-type="string" calcext:value-type="string" table:number-columns-spanned="2" table:number-rows-spanned="1">
            <text:p>some hand tools for removing nose cone and cowling</text:p>
          </table:table-cell>
          <table:covered-table-cell table:style-name="ce58"/>
          <table:table-cell table:style-name="ce74" table:number-columns-repeated="2"/>
          <table:table-cell table:style-name="ce133"/>
          <table:table-cell table:style-name="ce29" table:number-columns-repeated="4"/>
          <table:table-cell table:style-name="ce184"/>
          <table:table-cell table:number-columns-repeated="16371"/>
        </table:table-row>
        <table:table-row table:style-name="ro3">
          <table:table-cell table:number-columns-repeated="2"/>
          <table:table-cell table:style-name="ce7"/>
          <table:table-cell table:style-name="ce32" office:value-type="string" calcext:value-type="string" table:number-columns-spanned="2" table:number-rows-spanned="1">
            <text:p>Multimeter</text:p>
          </table:table-cell>
          <table:covered-table-cell table:style-name="ce59"/>
          <table:table-cell table:style-name="ce74" table:number-columns-repeated="2"/>
          <table:table-cell table:style-name="ce133"/>
          <table:table-cell table:style-name="ce29" table:number-columns-repeated="4"/>
          <table:table-cell table:style-name="ce184"/>
          <table:table-cell table:number-columns-repeated="16371"/>
        </table:table-row>
        <table:table-row table:style-name="ro2">
          <table:table-cell table:number-columns-repeated="2"/>
          <table:table-cell table:style-name="ce8"/>
          <table:table-cell table:style-name="ce33" table:number-columns-repeated="2"/>
          <table:table-cell table:style-name="ce75" table:number-columns-repeated="2"/>
          <table:table-cell table:style-name="ce134"/>
          <table:table-cell table:style-name="ce33" table:number-columns-repeated="4"/>
          <table:table-cell table:style-name="ce185"/>
          <table:table-cell table:number-columns-repeated="16371"/>
        </table:table-row>
        <table:table-row table:style-name="ro2" table:number-rows-repeated="2">
          <table:table-cell table:number-columns-repeated="16384"/>
        </table:table-row>
        <table:table-row table:style-name="ro7">
          <table:table-cell table:number-columns-repeated="16384"/>
        </table:table-row>
        <table:table-row table:style-name="ro8">
          <table:table-cell table:number-columns-repeated="16384"/>
        </table:table-row>
        <table:table-row table:style-name="ro1">
          <table:table-cell table:number-columns-repeated="2"/>
          <table:table-cell table:style-name="ce9" office:value-type="string" calcext:value-type="string">
            <text:p>SOP-Link in grey</text:p>
          </table:table-cell>
          <table:table-cell table:style-name="ce34" office:value-type="string" calcext:value-type="string">
            <text:p>Section name</text:p>
          </table:table-cell>
          <table:table-cell table:style-name="ce34" office:value-type="string" calcext:value-type="string">
            <text:p>command</text:p>
          </table:table-cell>
          <table:table-cell table:style-name="ce34" office:value-type="string" calcext:value-type="string">
            <text:p>task complete</text:p>
          </table:table-cell>
          <table:table-cell table:style-name="ce34" office:value-type="string" calcext:value-type="string">
            <text:p>section complete</text:p>
          </table:table-cell>
          <table:table-cell table:style-name="ce34" office:value-type="string" calcext:value-type="string">
            <text:p>User Input / Value</text:p>
          </table:table-cell>
          <table:table-cell table:style-name="ce153" office:value-type="string" calcext:value-type="string" table:number-columns-spanned="5" table:number-rows-spanned="1">
            <text:p>Comments</text:p>
          </table:table-cell>
          <table:covered-table-cell table:number-columns-repeated="3" table:style-name="ce168"/>
          <table:covered-table-cell table:style-name="ce153"/>
          <table:table-cell table:style-name="ce190" office:value-type="string" calcext:value-type="string">
            <text:p>Extra</text:p>
          </table:table-cell>
          <table:table-cell table:number-columns-repeated="2" table:style-name="ce198" office:value-type="string" calcext:value-type="string">
            <text:p>Extra</text:p>
          </table:table-cell>
          <table:table-cell table:style-name="ce204" office:value-type="string" calcext:value-type="string">
            <text:p>Extra</text:p>
          </table:table-cell>
          <table:table-cell table:number-columns-repeated="16367"/>
        </table:table-row>
        <table:table-row table:style-name="ro9">
          <table:table-cell table:number-columns-repeated="2"/>
          <table:table-cell table:style-name="ce10" table:formula="of:=[.D15]" office:value-type="string" office:string-value="Indoor" calcext:value-type="string" table:number-columns-spanned="3" table:number-rows-spanned="1">
            <text:p>Indoor</text:p>
          </table:table-cell>
          <table:covered-table-cell table:number-columns-repeated="2" table:style-name="ce35"/>
          <table:table-cell table:style-name="ce80" office:value-type="string" calcext:value-type="string">
            <text:p>Task Complete</text:p>
          </table:table-cell>
          <table:table-cell table:style-name="ce107" table:formula="of:=IF([.E15]=&quot;y&quot;;IF(AND([.G34]=&quot;complete&quot;;[.G51]=&quot;complete&quot;;[.G93]=&quot;complete&quot;;[.G87]=&quot;complete&quot;); &quot;Section Complete&quot;; &quot;Section Incomplete&quot;); &quot;Section Complete&quot;)" office:value-type="string" office:string-value="Section Incomplete" calcext:value-type="string">
            <text:p>Section Incomplete</text:p>
          </table:table-cell>
          <table:table-cell table:style-name="ce80" office:value-type="string" calcext:value-type="string">
            <text:p>User Input / Value</text:p>
          </table:table-cell>
          <table:table-cell table:style-name="ce154" office:value-type="string" calcext:value-type="string" table:number-columns-spanned="5" table:number-rows-spanned="1">
            <text:p>Comments</text:p>
          </table:table-cell>
          <table:covered-table-cell table:number-columns-repeated="3" table:style-name="ce80"/>
          <table:covered-table-cell table:style-name="ce154"/>
          <table:table-cell table:style-name="ce191"/>
          <table:table-cell table:style-name="ce199" table:number-columns-repeated="2"/>
          <table:table-cell table:style-name="ce205"/>
          <table:table-cell table:number-columns-repeated="2"/>
          <table:table-cell table:style-name="ce210" office:value-type="string" calcext:value-type="string" table:number-columns-spanned="2" table:number-rows-spanned="1">
            <text:p>COPY AND PASTE INDOOR WHERE DIALOG BELOW IN USER INPUT LINE</text:p>
          </table:table-cell>
          <table:covered-table-cell table:style-name="ce217"/>
          <table:table-cell table:style-name="ce222" table:number-columns-repeated="7"/>
          <table:table-cell table:number-columns-repeated="16356"/>
        </table:table-row>
        <table:table-row-group>
          <table:table-row table:style-name="ro10">
            <table:table-cell table:number-columns-repeated="2"/>
            <table:table-cell table:style-name="ce11" office:value-type="string" calcext:value-type="string" table:number-columns-spanned="4" table:number-rows-spanned="1">
              <text:p>setup and stabalize glider</text:p>
            </table:table-cell>
            <table:covered-table-cell table:number-columns-repeated="3" table:style-name="ce36"/>
            <table:table-cell table:style-name="ce108" table:formula="of:=IF(COUNTIF([.F35:.G50];&quot;Y&quot;)+COUNTIF([.F35:.G50];&quot;na&quot;)+COUNTIF([.F35:.G50];&quot;n/a&quot;)=COUNTA([.F35:.G50]); &quot;Complete&quot;; &quot;Incomplete&quot;)" office:value-type="string" office:string-value="Complete" calcext:value-type="string">
              <text:p>Complete</text:p>
            </table:table-cell>
            <table:table-cell table:style-name="ce135"/>
            <table:table-cell table:style-name="ce155" table:number-columns-spanned="5" table:number-rows-spanned="1"/>
            <table:covered-table-cell table:number-columns-repeated="3" table:style-name="ce169"/>
            <table:covered-table-cell table:style-name="ce155"/>
            <table:table-cell table:style-name="ce192"/>
            <table:table-cell table:style-name="ce200" table:number-columns-repeated="2"/>
            <table:table-cell table:style-name="ce206"/>
            <table:table-cell table:number-columns-repeated="2"/>
            <table:table-cell table:style-name="ce211" office:value-type="string" calcext:value-type="string">
              <text:p>USER INPUT</text:p>
            </table:table-cell>
            <table:table-cell table:style-name="ce218"/>
            <table:table-cell table:number-columns-repeated="16363"/>
          </table:table-row>
          <table:table-row table:style-name="ro11">
            <table:table-cell table:number-columns-repeated="2"/>
            <table:table-cell table:style-name="ce12"/>
            <table:table-cell table:style-name="ce37" office:value-type="string" calcext:value-type="string">
              <text:p>Turn glider on (battery preferred) note surface log file number --&gt; </text:p>
            </table:table-cell>
            <table:table-cell table:style-name="ce60" office:value-type="string" calcext:value-type="string">
              <text:p>-</text:p>
            </table:table-cell>
            <table:table-cell table:style-name="ce81" table:content-validation-name="val1" office:value-type="string" calcext:value-type="string" table:number-columns-spanned="2" table:number-rows-spanned="1">
              <text:p>y</text:p>
            </table:table-cell>
            <table:covered-table-cell table:style-name="ce109" table:content-validation-name="val1"/>
            <table:table-cell table:style-name="ce136" office:value-type="string" calcext:value-type="string">
              <text:p>surface log</text:p>
            </table:table-cell>
            <table:table-cell table:style-name="ce156" table:number-columns-spanned="5" table:number-rows-spanned="1"/>
            <table:covered-table-cell table:number-columns-repeated="3" table:style-name="ce170"/>
            <table:covered-table-cell table:style-name="ce156"/>
            <table:table-cell table:style-name="ce193"/>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2">
            <table:table-cell table:number-columns-repeated="2"/>
            <table:table-cell table:style-name="ce13"/>
            <table:table-cell table:style-name="ce38" office:value-type="string" calcext:value-type="string">
              <text:p>in boot app? If not turn boot app on in pico dos</text:p>
            </table:table-cell>
            <table:table-cell table:style-name="ce61" office:value-type="string" calcext:value-type="string">
              <text:p>boot app</text:p>
            </table:table-cell>
            <table:table-cell table:style-name="ce81" table:content-validation-name="val1" office:value-type="string" calcext:value-type="string" table:number-columns-spanned="2" table:number-rows-spanned="1">
              <text:p>y</text:p>
            </table:table-cell>
            <table:covered-table-cell table:style-name="ce109"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office:value-type="string" calcext:value-type="string">
              <text:p>Vehicle Name: unit_1236</text:p>
            </table:table-cell>
            <table:table-cell table:style-name="ce218"/>
            <table:table-cell table:number-columns-repeated="16363"/>
          </table:table-row>
          <table:table-row table:style-name="ro2">
            <table:table-cell table:number-columns-repeated="2"/>
            <table:table-cell table:style-name="ce13"/>
            <table:table-cell table:style-name="ce39" office:value-type="string" calcext:value-type="string">
              <text:p>stop initial</text:p>
            </table:table-cell>
            <table:table-cell table:style-name="ce61" office:value-type="string" calcext:value-type="string">
              <text:p>^c</text:p>
            </table:table-cell>
            <table:table-cell table:style-name="ce81" table:content-validation-name="val1" office:value-type="string" calcext:value-type="string" table:number-columns-spanned="2" table:number-rows-spanned="1">
              <text:p>y</text:p>
            </table:table-cell>
            <table:covered-table-cell table:style-name="ce109"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office:value-type="string" calcext:value-type="string">
              <text:p>Curr Time: Fri Sep 26 08:22:04 2025 MT: <text:s text:c="4"/>309</text:p>
            </table:table-cell>
            <table:table-cell table:style-name="ce218"/>
            <table:table-cell table:number-columns-repeated="16363"/>
          </table:table-row>
          <table:table-row table:style-name="ro11">
            <table:table-cell table:number-columns-repeated="2"/>
            <table:table-cell table:style-name="ce13"/>
            <table:table-cell table:style-name="ce38" office:value-type="string" calcext:value-type="string">
              <text:p>Did Air pump turn on? </text:p>
            </table:table-cell>
            <table:table-cell table:style-name="ce62" office:value-type="string" calcext:value-type="string">
              <text:p>Note time in user input UTC 24 HH:mm --&gt; </text:p>
            </table:table-cell>
            <table:table-cell table:style-name="ce81" table:content-validation-name="val1" office:value-type="string" calcext:value-type="string" table:number-columns-spanned="2" table:number-rows-spanned="1">
              <text:p>y</text:p>
            </table:table-cell>
            <table:covered-table-cell table:style-name="ce109" table:content-validation-name="val1"/>
            <table:table-cell table:style-name="ce138" office:value-type="time" office:time-value="PT00H00M00S" calcext:value-type="time">
              <text:p>12:00:00 AM</text:p>
            </table:table-cell>
            <table:table-cell table:style-name="ce157" table:number-columns-spanned="5" table:number-rows-spanned="1"/>
            <table:covered-table-cell table:number-columns-repeated="3" table:style-name="ce171"/>
            <table:covered-table-cell table:style-name="ce157"/>
            <table:table-cell table:style-name="ce193"/>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office:value-type="string" calcext:value-type="string">
              <text:p>DR <text:s/>Location: <text:s/>5706.046 N <text:s/>-206.220 E measured <text:s text:c="3"/>310.037 secs ago</text:p>
            </table:table-cell>
            <table:table-cell table:style-name="ce218"/>
            <table:table-cell table:number-columns-repeated="16363"/>
          </table:table-row>
          <table:table-row table:style-name="ro7">
            <table:table-cell table:number-columns-repeated="2"/>
            <table:table-cell table:style-name="ce13"/>
            <table:table-cell table:style-name="ce39" office:value-type="string" calcext:value-type="string">
              <text:p>turn on lab mode</text:p>
            </table:table-cell>
            <table:table-cell table:style-name="ce61" office:value-type="string" calcext:value-type="string">
              <text:p>lab_mode on</text:p>
            </table:table-cell>
            <table:table-cell table:style-name="ce81" table:content-validation-name="val1" office:value-type="string" calcext:value-type="string" table:number-columns-spanned="2" table:number-rows-spanned="1">
              <text:p>y</text:p>
            </table:table-cell>
            <table:covered-table-cell table:style-name="ce109"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office:value-type="string" calcext:value-type="string">
              <text:p>GPS TooFar: <text:s text:c="2"/>69696969.000 N 69696969.000 E measured <text:s text:c="4"/>1e+308 secs ago</text:p>
            </table:table-cell>
            <table:table-cell table:style-name="ce218"/>
            <table:table-cell table:number-columns-repeated="16363"/>
          </table:table-row>
          <table:table-row table:style-name="ro2">
            <table:table-cell table:number-columns-repeated="2"/>
            <table:table-cell table:style-name="ce13"/>
            <table:table-cell table:style-name="ce39" office:value-type="string" calcext:value-type="string">
              <text:p>stop iridium calls</text:p>
            </table:table-cell>
            <table:table-cell table:style-name="ce61" office:value-type="string" calcext:value-type="string">
              <text:p>callback 30</text:p>
            </table:table-cell>
            <table:table-cell table:style-name="ce81" table:content-validation-name="val1" office:value-type="string" calcext:value-type="string" table:number-columns-spanned="2" table:number-rows-spanned="1">
              <text:p>y</text:p>
            </table:table-cell>
            <table:covered-table-cell table:style-name="ce109"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office:value-type="string" calcext:value-type="string">
              <text:p>GPS Invalid : <text:s/>6938.645 N <text:s/>1856.992 E measured <text:s text:c="5"/>1.087 secs ago</text:p>
            </table:table-cell>
            <table:table-cell table:style-name="ce218"/>
            <table:table-cell table:number-columns-repeated="16363"/>
          </table:table-row>
          <table:table-row table:style-name="ro2">
            <table:table-cell table:number-columns-repeated="2"/>
            <table:table-cell table:style-name="ce13"/>
            <table:table-cell table:style-name="ce39" office:value-type="string" calcext:value-type="string">
              <text:p>After 'simul?' command, is response blank? </text:p>
            </table:table-cell>
            <table:table-cell table:style-name="ce61" office:value-type="string" calcext:value-type="string">
              <text:p>simul? </text:p>
            </table:table-cell>
            <table:table-cell table:style-name="ce81" table:content-validation-name="val1" office:value-type="string" calcext:value-type="string" table:number-columns-spanned="2" table:number-rows-spanned="1">
              <text:p>y</text:p>
            </table:table-cell>
            <table:covered-table-cell table:style-name="ce109"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office:value-type="string" calcext:value-type="string">
              <text:p>GPS Location: 69696969.000 N 69696969.000 E measured <text:s text:c="4"/>1e+308 secs ago</text:p>
            </table:table-cell>
            <table:table-cell table:style-name="ce218"/>
            <table:table-cell table:number-columns-repeated="16363"/>
          </table:table-row>
          <table:table-row table:style-name="ro2">
            <table:table-cell table:number-columns-repeated="2"/>
            <table:table-cell table:style-name="ce13"/>
            <table:table-cell table:style-name="ce39" office:value-type="string" calcext:value-type="string">
              <text:p>if not, del simul.sim and restart checklist</text:p>
            </table:table-cell>
            <table:table-cell table:style-name="ce61" office:value-type="string" calcext:value-type="string">
              <text:p>del config\simul.sim</text:p>
            </table:table-cell>
            <table:table-cell table:style-name="ce81" table:content-validation-name="val1" office:value-type="string" calcext:value-type="string" table:number-columns-spanned="2" table:number-rows-spanned="1">
              <text:p>na</text:p>
            </table:table-cell>
            <table:covered-table-cell table:style-name="ce109"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office:value-type="string" calcext:value-type="string">
              <text:p><text:s text:c="3"/>sensor:c_wpt_lat(lat)=0 <text:s text:c="24"/>1e+308 secs ago</text:p>
            </table:table-cell>
            <table:table-cell table:style-name="ce218"/>
            <table:table-cell table:number-columns-repeated="16363"/>
          </table:table-row>
          <table:table-row table:style-name="ro2">
            <table:table-cell table:number-columns-repeated="2"/>
            <table:table-cell table:style-name="ce13"/>
            <table:table-cell table:style-name="ce39" office:value-type="string" calcext:value-type="string">
              <text:p>turn logging on, record log file number in comments</text:p>
            </table:table-cell>
            <table:table-cell table:style-name="ce61" office:value-type="string" calcext:value-type="string">
              <text:p>logging on </text:p>
            </table:table-cell>
            <table:table-cell table:style-name="ce81" table:content-validation-name="val1" office:value-type="string" calcext:value-type="string" table:number-columns-spanned="2" table:number-rows-spanned="1">
              <text:p>y</text:p>
            </table:table-cell>
            <table:covered-table-cell table:style-name="ce109" table:content-validation-name="val1"/>
            <table:table-cell table:style-name="ce137" office:value-type="string" calcext:value-type="string">
              <text:p>logfile number</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office:value-type="string" calcext:value-type="string">
              <text:p><text:s text:c="3"/>sensor:c_wpt_lon(lon)=0 <text:s text:c="24"/>1e+308 secs ago</text:p>
            </table:table-cell>
            <table:table-cell table:style-name="ce218"/>
            <table:table-cell table:number-columns-repeated="14"/>
            <table:table-cell table:style-name="ce223"/>
            <table:table-cell table:number-columns-repeated="16348"/>
          </table:table-row>
          <table:table-row table:style-name="ro11">
            <table:table-cell table:number-columns-repeated="2"/>
            <table:table-cell table:style-name="ce13"/>
            <table:table-cell table:style-name="ce39" office:value-type="string" calcext:value-type="string">
              <text:p>Place RF chirper on or near fin. Does it cherp every 90 sec?</text:p>
            </table:table-cell>
            <table:table-cell table:style-name="ce61" office:value-type="string" calcext:value-type="string">
              <text:p>-</text:p>
            </table:table-cell>
            <table:table-cell table:style-name="ce81" table:content-validation-name="val1" office:value-type="string" calcext:value-type="string" table:number-columns-spanned="2" table:number-rows-spanned="1">
              <text:p>n/a</text:p>
            </table:table-cell>
            <table:covered-table-cell table:style-name="ce109"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4"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office:value-type="string" calcext:value-type="string">
              <text:p><text:s text:c="3"/>sensor:m_battery(volts)=16.3959067655903 <text:s text:c="8"/>0.234 secs ago</text:p>
            </table:table-cell>
            <table:table-cell table:style-name="ce218"/>
            <table:table-cell table:number-columns-repeated="14"/>
            <table:table-cell table:style-name="ce223"/>
            <table:table-cell table:number-columns-repeated="16348"/>
          </table:table-row>
          <table:table-row table:style-name="ro2">
            <table:table-cell table:number-columns-repeated="2"/>
            <table:table-cell table:style-name="ce13"/>
            <table:table-cell table:style-name="ce39" office:value-type="string" calcext:value-type="string">
              <text:p>type where and copy surface dialog in area to right</text:p>
            </table:table-cell>
            <table:table-cell table:style-name="ce61" office:value-type="string" calcext:value-type="string">
              <text:p>where</text:p>
            </table:table-cell>
            <table:table-cell table:style-name="ce82" table:content-validation-name="val1" office:value-type="string" calcext:value-type="string" table:number-columns-spanned="2" table:number-rows-spanned="1">
              <text:p>y</text:p>
            </table:table-cell>
            <table:covered-table-cell table:style-name="ce110"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office:value-type="string" calcext:value-type="string">
              <text:p><text:s text:c="3"/>sensor:m_coulomb_amphr_total(amp-hrs)=44.819886 <text:s text:c="7"/>0.369 secs ago</text:p>
            </table:table-cell>
            <table:table-cell table:style-name="ce218"/>
            <table:table-cell table:number-columns-repeated="16363"/>
          </table:table-row>
          <table:table-row table:style-name="ro2">
            <table:table-cell table:number-columns-repeated="2"/>
            <table:table-cell table:style-name="ce13"/>
            <table:table-cell table:style-name="ce39" office:value-type="string" calcext:value-type="string">
              <text:p>Does UTC time match within 3 min</text:p>
            </table:table-cell>
            <table:table-cell table:style-name="ce61" table:formula="of:=IF([.H16]=&quot;G3&quot;;&quot;date&quot;;&quot;time&quot;)" office:value-type="string" office:string-value="time" calcext:value-type="string">
              <text:p>time</text:p>
            </table:table-cell>
            <table:table-cell table:style-name="ce81" table:content-validation-name="val1" office:value-type="string" calcext:value-type="string" table:number-columns-spanned="2" table:number-rows-spanned="1">
              <text:p>y</text:p>
            </table:table-cell>
            <table:covered-table-cell table:style-name="ce109"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office:value-type="string" calcext:value-type="string">
              <text:p><text:s text:c="3"/>sensor:m_digifin_leakdetect_reading(nodim)=1023 <text:s text:c="7"/>3.864 secs ago</text:p>
            </table:table-cell>
            <table:table-cell table:style-name="ce218"/>
            <table:table-cell table:number-columns-repeated="16363"/>
          </table:table-row>
          <table:table-row table:style-name="ro2">
            <table:table-cell table:number-columns-repeated="2"/>
            <table:table-cell table:style-name="ce13"/>
            <table:table-cell table:style-name="ce39" office:value-type="string" calcext:value-type="string">
              <text:p>If not sync_time outside over GPS</text:p>
            </table:table-cell>
            <table:table-cell table:style-name="ce61" office:value-type="string" calcext:value-type="string">
              <text:p>sync_time</text:p>
            </table:table-cell>
            <table:table-cell table:style-name="ce81" table:content-validation-name="val1" office:value-type="string" calcext:value-type="string" table:number-columns-spanned="2" table:number-rows-spanned="1">
              <text:p>na</text:p>
            </table:table-cell>
            <table:covered-table-cell table:style-name="ce109"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office:value-type="string" calcext:value-type="string">
              <text:p><text:s text:c="3"/>sensor:m_iridium_attempt_num(nodim)=1 <text:s text:c="9"/>293.343 secs ago</text:p>
            </table:table-cell>
            <table:table-cell table:style-name="ce218"/>
            <table:table-cell table:number-columns-repeated="16363"/>
          </table:table-row>
          <table:table-row table:style-name="ro12">
            <table:table-cell table:number-columns-repeated="2"/>
            <table:table-cell table:style-name="ce13"/>
            <table:table-cell table:style-name="ce39" office:value-type="string" calcext:value-type="string">
              <text:p>matching science and flight ver, 8.5 persistor and 10.08 stm32</text:p>
            </table:table-cell>
            <table:table-cell table:style-name="ce61" office:value-type="string" calcext:value-type="string">
              <text:p>ver</text:p>
            </table:table-cell>
            <table:table-cell table:style-name="ce81" table:content-validation-name="val1" office:value-type="string" calcext:value-type="string" table:number-columns-spanned="2" table:number-rows-spanned="1">
              <text:p>y</text:p>
            </table:table-cell>
            <table:covered-table-cell table:style-name="ce109"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office:value-type="string" calcext:value-type="string">
              <text:p><text:s text:c="3"/>sensor:m_iridium_signal_strength(nodim)=0 <text:s text:c="5"/>284.171 secs ago</text:p>
            </table:table-cell>
            <table:table-cell table:style-name="ce218"/>
            <table:table-cell table:number-columns-repeated="16363"/>
          </table:table-row>
          <table:table-row table:style-name="ro11">
            <table:table-cell table:number-columns-repeated="2"/>
            <table:table-cell table:style-name="ce13"/>
            <table:table-cell table:style-name="ce39" office:value-type="string" calcext:value-type="string">
              <text:p>Is m_tot_num_inflections okay for mission? </text:p>
            </table:table-cell>
            <table:table-cell table:style-name="ce61" office:value-type="string" calcext:value-type="string">
              <text:p>-</text:p>
            </table:table-cell>
            <table:table-cell table:style-name="ce83" table:content-validation-name="val1" office:value-type="string" calcext:value-type="string" table:number-columns-spanned="2" table:number-rows-spanned="1">
              <text:p>y</text:p>
            </table:table-cell>
            <table:covered-table-cell table:style-name="ce111" table:content-validation-name="val1"/>
            <table:table-cell table:style-name="ce137" table:formula="of:=IFERROR(VLOOKUP([.N49];[$hidden_lists.$N$2:.$O$70];2;FALSE());&quot;Not Found&quot;)" office:value-type="string" office:string-value="Not Found" calcext:value-type="string">
              <text:p>Not Found</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m_tot_num_inflections</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office:value-type="string" calcext:value-type="string">
              <text:p><text:s text:c="3"/>sensor:m_leakdetect_voltage(volts)=2.47655677655678 <text:s text:c="7"/>0.101 secs ago</text:p>
            </table:table-cell>
            <table:table-cell table:style-name="ce218"/>
            <table:table-cell table:number-columns-repeated="16363"/>
          </table:table-row>
          <table:table-row table:style-name="ro11">
            <table:table-cell table:number-columns-repeated="2"/>
            <table:table-cell table:style-name="ce14"/>
            <table:table-cell table:style-name="ce40" office:value-type="string" calcext:value-type="string">
              <text:p>total battery sufficent for mission (&lt;5 for new batteries)</text:p>
            </table:table-cell>
            <table:table-cell table:style-name="ce63" office:value-type="string" calcext:value-type="string">
              <text:p>get m_coulomb_amphr_total</text:p>
            </table:table-cell>
            <table:table-cell table:style-name="ce81" table:content-validation-name="val1" office:value-type="string" calcext:value-type="string" table:number-columns-spanned="2" table:number-rows-spanned="1">
              <text:p>y</text:p>
            </table:table-cell>
            <table:covered-table-cell table:style-name="ce109" table:content-validation-name="val1"/>
            <table:table-cell table:style-name="ce139" table:formula="of:=IFERROR(VLOOKUP([.N50];[$hidden_lists.$N$2:.$O$70];2;FALSE());&quot;Not Found&quot;)" office:value-type="string" office:string-value="44.819886 " calcext:value-type="string">
              <text:p>44.819886 </text:p>
            </table:table-cell>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m_coulomb_amphr_total</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office:value-type="string" calcext:value-type="string">
              <text:p><text:s text:c="3"/>sensor:m_leakdetect_voltage_forward(volts)=2.48180708180708 <text:s text:c="7"/>0.063 secs ago</text:p>
            </table:table-cell>
            <table:table-cell table:style-name="ce218"/>
            <table:table-cell table:number-columns-repeated="16363"/>
          </table:table-row>
          <table:table-row table:style-name="ro2">
            <table:table-cell table:number-columns-repeated="2"/>
            <table:table-cell table:style-name="ce11" office:value-type="string" calcext:value-type="string" table:number-columns-spanned="4" table:number-rows-spanned="1">
              <text:p>component functionality</text:p>
            </table:table-cell>
            <table:covered-table-cell table:number-columns-repeated="3" table:style-name="ce36"/>
            <table:table-cell table:style-name="ce108" table:formula="of:=IF(COUNTIF([.F52:.G86];&quot;Y&quot;)+COUNTIF([.F52:.G86];&quot;na&quot;)+COUNTIF([.F52:.G86];&quot;n/a&quot;)+COUNTIF([.F52:.G86];&quot;nothing&quot;)=COUNTA([.F52:.G86]); &quot;Complete&quot;; &quot;Incomplete&quot;)" office:value-type="string" office:string-value="Complete" calcext:value-type="string">
              <text:p>Complete</text:p>
            </table:table-cell>
            <table:table-cell table:style-name="ce140"/>
            <table:table-cell table:style-name="ce159" table:number-columns-spanned="5" table:number-rows-spanned="1"/>
            <table:covered-table-cell table:number-columns-repeated="3" table:style-name="ce172"/>
            <table:covered-table-cell table:style-name="ce186"/>
            <table:table-cell table:style-name="ce192"/>
            <table:table-cell table:style-name="ce200" table:number-columns-repeated="2"/>
            <table:table-cell table:style-name="ce206"/>
            <table:table-cell table:number-columns-repeated="2"/>
            <table:table-cell table:style-name="ce211" office:value-type="string" calcext:value-type="string">
              <text:p><text:s text:c="3"/>sensor:m_leakdetect_voltage_science(volts)=2.48495115995116 <text:s text:c="7"/>0.025 secs ago</text:p>
            </table:table-cell>
            <table:table-cell table:style-name="ce218"/>
            <table:table-cell table:number-columns-repeated="16363"/>
          </table:table-row>
          <table:table-row table:style-name="ro11">
            <table:table-cell table:number-columns-repeated="2"/>
            <table:table-cell table:style-name="ce15"/>
            <table:table-cell table:style-name="ce41" office:value-type="string" calcext:value-type="string">
              <text:p>When Air pump turns off, </text:p>
            </table:table-cell>
            <table:table-cell table:style-name="ce64" office:value-type="string" calcext:value-type="string">
              <text:p>record time in user input UTC 24 HH:mm--&gt; </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41" office:value-type="time" office:time-value="PT00H00M00S" calcext:value-type="time">
              <text:p>12:00:00 AM</text:p>
            </table:table-cell>
            <table:table-cell table:style-name="ce156" table:number-columns-spanned="5" table:number-rows-spanned="1"/>
            <table:covered-table-cell table:number-columns-repeated="3" table:style-name="ce170"/>
            <table:covered-table-cell table:style-name="ce156"/>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office:value-type="string" calcext:value-type="string">
              <text:p><text:s text:c="3"/>sensor:m_lithium_battery_relative_charge(%)=79.1535413953489 <text:s text:c="7"/>0.381 secs ago</text:p>
            </table:table-cell>
            <table:table-cell table:style-name="ce218"/>
            <table:table-cell table:number-columns-repeated="16363"/>
          </table:table-row>
          <table:table-row table:style-name="ro2">
            <table:table-cell table:number-columns-repeated="2"/>
            <table:table-cell table:style-name="ce15"/>
            <table:table-cell table:style-name="ce39" office:value-type="string" calcext:value-type="string">
              <text:p>check the vacuum after air pump turns off</text:p>
            </table:table-cell>
            <table:table-cell table:style-name="ce61" office:value-type="string" calcext:value-type="string">
              <text:p>get m_vacuum</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7" office:value-type="string" calcext:value-type="string">
              <text:p>user input</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office:value-type="string" calcext:value-type="string">
              <text:p><text:s text:c="3"/>sensor:m_vacuum(inHg)=9.56216344322344 <text:s text:c="12"/>0.2 secs ago</text:p>
            </table:table-cell>
            <table:table-cell table:style-name="ce218"/>
            <table:table-cell table:number-columns-repeated="16363"/>
          </table:table-row>
          <table:table-row table:style-name="ro2">
            <table:table-cell table:number-columns-repeated="2"/>
            <table:table-cell table:style-name="ce15"/>
            <table:table-cell table:style-name="ce39" office:value-type="string" calcext:value-type="string">
              <text:p>check veh temperature</text:p>
            </table:table-cell>
            <table:table-cell table:style-name="ce61" office:value-type="string" calcext:value-type="string">
              <text:p>get m_veh_temp</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7" office:value-type="string" calcext:value-type="string">
              <text:p>user input</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office:value-type="string" calcext:value-type="string">
              <text:p><text:s text:c="3"/>sensor:m_water_vx(m/s)=0 <text:s text:c="23"/>1e+308 secs ago</text:p>
            </table:table-cell>
            <table:table-cell table:style-name="ce218"/>
            <table:table-cell table:number-columns-repeated="16363"/>
          </table:table-row>
          <table:table-row table:style-name="ro11">
            <table:table-cell table:number-columns-repeated="2"/>
            <table:table-cell table:style-name="ce15"/>
            <table:table-cell table:style-name="ce40" office:value-type="string" calcext:value-type="string">
              <text:p>Is total time okay. 3 to 10 min for simgle air pump gliders, 1 to 5 min for dual air pump @ lab temperatures</text:p>
            </table:table-cell>
            <table:table-cell table:style-name="ce63" office:value-type="string" calcext:value-type="string">
              <text:p>-</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42" table:formula="of:=[.H52]-[.H38]" office:value-type="time" office:time-value="PT00H00M00S" calcext:value-type="time">
              <text:p>12:00:00 AM</text:p>
            </table:table-cell>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office:value-type="string" calcext:value-type="string">
              <text:p><text:s text:c="3"/>sensor:m_water_vy(m/s)=0 <text:s text:c="23"/>1e+308 secs ago</text:p>
            </table:table-cell>
            <table:table-cell table:style-name="ce218"/>
            <table:table-cell table:number-columns-repeated="16363"/>
          </table:table-row>
          <table:table-row table:style-name="ro2">
            <table:table-cell table:number-columns-repeated="2"/>
            <table:table-cell table:style-name="ce15"/>
            <table:table-cell table:style-name="ce42" office:value-type="string" calcext:value-type="string">
              <text:p>Vacuum and wiggle</text:p>
            </table:table-cell>
            <table:table-cell table:style-name="ce42"/>
            <table:table-cell table:style-name="ce85" office:value-type="string" calcext:value-type="string" table:number-columns-spanned="2" table:number-rows-spanned="1">
              <text:p>nothing</text:p>
            </table:table-cell>
            <table:covered-table-cell table:style-name="ce113"/>
            <table:table-cell table:style-name="ce143"/>
            <table:table-cell table:style-name="ce160" table:number-columns-spanned="5" table:number-rows-spanned="1"/>
            <table:covered-table-cell table:number-columns-repeated="3" table:style-name="ce173"/>
            <table:covered-table-cell table:style-name="ce187"/>
            <table:table-cell table:style-name="ce195"/>
            <table:table-cell table:style-name="ce201" table:number-columns-repeated="2"/>
            <table:table-cell table:style-name="ce208"/>
            <table:table-cell table:number-columns-repeated="2"/>
            <table:table-cell table:style-name="ce211" office:value-type="string" calcext:value-type="string">
              <text:p><text:s text:c="3"/>sensor:u_alt_min_depth(m)=2 <text:s text:c="20"/>1e+308 secs ago</text:p>
            </table:table-cell>
            <table:table-cell table:style-name="ce218"/>
            <table:table-cell table:number-columns-repeated="16363"/>
          </table:table-row>
          <table:table-row table:style-name="ro13">
            <table:table-cell table:number-columns-repeated="2"/>
            <table:table-cell table:style-name="ce15"/>
            <table:table-cell table:style-name="ce41" office:value-type="string" calcext:value-type="string">
              <text:p>has the air pump stopped moving, if not wait till air pump has turned stopped pumping but you can continue with FCP. Come back to this once air pump is off</text:p>
            </table:table-cell>
            <table:table-cell table:style-name="ce60" office:value-type="string" calcext:value-type="string">
              <text:p>-</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6" office:value-type="string" calcext:value-type="string">
              <text:p>-</text:p>
            </table:table-cell>
            <table:table-cell table:style-name="ce156" table:number-columns-spanned="5" table:number-rows-spanned="1"/>
            <table:covered-table-cell table:number-columns-repeated="3" table:style-name="ce170"/>
            <table:covered-table-cell table:style-name="ce156"/>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7">
            <table:table-cell table:number-columns-repeated="2"/>
            <table:table-cell table:style-name="ce15"/>
            <table:table-cell table:style-name="ce39" office:value-type="string" calcext:value-type="string">
              <text:p>get vacuum</text:p>
            </table:table-cell>
            <table:table-cell table:style-name="ce61" office:value-type="string" calcext:value-type="string">
              <text:p>get m_vacuum</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7"/>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m_vacuum</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2">
            <table:table-cell table:number-columns-repeated="2"/>
            <table:table-cell table:style-name="ce15"/>
            <table:table-cell table:style-name="ce39" office:value-type="string" calcext:value-type="string">
              <text:p>put glider in ballast position</text:p>
            </table:table-cell>
            <table:table-cell table:style-name="ce61" office:value-type="string" calcext:value-type="string">
              <text:p>ballast</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11">
            <table:table-cell table:number-columns-repeated="2"/>
            <table:table-cell table:style-name="ce15"/>
            <table:table-cell table:style-name="ce39" office:value-type="string" calcext:value-type="string">
              <text:p>wait for air pump to be off, and ballast to be at 0, then stop reporting</text:p>
            </table:table-cell>
            <table:table-cell table:style-name="ce61" office:value-type="string" calcext:value-type="string">
              <text:p>report clearall</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14">
            <table:table-cell table:number-columns-repeated="2"/>
            <table:table-cell table:style-name="ce15"/>
            <table:table-cell table:style-name="ce39" office:value-type="string" calcext:value-type="string">
              <text:p>get vacuum, report value, is value good? 7 for oil pumps and 6 for piston pumps. <text:span text:style-name="T1">NOTE vacuum significantly affected by temperature and cc pump pos</text:span></text:p>
            </table:table-cell>
            <table:table-cell table:style-name="ce61" office:value-type="string" calcext:value-type="string">
              <text:p>get m_vacuum</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7" office:value-type="string" calcext:value-type="string">
              <text:p>user input</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11">
            <table:table-cell table:number-columns-repeated="2"/>
            <table:table-cell table:style-name="ce15"/>
            <table:table-cell table:style-name="ce39" office:value-type="string" calcext:value-type="string">
              <text:p>turn wiggle on and let run for 10 min, continue with rest of FCP</text:p>
            </table:table-cell>
            <table:table-cell table:style-name="ce61" office:value-type="string" calcext:value-type="string">
              <text:p>wiggle on</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12">
            <table:table-cell table:number-columns-repeated="2"/>
            <table:table-cell table:style-name="ce15"/>
            <table:table-cell table:style-name="ce39" office:value-type="string" calcext:value-type="string">
              <text:p>report battery voltage (if on battery power) and observe for a few cycles. Look for some voltage spikes larger then normal</text:p>
            </table:table-cell>
            <table:table-cell table:style-name="ce61" office:value-type="string" calcext:value-type="string">
              <text:p>report ++ m_battery</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2">
            <table:table-cell table:number-columns-repeated="2"/>
            <table:table-cell table:style-name="ce15"/>
            <table:table-cell table:style-name="ce39" office:value-type="string" calcext:value-type="string">
              <text:p>clear reporting once you are happy</text:p>
            </table:table-cell>
            <table:table-cell table:style-name="ce61" office:value-type="string" calcext:value-type="string">
              <text:p>report clearall</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2">
            <table:table-cell table:number-columns-repeated="2"/>
            <table:table-cell table:style-name="ce15"/>
            <table:table-cell table:style-name="ce39" office:value-type="string" calcext:value-type="string">
              <text:p>turn wigggle off after 10 min</text:p>
            </table:table-cell>
            <table:table-cell table:style-name="ce61" office:value-type="string" calcext:value-type="string">
              <text:p>wiggle off</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2">
            <table:table-cell table:number-columns-repeated="2"/>
            <table:table-cell table:style-name="ce15"/>
            <table:table-cell table:style-name="ce39" office:value-type="string" calcext:value-type="string">
              <text:p>put back into ballast mode</text:p>
            </table:table-cell>
            <table:table-cell table:style-name="ce61" office:value-type="string" calcext:value-type="string">
              <text:p>ballast</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11">
            <table:table-cell table:number-columns-repeated="2"/>
            <table:table-cell table:style-name="ce15"/>
            <table:table-cell table:style-name="ce40" office:value-type="string" calcext:value-type="string">
              <text:p>does use show any errors warnings or oddities on pump and pitch motor. If not, put Y in taks complete</text:p>
            </table:table-cell>
            <table:table-cell table:style-name="ce63" office:value-type="string" calcext:value-type="string">
              <text:p>use</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9" office:value-type="string" calcext:value-type="string">
              <text:p>-</text:p>
            </table:table-cell>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2">
            <table:table-cell table:number-columns-repeated="2"/>
            <table:table-cell table:style-name="ce15"/>
            <table:table-cell table:style-name="ce43" office:value-type="string" calcext:value-type="string" table:number-columns-spanned="2" table:number-rows-spanned="1">
              <text:p>Leak Detects</text:p>
            </table:table-cell>
            <table:covered-table-cell table:style-name="ce65"/>
            <table:table-cell table:style-name="ce85" office:value-type="string" calcext:value-type="string" table:number-columns-spanned="2" table:number-rows-spanned="1">
              <text:p>nothing</text:p>
            </table:table-cell>
            <table:covered-table-cell table:style-name="ce113"/>
            <table:table-cell table:style-name="ce143"/>
            <table:table-cell table:style-name="ce160" table:number-columns-spanned="5" table:number-rows-spanned="1"/>
            <table:covered-table-cell table:number-columns-repeated="3" table:style-name="ce173"/>
            <table:covered-table-cell table:style-name="ce187"/>
            <table:table-cell table:style-name="ce195"/>
            <table:table-cell table:style-name="ce201" table:number-columns-repeated="2"/>
            <table:table-cell table:style-name="ce208"/>
            <table:table-cell table:number-columns-repeated="2"/>
            <table:table-cell table:style-name="ce211"/>
            <table:table-cell table:style-name="ce218"/>
            <table:table-cell table:number-columns-repeated="7"/>
            <table:table-cell table:style-name="ce223"/>
            <table:table-cell table:number-columns-repeated="16355"/>
          </table:table-row>
          <table:table-row table:style-name="ro12">
            <table:table-cell table:number-columns-repeated="2"/>
            <table:table-cell table:style-name="ce15"/>
            <table:table-cell table:style-name="ce44" office:value-type="string" calcext:value-type="string">
              <text:p>check leak detect forward ( &gt;2.3 &lt;2.5 )</text:p>
            </table:table-cell>
            <table:table-cell table:style-name="ce60" office:value-type="string" calcext:value-type="string">
              <text:p>get m_leakdetect_voltage_forward</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41"/>
            <table:table-cell table:style-name="ce156" table:number-columns-spanned="5" table:number-rows-spanned="1"/>
            <table:covered-table-cell table:number-columns-repeated="3" table:style-name="ce170"/>
            <table:covered-table-cell table:style-name="ce156"/>
            <table:table-cell table:style-name="ce193" office:value-type="string" calcext:value-type="string">
              <text:p>m_leakdetect_voltage_forward</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11">
            <table:table-cell table:number-columns-repeated="2"/>
            <table:table-cell table:style-name="ce15"/>
            <table:table-cell table:style-name="ce39" office:value-type="string" calcext:value-type="string">
              <text:p>check leak detect aft ( &gt;2.3 &lt;2.5 )</text:p>
            </table:table-cell>
            <table:table-cell table:style-name="ce61" office:value-type="string" calcext:value-type="string">
              <text:p>get m_leakdetect_voltage</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8"/>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m_leakdetect_voltage</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12">
            <table:table-cell table:number-columns-repeated="2"/>
            <table:table-cell table:style-name="ce15"/>
            <table:table-cell table:style-name="ce39" table:formula="of:=IF(glider_type=&quot;G2&quot;; &quot;-&quot;;&quot;check leak detect science ( &gt;2.3 &lt;2.5 )&quot;)" office:value-type="string" office:string-value="check leak detect science ( &gt;2.3 &lt;2.5 )" calcext:value-type="string">
              <text:p>check leak detect science ( &gt;2.3 &lt;2.5 )</text:p>
            </table:table-cell>
            <table:table-cell table:style-name="ce61" table:formula="of:=IF(glider_type=&quot;G2&quot;; &quot;-&quot;;&quot;get m_leakdetect_voltage_science&quot;)" office:value-type="string" office:string-value="get m_leakdetect_voltage_science" calcext:value-type="string">
              <text:p>get m_leakdetect_voltage_science</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8"/>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m_leakdetect_voltage_science</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11">
            <table:table-cell table:number-columns-repeated="2"/>
            <table:table-cell table:style-name="ce15"/>
            <table:table-cell table:style-name="ce40" office:value-type="string" calcext:value-type="string">
              <text:p>get leakdetect digifin. <text:span text:style-name="T1">NOTE under 1019 fin needs service, above 1023 may indicate a leak. </text:span></text:p>
            </table:table-cell>
            <table:table-cell table:style-name="ce63" office:value-type="string" calcext:value-type="string">
              <text:p>get m_digifin_leakdetect_reading</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42"/>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m_digifin_leakdetect_reading</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43" office:value-type="string" calcext:value-type="string" table:number-columns-spanned="2" table:number-rows-spanned="1">
              <text:p>Strobe Light</text:p>
            </table:table-cell>
            <table:covered-table-cell table:style-name="ce65"/>
            <table:table-cell table:style-name="ce85" office:value-type="string" calcext:value-type="string" table:number-columns-spanned="2" table:number-rows-spanned="1">
              <text:p>nothing</text:p>
            </table:table-cell>
            <table:covered-table-cell table:style-name="ce113"/>
            <table:table-cell table:style-name="ce143"/>
            <table:table-cell table:style-name="ce160" table:number-columns-spanned="5" table:number-rows-spanned="1"/>
            <table:covered-table-cell table:number-columns-repeated="3" table:style-name="ce173"/>
            <table:covered-table-cell table:style-name="ce187"/>
            <table:table-cell table:style-name="ce195"/>
            <table:table-cell table:style-name="ce201" table:number-columns-repeated="2"/>
            <table:table-cell table:style-name="ce208"/>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44" office:value-type="string" calcext:value-type="string">
              <text:p>Turn strobe on and confirm flashing</text:p>
            </table:table-cell>
            <table:table-cell table:style-name="ce60" office:value-type="string" calcext:value-type="string">
              <text:p>strobe on</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6" office:value-type="string" calcext:value-type="string">
              <text:p>-</text:p>
            </table:table-cell>
            <table:table-cell table:style-name="ce156" table:number-columns-spanned="5" table:number-rows-spanned="1"/>
            <table:covered-table-cell table:number-columns-repeated="3" table:style-name="ce170"/>
            <table:covered-table-cell table:style-name="ce156"/>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7">
            <table:table-cell table:number-columns-repeated="2"/>
            <table:table-cell table:style-name="ce15"/>
            <table:table-cell table:style-name="ce40" office:value-type="string" calcext:value-type="string">
              <text:p>turn strobe off</text:p>
            </table:table-cell>
            <table:table-cell table:style-name="ce63" office:value-type="string" calcext:value-type="string">
              <text:p>strobe off</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9" office:value-type="string" calcext:value-type="string">
              <text:p>-</text:p>
            </table:table-cell>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43" table:formula="of:=IF(thruster_installed=&quot;yes&quot;;&quot;Thruster&quot;;&quot;Thruster is not installed&quot;)" office:value-type="string" office:string-value="Thruster" calcext:value-type="string" table:number-columns-spanned="2" table:number-rows-spanned="1">
              <text:p>Thruster</text:p>
            </table:table-cell>
            <table:covered-table-cell table:style-name="ce65"/>
            <table:table-cell table:style-name="ce85" office:value-type="string" calcext:value-type="string" table:number-columns-spanned="2" table:number-rows-spanned="1">
              <text:p>nothing</text:p>
            </table:table-cell>
            <table:covered-table-cell table:style-name="ce113"/>
            <table:table-cell table:style-name="ce143"/>
            <table:table-cell table:style-name="ce160" table:number-columns-spanned="5" table:number-rows-spanned="1"/>
            <table:covered-table-cell table:number-columns-repeated="3" table:style-name="ce173"/>
            <table:covered-table-cell table:style-name="ce187"/>
            <table:table-cell table:style-name="ce195"/>
            <table:table-cell table:style-name="ce201" table:number-columns-repeated="2"/>
            <table:table-cell table:style-name="ce208"/>
            <table:table-cell table:number-columns-repeated="2"/>
            <table:table-cell table:style-name="ce212"/>
            <table:table-cell table:style-name="ce218"/>
            <table:table-cell table:number-columns-repeated="16363"/>
          </table:table-row>
          <table:table-row table:style-name="ro11">
            <table:table-cell table:number-columns-repeated="2"/>
            <table:table-cell table:style-name="ce15"/>
            <table:table-cell table:style-name="ce44" table:formula="of:=IF(thruster_installed=&quot;no&quot;;&quot;-&quot;;&quot;Make Sure thruster is clear, No one is near, green plug is out of the way OR remove thruster blades&quot;)" office:value-type="string" office:string-value="Make Sure thruster is clear, No one is near, green plug is out of the way OR remove thruster blades" calcext:value-type="string">
              <text:p>Make Sure thruster is clear, No one is near, green plug is out of the way OR remove thruster blades</text:p>
            </table:table-cell>
            <table:table-cell table:style-name="ce60" office:value-type="string" calcext:value-type="string">
              <text:p>-</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6" office:value-type="string" calcext:value-type="string">
              <text:p>-</text:p>
            </table:table-cell>
            <table:table-cell table:style-name="ce156" table:number-columns-spanned="5" table:number-rows-spanned="1"/>
            <table:covered-table-cell table:number-columns-repeated="3" table:style-name="ce170"/>
            <table:covered-table-cell table:style-name="ce156"/>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39" table:formula="of:=IF(thruster_installed=&quot;no&quot;;&quot;-&quot;;&quot;report thruster current&quot;)" office:value-type="string" office:string-value="report thruster current" calcext:value-type="string">
              <text:p>report thruster current</text:p>
            </table:table-cell>
            <table:table-cell table:style-name="ce61" table:formula="of:=IF(thruster_installed=&quot;no&quot;;&quot;-&quot;;&quot;report ++ m_thruster_current&quot;)" office:value-type="string" office:string-value="report ++ m_thruster_current" calcext:value-type="string">
              <text:p>report ++ m_thruster_current</text:p>
            </table:table-cell>
            <table:table-cell table:style-name="ce86" table:content-validation-name="val1" office:value-type="string" calcext:value-type="string" table:number-columns-spanned="2" table:number-rows-spanned="1">
              <text:p>y</text:p>
            </table:table-cell>
            <table:covered-table-cell table:style-name="ce114"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39" table:formula="of:=IF(thruster_installed=&quot;no&quot;;&quot;-&quot;;&quot;turn thruster on 30%&quot;)" office:value-type="string" office:string-value="turn thruster on 30%" calcext:value-type="string">
              <text:p>turn thruster on 30%</text:p>
            </table:table-cell>
            <table:table-cell table:style-name="ce61" table:formula="of:=IF(thruster_installed=&quot;no&quot;;&quot;-&quot;;&quot;put c_thruster_on 30&quot;)" office:value-type="string" office:string-value="put c_thruster_on 30" calcext:value-type="string">
              <text:p>put c_thruster_on 30</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39" table:formula="of:=IF(thruster_installed=&quot;no&quot;;&quot;-&quot;;&quot;is it spining clockwise and is current changing&quot;)" office:value-type="string" office:string-value="is it spining clockwise and is current changing" calcext:value-type="string">
              <text:p>is it spining clockwise and is current changing</text:p>
            </table:table-cell>
            <table:table-cell table:style-name="ce61" office:value-type="string" calcext:value-type="string">
              <text:p>-</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39" table:formula="of:=IF(thruster_installed=&quot;no&quot;;&quot;-&quot;;&quot;turn thruster off&quot;)" office:value-type="string" office:string-value="turn thruster off" calcext:value-type="string">
              <text:p>turn thruster off</text:p>
            </table:table-cell>
            <table:table-cell table:style-name="ce61" table:formula="of:=IF(thruster_installed=&quot;no&quot;;&quot;-&quot;;&quot;put c_thruster_on 0&quot;)" office:value-type="string" office:string-value="put c_thruster_on 0" calcext:value-type="string">
              <text:p>put c_thruster_on 0</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40" table:formula="of:=IF(thruster_installed=&quot;no&quot;;&quot;-&quot;;&quot;clearall reporting&quot;)" office:value-type="string" office:string-value="clearall reporting" calcext:value-type="string">
              <text:p>clearall reporting</text:p>
            </table:table-cell>
            <table:table-cell table:style-name="ce63" table:formula="of:=IF(thruster_installed=&quot;no&quot;;&quot;-&quot;;&quot;report clearall&quot;)" office:value-type="string" office:string-value="report clearall" calcext:value-type="string">
              <text:p>report clearall</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9" office:value-type="string" calcext:value-type="string">
              <text:p>-</text:p>
            </table:table-cell>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43" office:value-type="string" calcext:value-type="string" table:number-columns-spanned="2" table:number-rows-spanned="1">
              <text:p>Pressure transducer</text:p>
            </table:table-cell>
            <table:covered-table-cell table:style-name="ce65"/>
            <table:table-cell table:style-name="ce85" office:value-type="string" calcext:value-type="string" table:number-columns-spanned="2" table:number-rows-spanned="1">
              <text:p>nothing</text:p>
            </table:table-cell>
            <table:covered-table-cell table:style-name="ce113"/>
            <table:table-cell table:style-name="ce143" office:value-type="string" calcext:value-type="string">
              <text:p>-</text:p>
            </table:table-cell>
            <table:table-cell table:style-name="ce160" table:number-columns-spanned="5" table:number-rows-spanned="1"/>
            <table:covered-table-cell table:number-columns-repeated="3" table:style-name="ce173"/>
            <table:covered-table-cell table:style-name="ce187"/>
            <table:table-cell table:style-name="ce195" office:value-type="string" calcext:value-type="string">
              <text:p>-</text:p>
            </table:table-cell>
            <table:table-cell table:number-columns-repeated="2" table:style-name="ce201" office:value-type="string" calcext:value-type="string">
              <text:p>-</text:p>
            </table:table-cell>
            <table:table-cell table:style-name="ce208"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44" office:value-type="string" calcext:value-type="string">
              <text:p>report depth on bench and verify +- 0.5 m.</text:p>
            </table:table-cell>
            <table:table-cell table:style-name="ce60" office:value-type="string" calcext:value-type="string">
              <text:p>report ++ m_depth</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6" office:value-type="string" calcext:value-type="string">
              <text:p>-</text:p>
            </table:table-cell>
            <table:table-cell table:style-name="ce156" office:value-type="float" office:value="0" calcext:value-type="float" table:number-columns-spanned="5" table:number-rows-spanned="1">
              <text:p>0</text:p>
            </table:table-cell>
            <table:covered-table-cell table:number-columns-repeated="3" table:style-name="ce170"/>
            <table:covered-table-cell table:style-name="ce156"/>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7">
            <table:table-cell table:number-columns-repeated="2"/>
            <table:table-cell table:style-name="ce15"/>
            <table:table-cell table:style-name="ce39" office:value-type="string" calcext:value-type="string">
              <text:p>if not clear ocean pressure and try again</text:p>
            </table:table-cell>
            <table:table-cell table:style-name="ce61" office:value-type="string" calcext:value-type="string">
              <text:p>zero_ocean_pressure</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7">
            <table:table-cell table:number-columns-repeated="2"/>
            <table:table-cell table:style-name="ce15"/>
            <table:table-cell table:style-name="ce40" office:value-type="string" calcext:value-type="string">
              <text:p>clear all reporting</text:p>
            </table:table-cell>
            <table:table-cell table:style-name="ce63" office:value-type="string" calcext:value-type="string">
              <text:p>report clearall</text:p>
            </table:table-cell>
            <table:table-cell table:style-name="ce84" table:content-validation-name="val1" office:value-type="string" calcext:value-type="string" table:number-columns-spanned="2" table:number-rows-spanned="1">
              <text:p>y</text:p>
            </table:table-cell>
            <table:covered-table-cell table:style-name="ce112" table:content-validation-name="val1"/>
            <table:table-cell table:style-name="ce139" office:value-type="string" calcext:value-type="string">
              <text:p>-</text:p>
            </table:table-cell>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1" office:value-type="string" calcext:value-type="string" table:number-columns-spanned="4" table:number-rows-spanned="1">
              <text:p>science</text:p>
            </table:table-cell>
            <table:covered-table-cell table:number-columns-repeated="3" table:style-name="ce36"/>
            <table:table-cell table:style-name="ce115" table:formula="of:=IF(COUNTIF([.F88:.G92];&quot;Y&quot;)+COUNTIF([.F88:.G92];&quot;na&quot;)+COUNTIF([.F88:.G92];&quot;n/a&quot;)=COUNTA([.F88:.G92]); &quot;Complete&quot;; &quot;Incomplete&quot;)" office:value-type="string" office:string-value="Incomplete" calcext:value-type="string">
              <text:p>Incomplete</text:p>
            </table:table-cell>
            <table:table-cell table:style-name="ce140"/>
            <table:table-cell table:style-name="ce159" table:number-columns-spanned="5" table:number-rows-spanned="1"/>
            <table:covered-table-cell table:number-columns-repeated="3" table:style-name="ce172"/>
            <table:covered-table-cell table:style-name="ce186"/>
            <table:table-cell table:style-name="ce192"/>
            <table:table-cell table:style-name="ce200" table:number-columns-repeated="2"/>
            <table:table-cell table:style-name="ce206"/>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44" office:value-type="string" calcext:value-type="string">
              <text:p>ensure science is sending files properly from gliderdos</text:p>
            </table:table-cell>
            <table:table-cell table:style-name="ce60" office:value-type="string" calcext:value-type="string">
              <text:p>szs config/proglets.dat</text:p>
            </table:table-cell>
            <table:table-cell table:style-name="ce87" table:content-validation-name="val1" office:value-type="string" calcext:value-type="string" table:number-columns-spanned="2" table:number-rows-spanned="1">
              <text:p>y</text:p>
            </table:table-cell>
            <table:covered-table-cell table:style-name="ce116" table:content-validation-name="val1"/>
            <table:table-cell table:style-name="ce136" office:value-type="string" calcext:value-type="string">
              <text:p>-</text:p>
            </table:table-cell>
            <table:table-cell table:style-name="ce156" table:number-columns-spanned="5" table:number-rows-spanned="1"/>
            <table:covered-table-cell table:number-columns-repeated="3" table:style-name="ce170"/>
            <table:covered-table-cell table:style-name="ce156"/>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11">
            <table:table-cell table:number-columns-repeated="2"/>
            <table:table-cell table:style-name="ce15"/>
            <table:table-cell table:style-name="ce39" office:value-type="string" calcext:value-type="string">
              <text:p>Get into consci and check you can talk directly to sci computer</text:p>
            </table:table-cell>
            <table:table-cell table:style-name="ce61" office:value-type="string" calcext:value-type="string">
              <text:p>consci</text:p>
            </table:table-cell>
            <table:table-cell table:style-name="ce87" table:content-validation-name="val1" office:value-type="string" calcext:value-type="string" table:number-columns-spanned="2" table:number-rows-spanned="1">
              <text:p>y</text:p>
            </table:table-cell>
            <table:covered-table-cell table:style-name="ce116"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39" office:value-type="string" calcext:value-type="string">
              <text:p>go back to gliderdos</text:p>
            </table:table-cell>
            <table:table-cell table:style-name="ce61" office:value-type="string" calcext:value-type="string">
              <text:p>quit</text:p>
            </table:table-cell>
            <table:table-cell table:style-name="ce87" table:content-validation-name="val1" office:value-type="string" calcext:value-type="string" table:number-columns-spanned="2" table:number-rows-spanned="1">
              <text:p>y</text:p>
            </table:table-cell>
            <table:covered-table-cell table:style-name="ce116"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39" office:value-type="string" calcext:value-type="string">
              <text:p>check all scince is reporting through gliderdos</text:p>
            </table:table-cell>
            <table:table-cell table:style-name="ce61" office:value-type="string" calcext:value-type="string">
              <text:p>loadmission sci_on.mi</text:p>
            </table:table-cell>
            <table:table-cell table:style-name="ce87" table:content-validation-name="val1" office:value-type="string" calcext:value-type="string" table:number-columns-spanned="2" table:number-rows-spanned="1">
              <text:p>n</text:p>
            </table:table-cell>
            <table:covered-table-cell table:style-name="ce116"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40" office:value-type="string" calcext:value-type="string">
              <text:p>once verified turn off</text:p>
            </table:table-cell>
            <table:table-cell table:style-name="ce63" office:value-type="string" calcext:value-type="string">
              <text:p>loadmission sci_off.mi</text:p>
            </table:table-cell>
            <table:table-cell table:style-name="ce87" table:content-validation-name="val1" office:value-type="string" calcext:value-type="string" table:number-columns-spanned="2" table:number-rows-spanned="1">
              <text:p>n</text:p>
            </table:table-cell>
            <table:covered-table-cell table:style-name="ce116" table:content-validation-name="val1"/>
            <table:table-cell table:style-name="ce139" office:value-type="string" calcext:value-type="string">
              <text:p>-</text:p>
            </table:table-cell>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1" office:value-type="string" calcext:value-type="string" table:number-columns-spanned="4" table:number-rows-spanned="1">
              <text:p>ejection weight recovery and ohm checks and glider shut down</text:p>
            </table:table-cell>
            <table:covered-table-cell table:number-columns-repeated="3" table:style-name="ce36"/>
            <table:table-cell table:style-name="ce108" table:formula="of:=IF(COUNTIF([.F94:.G130];&quot;Y&quot;)+COUNTIF([.F94:.G130];&quot;na&quot;)+COUNTIF([.F94:.G130];&quot;n/a&quot;)+COUNTIF([.F94:.G130];&quot;nothing&quot;)=COUNTA([.F94:.G130]); &quot;Complete&quot;; &quot;Incomplete&quot;)" office:value-type="string" office:string-value="Incomplete" calcext:value-type="string">
              <text:p>Incomplete</text:p>
            </table:table-cell>
            <table:table-cell table:style-name="ce140"/>
            <table:table-cell table:style-name="ce159" table:number-columns-spanned="5" table:number-rows-spanned="1"/>
            <table:covered-table-cell table:number-columns-repeated="3" table:style-name="ce172"/>
            <table:covered-table-cell table:style-name="ce186"/>
            <table:table-cell table:style-name="ce192"/>
            <table:table-cell table:style-name="ce200" table:number-columns-repeated="2"/>
            <table:table-cell table:style-name="ce206"/>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44" table:formula="of:=IF(fcp_location=&quot;field&quot;; &quot;-&quot;;&quot;turn off lab_mode&quot;)" office:value-type="string" office:string-value="turn off lab_mode" calcext:value-type="string">
              <text:p>turn off lab_mode</text:p>
            </table:table-cell>
            <table:table-cell table:style-name="ce60" table:formula="of:=IF(fcp_location=&quot;field&quot;;&quot;-&quot;;&quot;lab_mode off&quot;)" office:value-type="string" office:string-value="lab_mode off" calcext:value-type="string">
              <text:p>lab_mode off</text:p>
            </table:table-cell>
            <table:table-cell table:style-name="ce88" table:content-validation-name="val1" office:value-type="string" calcext:value-type="string" table:number-columns-spanned="2" table:number-rows-spanned="1">
              <text:p>y</text:p>
            </table:table-cell>
            <table:covered-table-cell table:style-name="ce117" table:content-validation-name="val1"/>
            <table:table-cell table:style-name="ce136" office:value-type="string" calcext:value-type="string">
              <text:p>-</text:p>
            </table:table-cell>
            <table:table-cell table:style-name="ce156" table:number-columns-spanned="5" table:number-rows-spanned="1"/>
            <table:covered-table-cell table:number-columns-repeated="3" table:style-name="ce170"/>
            <table:covered-table-cell table:style-name="ce156"/>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11">
            <table:table-cell table:number-columns-repeated="2"/>
            <table:table-cell table:style-name="ce15"/>
            <table:table-cell table:style-name="ce39" table:formula="of:=IF(fcp_location=&quot;field&quot;; &quot;-&quot;; &quot;put max time in gliderdos to 20 min&quot;)" office:value-type="string" office:string-value="put max time in gliderdos to 20 min" calcext:value-type="string">
              <text:p>put max time in gliderdos to 20 min</text:p>
            </table:table-cell>
            <table:table-cell table:style-name="ce61" table:formula="of:=IF(fcp_location=&quot;field&quot;;&quot;-&quot;; &quot;put u_max_time_in_gliderdos 1200&quot;)" office:value-type="string" office:string-value="put u_max_time_in_gliderdos 1200" calcext:value-type="string">
              <text:p>put u_max_time_in_gliderdos 1200</text:p>
            </table:table-cell>
            <table:table-cell table:style-name="ce88" table:content-validation-name="val1" office:value-type="string" calcext:value-type="string" table:number-columns-spanned="2" table:number-rows-spanned="1">
              <text:p>y</text:p>
            </table:table-cell>
            <table:covered-table-cell table:style-name="ce117"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39" office:value-type="string" calcext:value-type="string">
              <text:p>remove tail cowling</text:p>
            </table:table-cell>
            <table:table-cell table:style-name="ce61" office:value-type="string" calcext:value-type="string">
              <text:p>-</text:p>
            </table:table-cell>
            <table:table-cell table:style-name="ce88" table:content-validation-name="val1" office:value-type="string" calcext:value-type="string" table:number-columns-spanned="2" table:number-rows-spanned="1">
              <text:p>y</text:p>
            </table:table-cell>
            <table:covered-table-cell table:style-name="ce117"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39" table:formula="of:=IF(fcp_location=&quot;field&quot;; &quot;-&quot;;&quot;disconnect supply lead to ejection weight&quot;)" office:value-type="string" office:string-value="disconnect supply lead to ejection weight" calcext:value-type="string">
              <text:p>disconnect supply lead to ejection weight</text:p>
            </table:table-cell>
            <table:table-cell table:style-name="ce61" office:value-type="string" calcext:value-type="string">
              <text:p>-</text:p>
            </table:table-cell>
            <table:table-cell table:style-name="ce88" table:content-validation-name="val1" office:value-type="string" calcext:value-type="string" table:number-columns-spanned="2" table:number-rows-spanned="1">
              <text:p>y</text:p>
            </table:table-cell>
            <table:covered-table-cell table:style-name="ce117"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39" office:value-type="string" calcext:value-type="string">
              <text:p>remove nose cone</text:p>
            </table:table-cell>
            <table:table-cell table:style-name="ce61" office:value-type="string" calcext:value-type="string">
              <text:p>-</text:p>
            </table:table-cell>
            <table:table-cell table:style-name="ce88" table:content-validation-name="val1" office:value-type="string" calcext:value-type="string" table:number-columns-spanned="2" table:number-rows-spanned="1">
              <text:p>y</text:p>
            </table:table-cell>
            <table:covered-table-cell table:style-name="ce117"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40" table:formula="of:=IF(fcp_location=&quot;field&quot;; &quot;-&quot;; &quot;disconect lead for nose cone release&quot;)" office:value-type="string" office:string-value="disconect lead for nose cone release" calcext:value-type="string">
              <text:p>disconect lead for nose cone release</text:p>
            </table:table-cell>
            <table:table-cell table:style-name="ce63" office:value-type="string" calcext:value-type="string">
              <text:p>-</text:p>
            </table:table-cell>
            <table:table-cell table:style-name="ce88" table:content-validation-name="val1" office:value-type="string" calcext:value-type="string" table:number-columns-spanned="2" table:number-rows-spanned="1">
              <text:p>y</text:p>
            </table:table-cell>
            <table:covered-table-cell table:style-name="ce117" table:content-validation-name="val1"/>
            <table:table-cell table:style-name="ce139" office:value-type="string" calcext:value-type="string">
              <text:p>-</text:p>
            </table:table-cell>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45" office:value-type="string" calcext:value-type="string" table:number-columns-spanned="2" table:number-rows-spanned="1">
              <text:p>Altimeter on</text:p>
            </table:table-cell>
            <table:covered-table-cell table:style-name="ce42"/>
            <table:table-cell table:style-name="ce89" office:value-type="string" calcext:value-type="string" table:number-columns-spanned="2" table:number-rows-spanned="1">
              <text:p>nothing</text:p>
            </table:table-cell>
            <table:covered-table-cell table:style-name="ce118"/>
            <table:table-cell table:style-name="ce143"/>
            <table:table-cell table:style-name="ce160" table:number-columns-spanned="5" table:number-rows-spanned="1"/>
            <table:covered-table-cell table:number-columns-repeated="3" table:style-name="ce173"/>
            <table:covered-table-cell table:style-name="ce187"/>
            <table:table-cell table:style-name="ce195"/>
            <table:table-cell table:style-name="ce201" table:number-columns-repeated="2"/>
            <table:table-cell table:style-name="ce208"/>
            <table:table-cell table:number-columns-repeated="2"/>
            <table:table-cell table:style-name="ce211"/>
            <table:table-cell table:style-name="ce218"/>
            <table:table-cell table:number-columns-repeated="16363"/>
          </table:table-row>
          <table:table-row table:style-name="ro2">
            <table:table-cell table:number-columns-repeated="2"/>
            <table:table-cell table:style-name="ce15"/>
            <table:table-cell table:style-name="ce44" table:formula="of:=IF(glider_type=&quot;G2&quot;;&quot;-&quot;;&quot;Select altimeter type (type use to see) --&gt; &quot;)" office:value-type="string" office:string-value="Select altimeter type (type use to see) --&gt; " calcext:value-type="string">
              <text:p>Select altimeter type (type use to see) --&gt; </text:p>
            </table:table-cell>
            <table:table-cell table:style-name="ce66" table:formula="of:=IF(glider_type=&quot;G2&quot;;&quot;-&quot;;&quot;use&quot;)" office:value-type="string" office:string-value="use" calcext:value-type="string">
              <text:p>use</text:p>
            </table:table-cell>
            <table:table-cell table:style-name="ce88" table:content-validation-name="val1" table:formula="of:=IF([.H16]=&quot;G2&quot;; &quot;na&quot;; IF([.H16]=&quot;G3&quot;; &quot;n&quot;; &quot;na&quot;))" office:value-type="string" office:string-value="na" calcext:value-type="string" table:number-columns-spanned="2" table:number-rows-spanned="1">
              <text:p>na</text:p>
            </table:table-cell>
            <table:covered-table-cell table:style-name="ce117" table:content-validation-name="val1"/>
            <table:table-cell table:style-name="ce144" table:content-validation-name="val2" office:value-type="string" calcext:value-type="string">
              <text:p>altimeter-323</text:p>
            </table:table-cell>
            <table:table-cell table:style-name="ce156" table:formula="of:=IF(glider_type=&quot;G2&quot;;&quot; &quot;;&quot; &lt;-- select altimeter type&quot;)" office:value-type="string" office:string-value=" &lt;-- select altimeter type" calcext:value-type="string" table:number-columns-spanned="5" table:number-rows-spanned="1">
              <text:p><text:s/>&lt;-- select altimeter type</text:p>
            </table:table-cell>
            <table:covered-table-cell table:number-columns-repeated="3" table:style-name="ce170"/>
            <table:covered-table-cell table:style-name="ce156"/>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2">
            <table:table-cell table:number-columns-repeated="2"/>
            <table:table-cell table:style-name="ce15"/>
            <table:table-cell table:style-name="ce39" office:value-type="string" calcext:value-type="string">
              <text:p>turn on altimeter</text:p>
            </table:table-cell>
            <table:table-cell table:style-name="ce61" office:value-type="string" calcext:value-type="string">
              <text:p>put c_alt_time 0 </text:p>
            </table:table-cell>
            <table:table-cell table:style-name="ce88" table:content-validation-name="val1" office:value-type="string" calcext:value-type="string" table:number-columns-spanned="2" table:number-rows-spanned="1">
              <text:p>y</text:p>
            </table:table-cell>
            <table:covered-table-cell table:style-name="ce117"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11">
            <table:table-cell table:number-columns-repeated="2"/>
            <table:table-cell table:style-name="ce15"/>
            <table:table-cell table:style-name="ce39" office:value-type="string" calcext:value-type="string">
              <text:p>check altimeter voltage</text:p>
            </table:table-cell>
            <table:table-cell table:style-name="ce61" office:value-type="string" calcext:value-type="string">
              <text:p>report ++ m_altimeter_voltage</text:p>
            </table:table-cell>
            <table:table-cell table:style-name="ce88" table:content-validation-name="val1" office:value-type="string" calcext:value-type="string" table:number-columns-spanned="2" table:number-rows-spanned="1">
              <text:p>n/a</text:p>
            </table:table-cell>
            <table:covered-table-cell table:style-name="ce117" table:content-validation-name="val1"/>
            <table:table-cell table:style-name="ce137" office:value-type="string" calcext:value-type="string">
              <text:p>-</text:p>
            </table:table-cell>
            <table:table-cell table:style-name="ce161"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15">
            <table:table-cell table:number-columns-repeated="2"/>
            <table:table-cell table:style-name="ce15"/>
            <table:table-cell table:style-name="ce39" table:formula="of:=IF(altimeter_type=&quot;altimeter&quot;;&quot;-&quot;;IF(glider_type=&quot;G2&quot;;&quot;-&quot;;IF(altimeter_type=&quot;altimeter type?&quot;;&quot;select altimeter type&quot;;&quot;Turn Debug on&quot;)))" office:value-type="string" office:string-value="Turn Debug on" calcext:value-type="string">
              <text:p>Turn Debug on</text:p>
            </table:table-cell>
            <table:table-cell table:style-name="ce67" table:formula="of:=IF(altimeter_type=&quot;altimeter&quot;;&quot;-&quot;;IF(glider_type=&quot;G2&quot;;&quot;-&quot;;IF(altimeter_type=&quot;altimeter type?&quot;;&quot;select altimeter type&quot;;&quot;put u_alt_debug 1&quot;)))" office:value-type="string" office:string-value="put u_alt_debug 1" calcext:value-type="string">
              <text:p>put u_alt_debug 1</text:p>
            </table:table-cell>
            <table:table-cell table:style-name="ce88" table:content-validation-name="val1" office:value-type="string" calcext:value-type="string" table:number-columns-spanned="2" table:number-rows-spanned="1">
              <text:p>y</text:p>
            </table:table-cell>
            <table:covered-table-cell table:style-name="ce117"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2">
            <table:table-cell table:number-columns-repeated="2"/>
            <table:table-cell table:style-name="ce15"/>
            <table:table-cell table:style-name="ce40" table:formula="of:=IF(altimeter_type=&quot;altimeter_323&quot;;&quot;is debug reporting properly: ‘altimeter_232_power_on()’ , ‘altimeter_232_measure, received '$SDDPT……’ , and ‘altimeter_232_measure() RX valid message '$SDDPT……’ ?&quot;;&quot;-&quot;)" office:value-type="string" office:string-value="-" calcext:value-type="string">
              <text:p>-</text:p>
            </table:table-cell>
            <table:table-cell table:style-name="ce68" office:value-type="string" calcext:value-type="string">
              <text:p>-</text:p>
            </table:table-cell>
            <table:table-cell table:style-name="ce88" table:content-validation-name="val1" table:formula="of:=IF([.H16]=&quot;G2&quot;; &quot;na&quot;; IF([.H16]=&quot;G3&quot;; &quot;n&quot;; &quot;na&quot;))" office:value-type="string" office:string-value="na" calcext:value-type="string" table:number-columns-spanned="2" table:number-rows-spanned="1">
              <text:p>na</text:p>
            </table:table-cell>
            <table:covered-table-cell table:style-name="ce117" table:content-validation-name="val1"/>
            <table:table-cell table:style-name="ce139" office:value-type="string" calcext:value-type="string">
              <text:p>-</text:p>
            </table:table-cell>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2">
            <table:table-cell table:number-columns-repeated="2"/>
            <table:table-cell table:style-name="ce15"/>
            <table:table-cell table:style-name="ce45" office:value-type="string" calcext:value-type="string" table:number-columns-spanned="2" table:number-rows-spanned="1">
              <text:p>Recovery on</text:p>
            </table:table-cell>
            <table:covered-table-cell table:style-name="ce42"/>
            <table:table-cell table:style-name="ce89" office:value-type="string" calcext:value-type="string" table:number-columns-spanned="2" table:number-rows-spanned="1">
              <text:p>nothing</text:p>
            </table:table-cell>
            <table:covered-table-cell table:style-name="ce118"/>
            <table:table-cell table:style-name="ce143" office:value-type="string" calcext:value-type="string">
              <text:p>-</text:p>
            </table:table-cell>
            <table:table-cell table:style-name="ce160" table:number-columns-spanned="5" table:number-rows-spanned="1"/>
            <table:covered-table-cell table:number-columns-repeated="3" table:style-name="ce173"/>
            <table:covered-table-cell table:style-name="ce187"/>
            <table:table-cell table:style-name="ce195" office:value-type="string" calcext:value-type="string">
              <text:p>-</text:p>
            </table:table-cell>
            <table:table-cell table:number-columns-repeated="2" table:style-name="ce201" office:value-type="string" calcext:value-type="string">
              <text:p>-</text:p>
            </table:table-cell>
            <table:table-cell table:style-name="ce208"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46" table:formula="of:=IF(nose_installed=&quot;no&quot;; &quot;-&quot;;IF(fcp_location=&quot;lab&quot;;&quot;turn on recovery system&quot;;&quot;-&quot;))" office:value-type="string" office:string-value="turn on recovery system" calcext:value-type="string">
              <text:p>turn on recovery system</text:p>
            </table:table-cell>
            <table:table-cell table:style-name="ce69" table:formula="of:=IF(nose_installed=&quot;no&quot;; &quot;-&quot;;IF(fcp_location=&quot;lab&quot;;&quot;put c_recovery_on 1&quot;;&quot;-&quot;))" office:value-type="string" office:string-value="put c_recovery_on 1" calcext:value-type="string">
              <text:p>put c_recovery_on 1</text:p>
            </table:table-cell>
            <table:table-cell table:style-name="ce88" table:content-validation-name="val1" table:formula="of:=IF([.$H$20]=&quot;no&quot;;&quot;na&quot;;IF([.$H$15]=&quot;yes&quot;;&quot;na&quot;;&quot;n&quot;))" office:value-type="string" office:string-value="n" calcext:value-type="string" table:number-columns-spanned="2" table:number-rows-spanned="1">
              <text:p>n</text:p>
            </table:table-cell>
            <table:covered-table-cell table:style-name="ce117" table:content-validation-name="val1"/>
            <table:table-cell table:style-name="ce145" office:value-type="string" calcext:value-type="string">
              <text:p>-</text:p>
            </table:table-cell>
            <table:table-cell table:style-name="ce162" table:number-columns-spanned="5" table:number-rows-spanned="1"/>
            <table:covered-table-cell table:number-columns-repeated="3" table:style-name="ce174"/>
            <table:covered-table-cell table:style-name="ce188"/>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45" office:value-type="string" calcext:value-type="string" table:number-columns-spanned="2" table:number-rows-spanned="1">
              <text:p>Ejection weight on</text:p>
            </table:table-cell>
            <table:covered-table-cell table:style-name="ce42"/>
            <table:table-cell table:style-name="ce89" office:value-type="string" calcext:value-type="string" table:number-columns-spanned="2" table:number-rows-spanned="1">
              <text:p>nothing</text:p>
            </table:table-cell>
            <table:covered-table-cell table:style-name="ce118"/>
            <table:table-cell table:style-name="ce143" office:value-type="string" calcext:value-type="string">
              <text:p>-</text:p>
            </table:table-cell>
            <table:table-cell table:style-name="ce160" table:number-columns-spanned="5" table:number-rows-spanned="1"/>
            <table:covered-table-cell table:number-columns-repeated="3" table:style-name="ce173"/>
            <table:covered-table-cell table:style-name="ce187"/>
            <table:table-cell table:style-name="ce195" office:value-type="string" calcext:value-type="string">
              <text:p>-</text:p>
            </table:table-cell>
            <table:table-cell table:number-columns-repeated="2" table:style-name="ce201" office:value-type="string" calcext:value-type="string">
              <text:p>-</text:p>
            </table:table-cell>
            <table:table-cell table:style-name="ce208"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44" table:formula="of:=IF(fcp_location=&quot;lab&quot;;&quot;turn on drop weight system&quot;;&quot;-&quot;)" office:value-type="string" office:string-value="turn on drop weight system" calcext:value-type="string">
              <text:p>turn on drop weight system</text:p>
            </table:table-cell>
            <table:table-cell table:style-name="ce60" table:formula="of:=IF(fcp_location=&quot;lab&quot;;&quot;put c_weight_drop 1&quot;;&quot;-&quot;)" office:value-type="string" office:string-value="put c_weight_drop 1" calcext:value-type="string">
              <text:p>put c_weight_drop 1</text:p>
            </table:table-cell>
            <table:table-cell table:style-name="ce88" table:content-validation-name="val1" table:formula="of:=IF([.$H$15]=&quot;yes&quot;;&quot;na&quot;;&quot;n&quot;)" office:value-type="string" office:string-value="n" calcext:value-type="string" table:number-columns-spanned="2" table:number-rows-spanned="1">
              <text:p>n</text:p>
            </table:table-cell>
            <table:covered-table-cell table:style-name="ce117" table:content-validation-name="val1"/>
            <table:table-cell table:style-name="ce136" office:value-type="string" calcext:value-type="string">
              <text:p>-</text:p>
            </table:table-cell>
            <table:table-cell table:style-name="ce156" table:number-columns-spanned="5" table:number-rows-spanned="1"/>
            <table:covered-table-cell table:number-columns-repeated="3" table:style-name="ce170"/>
            <table:covered-table-cell table:style-name="ce156"/>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40" table:formula="of:=IF(fcp_location=&quot;lab&quot;;&quot;respond with y for yes&quot;;&quot;-&quot;)" office:value-type="string" office:string-value="respond with y for yes" calcext:value-type="string">
              <text:p>respond with y for yes</text:p>
            </table:table-cell>
            <table:table-cell table:style-name="ce63" table:formula="of:=IF(fcp_location=&quot;lab&quot;;&quot;y&quot;;&quot;-&quot;)" office:value-type="string" office:string-value="y" calcext:value-type="string">
              <text:p>y</text:p>
            </table:table-cell>
            <table:table-cell table:style-name="ce88" table:content-validation-name="val1" table:formula="of:=IF([.$H$15]=&quot;yes&quot;;&quot;na&quot;;&quot;n&quot;)" office:value-type="string" office:string-value="n" calcext:value-type="string" table:number-columns-spanned="2" table:number-rows-spanned="1">
              <text:p>n</text:p>
            </table:table-cell>
            <table:covered-table-cell table:style-name="ce117" table:content-validation-name="val1"/>
            <table:table-cell table:style-name="ce139" office:value-type="string" calcext:value-type="string">
              <text:p>-</text:p>
            </table:table-cell>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7">
            <table:table-cell table:number-columns-repeated="2"/>
            <table:table-cell table:style-name="ce15"/>
            <table:table-cell table:style-name="ce45" office:value-type="string" calcext:value-type="string" table:number-columns-spanned="2" table:number-rows-spanned="1">
              <text:p>Go to glider Checks</text:p>
            </table:table-cell>
            <table:covered-table-cell table:style-name="ce42"/>
            <table:table-cell table:style-name="ce89" office:value-type="string" calcext:value-type="string" table:number-columns-spanned="2" table:number-rows-spanned="1">
              <text:p>nothing</text:p>
            </table:table-cell>
            <table:covered-table-cell table:style-name="ce118"/>
            <table:table-cell table:style-name="ce143" office:value-type="string" calcext:value-type="string">
              <text:p>-</text:p>
            </table:table-cell>
            <table:table-cell table:style-name="ce160" table:number-columns-spanned="5" table:number-rows-spanned="1"/>
            <table:covered-table-cell table:number-columns-repeated="3" table:style-name="ce173"/>
            <table:covered-table-cell table:style-name="ce187"/>
            <table:table-cell table:style-name="ce195" office:value-type="string" calcext:value-type="string">
              <text:p>-</text:p>
            </table:table-cell>
            <table:table-cell table:number-columns-repeated="2" table:style-name="ce201" office:value-type="string" calcext:value-type="string">
              <text:p>-</text:p>
            </table:table-cell>
            <table:table-cell table:style-name="ce208" office:value-type="string" calcext:value-type="string">
              <text:p>-</text:p>
            </table:table-cell>
            <table:table-cell table:number-columns-repeated="2"/>
            <table:table-cell table:style-name="ce212"/>
            <table:table-cell table:style-name="ce218"/>
            <table:table-cell table:number-columns-repeated="16363"/>
          </table:table-row>
          <table:table-row table:style-name="ro16">
            <table:table-cell table:number-columns-repeated="2"/>
            <table:table-cell table:style-name="ce15"/>
            <table:table-cell table:style-name="ce44" office:value-type="string" calcext:value-type="string">
              <text:p>check resistance between fwd anode and pump / altimeter screw on G3 gliders, you may not get good connnection on the fwd screws, so you can use the aft anode. The values vary greatly between gliders. </text:p>
            </table:table-cell>
            <table:table-cell table:style-name="ce60" office:value-type="string" calcext:value-type="string">
              <text:p>-</text:p>
            </table:table-cell>
            <table:table-cell table:style-name="ce88" table:content-validation-name="val1" office:value-type="string" calcext:value-type="string" table:number-columns-spanned="2" table:number-rows-spanned="1">
              <text:p>n</text:p>
            </table:table-cell>
            <table:covered-table-cell table:style-name="ce117" table:content-validation-name="val1"/>
            <table:table-cell table:style-name="ce136" office:value-type="string" calcext:value-type="string">
              <text:p>-</text:p>
            </table:table-cell>
            <table:table-cell table:style-name="ce156" table:number-columns-spanned="5" table:number-rows-spanned="1"/>
            <table:covered-table-cell table:number-columns-repeated="3" table:style-name="ce170"/>
            <table:covered-table-cell table:style-name="ce156"/>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39" office:value-type="string" calcext:value-type="string">
              <text:p>Is altimeter clicking</text:p>
            </table:table-cell>
            <table:table-cell table:style-name="ce61" office:value-type="string" calcext:value-type="string">
              <text:p>-</text:p>
            </table:table-cell>
            <table:table-cell table:style-name="ce88" table:content-validation-name="val1" office:value-type="string" calcext:value-type="string" table:number-columns-spanned="2" table:number-rows-spanned="1">
              <text:p>y</text:p>
            </table:table-cell>
            <table:covered-table-cell table:style-name="ce117"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6363"/>
          </table:table-row>
          <table:table-row table:style-name="ro17">
            <table:table-cell table:number-columns-repeated="2"/>
            <table:table-cell table:style-name="ce15"/>
            <table:table-cell table:style-name="ce39" table:formula="of:=IF(nose_installed=&quot;no&quot;; &quot;-&quot;; IF(fcp_location=&quot;lab&quot;;&quot;verify recovery voltage &gt; 5V. Probe between lead and altimeter bracket screw&quot;;&quot;-&quot;))" office:value-type="string" office:string-value="verify recovery voltage &gt; 5V. Probe between lead and altimeter bracket screw" calcext:value-type="string">
              <text:p>verify recovery voltage &gt; 5V. Probe between lead and altimeter bracket screw</text:p>
            </table:table-cell>
            <table:table-cell table:style-name="ce61" office:value-type="string" calcext:value-type="string">
              <text:p>-</text:p>
            </table:table-cell>
            <table:table-cell table:style-name="ce88" table:content-validation-name="val1" table:formula="of:=IF(nose_installed=&quot;no&quot;; &quot;na&quot;; IF(fcp_location=&quot;lab&quot;;&quot;n&quot;;&quot;na&quot;))" office:value-type="string" office:string-value="n" calcext:value-type="string" table:number-columns-spanned="2" table:number-rows-spanned="1">
              <text:p>n</text:p>
            </table:table-cell>
            <table:covered-table-cell table:style-name="ce117" table:content-validation-name="val1"/>
            <table:table-cell table:style-name="ce137" office:value-type="string" calcext:value-type="string">
              <text:p>user input</text:p>
            </table:table-cell>
            <table:table-cell table:style-name="ce161" table:number-columns-spanned="5" table:number-rows-spanned="1"/>
            <table:covered-table-cell table:number-columns-repeated="3" table:style-name="ce175"/>
            <table:covered-table-cell table:style-name="ce161"/>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11">
            <table:table-cell table:number-columns-repeated="2"/>
            <table:table-cell table:style-name="ce15"/>
            <table:table-cell table:style-name="ce39" office:value-type="string" calcext:value-type="string">
              <text:p>check resistance between aft anode and screw for ejection weight mount. Resistance &lt; 10 Ω</text:p>
            </table:table-cell>
            <table:table-cell table:style-name="ce61" office:value-type="string" calcext:value-type="string">
              <text:p>-</text:p>
            </table:table-cell>
            <table:table-cell table:style-name="ce88" table:content-validation-name="val1" office:value-type="string" calcext:value-type="string" table:number-columns-spanned="2" table:number-rows-spanned="1">
              <text:p>n</text:p>
            </table:table-cell>
            <table:covered-table-cell table:style-name="ce117"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11">
            <table:table-cell table:number-columns-repeated="2"/>
            <table:table-cell table:style-name="ce15"/>
            <table:table-cell table:style-name="ce40" table:formula="of:=IF(fcp_location=&quot;field&quot;; &quot;-&quot;;&quot;verify ejection weight is &gt; 5V. Probe between lead from glider and tail boom screws&quot;)" office:value-type="string" office:string-value="verify ejection weight is &gt; 5V. Probe between lead from glider and tail boom screws" calcext:value-type="string">
              <text:p>verify ejection weight is &gt; 5V. Probe between lead from glider and tail boom screws</text:p>
            </table:table-cell>
            <table:table-cell table:style-name="ce63" office:value-type="string" calcext:value-type="string">
              <text:p>-</text:p>
            </table:table-cell>
            <table:table-cell table:style-name="ce88" table:content-validation-name="val1" office:value-type="string" calcext:value-type="string" table:number-columns-spanned="2" table:number-rows-spanned="1">
              <text:p>y</text:p>
            </table:table-cell>
            <table:covered-table-cell table:style-name="ce117" table:content-validation-name="val1"/>
            <table:table-cell table:style-name="ce139" office:value-type="string" calcext:value-type="string">
              <text:p>user input</text:p>
            </table:table-cell>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45" office:value-type="string" calcext:value-type="string" table:number-columns-spanned="2" table:number-rows-spanned="1">
              <text:p>Turn everything back off and exit glider</text:p>
            </table:table-cell>
            <table:covered-table-cell table:style-name="ce42"/>
            <table:table-cell table:style-name="ce89" office:value-type="string" calcext:value-type="string" table:number-columns-spanned="2" table:number-rows-spanned="1">
              <text:p>nothing</text:p>
            </table:table-cell>
            <table:covered-table-cell table:style-name="ce118"/>
            <table:table-cell table:style-name="ce143" office:value-type="string" calcext:value-type="string">
              <text:p>-</text:p>
            </table:table-cell>
            <table:table-cell table:style-name="ce160" table:number-columns-spanned="5" table:number-rows-spanned="1"/>
            <table:covered-table-cell table:number-columns-repeated="3" table:style-name="ce173"/>
            <table:covered-table-cell table:style-name="ce187"/>
            <table:table-cell table:style-name="ce195" office:value-type="string" calcext:value-type="string">
              <text:p>-</text:p>
            </table:table-cell>
            <table:table-cell table:number-columns-repeated="2" table:style-name="ce201" office:value-type="string" calcext:value-type="string">
              <text:p>-</text:p>
            </table:table-cell>
            <table:table-cell table:style-name="ce208"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44" office:value-type="string" calcext:value-type="string">
              <text:p>Turn altimeter off</text:p>
            </table:table-cell>
            <table:table-cell table:style-name="ce60" office:value-type="string" calcext:value-type="string">
              <text:p>put c_alt_time -1</text:p>
            </table:table-cell>
            <table:table-cell table:style-name="ce88" table:content-validation-name="val1" office:value-type="string" calcext:value-type="string" table:number-columns-spanned="2" table:number-rows-spanned="1">
              <text:p>y</text:p>
            </table:table-cell>
            <table:covered-table-cell table:style-name="ce117" table:content-validation-name="val1"/>
            <table:table-cell table:style-name="ce136" office:value-type="string" calcext:value-type="string">
              <text:p>-</text:p>
            </table:table-cell>
            <table:table-cell table:style-name="ce156" table:number-columns-spanned="5" table:number-rows-spanned="1"/>
            <table:covered-table-cell table:number-columns-repeated="3" table:style-name="ce170"/>
            <table:covered-table-cell table:style-name="ce156"/>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1"/>
            <table:table-cell table:style-name="ce223"/>
            <table:table-cell table:number-columns-repeated="16351"/>
          </table:table-row>
          <table:table-row table:style-name="ro2">
            <table:table-cell table:number-columns-repeated="2"/>
            <table:table-cell table:style-name="ce15"/>
            <table:table-cell table:style-name="ce39" table:formula="of:=IF(altimeter_type=&quot;altimeter-323&quot;;&quot;turn off altimeter debug&quot;;IF(glider_type=&quot;G2&quot;;&quot;-&quot;;IF(altimeter_type=&quot;altimeter type?&quot;;&quot;select altimeter type above&quot;;&quot;-&quot;)))" office:value-type="string" office:string-value="turn off altimeter debug" calcext:value-type="string">
              <text:p>turn off altimeter debug</text:p>
            </table:table-cell>
            <table:table-cell table:style-name="ce61" table:formula="of:=IF(altimeter_type=&quot;altimeter-323&quot;;&quot;put u_alt_debug 0&quot;;IF(glider_type=&quot;G2&quot;;&quot;-&quot;;IF(altimeter_type=&quot;altimeter type?&quot;;&quot;unknown&quot;;&quot;-&quot;)))" office:value-type="string" office:string-value="put u_alt_debug 0" calcext:value-type="string">
              <text:p>put u_alt_debug 0</text:p>
            </table:table-cell>
            <table:table-cell table:style-name="ce88" table:content-validation-name="val1" office:value-type="string" calcext:value-type="string" table:number-columns-spanned="2" table:number-rows-spanned="1">
              <text:p>y</text:p>
            </table:table-cell>
            <table:covered-table-cell table:style-name="ce117"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1"/>
            <table:table-cell table:style-name="ce218"/>
            <table:table-cell table:number-columns-repeated="12"/>
            <table:table-cell table:style-name="ce223"/>
            <table:table-cell table:number-columns-repeated="16350"/>
          </table:table-row>
          <table:table-row table:style-name="ro2">
            <table:table-cell table:number-columns-repeated="2"/>
            <table:table-cell table:style-name="ce15"/>
            <table:table-cell table:style-name="ce39" table:formula="of:=IF(nose_installed=&quot;no&quot;; &quot;-&quot;; IF(fcp_location=&quot;lab&quot;;&quot;turn off recovery system&quot;;&quot;-&quot;))" office:value-type="string" office:string-value="turn off recovery system" calcext:value-type="string">
              <text:p>turn off recovery system</text:p>
            </table:table-cell>
            <table:table-cell table:style-name="ce61" table:formula="of:=IF(nose_installed=&quot;no&quot;; &quot;-&quot;; IF(fcp_location=&quot;lab&quot;;&quot;put c_recovery_on 0&quot;;&quot;-&quot;))" office:value-type="string" office:string-value="put c_recovery_on 0" calcext:value-type="string">
              <text:p>put c_recovery_on 0</text:p>
            </table:table-cell>
            <table:table-cell table:style-name="ce88" table:content-validation-name="val1" office:value-type="string" calcext:value-type="string" table:number-columns-spanned="2" table:number-rows-spanned="1">
              <text:p>y</text:p>
            </table:table-cell>
            <table:covered-table-cell table:style-name="ce117"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39" table:formula="of:=IF(fcp_location=&quot;lab&quot;;&quot;turn off commanded weight ejection&quot;;&quot;-&quot;)" office:value-type="string" office:string-value="turn off commanded weight ejection" calcext:value-type="string">
              <text:p>turn off commanded weight ejection</text:p>
            </table:table-cell>
            <table:table-cell table:style-name="ce61" table:formula="of:=IF(fcp_location=&quot;lab&quot;;&quot;put c_weight_drop 0&quot;;&quot;-&quot;)" office:value-type="string" office:string-value="put c_weight_drop 0" calcext:value-type="string">
              <text:p>put c_weight_drop 0</text:p>
            </table:table-cell>
            <table:table-cell table:style-name="ce88" table:content-validation-name="val1" office:value-type="string" calcext:value-type="string" table:number-columns-spanned="2" table:number-rows-spanned="1">
              <text:p>y</text:p>
            </table:table-cell>
            <table:covered-table-cell table:style-name="ce117"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39" table:formula="of:=IF(fcp_location=&quot;lab&quot;;&quot;turn measured weight ejection back to 0&quot;;&quot;-&quot;)" office:value-type="string" office:string-value="turn measured weight ejection back to 0" calcext:value-type="string">
              <text:p>turn measured weight ejection back to 0</text:p>
            </table:table-cell>
            <table:table-cell table:style-name="ce61" table:formula="of:=IF(fcp_location=&quot;lab&quot;;&quot;put m_weight_drop 0&quot;;&quot;-&quot;)" office:value-type="string" office:string-value="put m_weight_drop 0" calcext:value-type="string">
              <text:p>put m_weight_drop 0</text:p>
            </table:table-cell>
            <table:table-cell table:style-name="ce88" table:content-validation-name="val1" office:value-type="string" calcext:value-type="string" table:number-columns-spanned="2" table:number-rows-spanned="1">
              <text:p>y</text:p>
            </table:table-cell>
            <table:covered-table-cell table:style-name="ce117"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39" office:value-type="string" calcext:value-type="string">
              <text:p>turn off logging</text:p>
            </table:table-cell>
            <table:table-cell table:style-name="ce61" office:value-type="string" calcext:value-type="string">
              <text:p>logging off</text:p>
            </table:table-cell>
            <table:table-cell table:style-name="ce88" table:content-validation-name="val1" office:value-type="string" calcext:value-type="string" table:number-columns-spanned="2" table:number-rows-spanned="1">
              <text:p>y</text:p>
            </table:table-cell>
            <table:covered-table-cell table:style-name="ce117"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17">
            <table:table-cell table:number-columns-repeated="2"/>
            <table:table-cell table:style-name="ce15"/>
            <table:table-cell table:style-name="ce39" table:formula="of:=IF(fcp_location=&quot;lab&quot;; IF(glider_type=&quot;G2&quot;;&quot;exit to picodos&quot;;&quot;exit to shelldos&quot;); &quot;exit gliderdos. NOTE: with exit command you will have 30 min to finish the next few steps&quot;)" office:value-type="string" office:string-value="exit to shelldos" calcext:value-type="string">
              <text:p>exit to shelldos</text:p>
            </table:table-cell>
            <table:table-cell table:style-name="ce61" table:formula="of:=IF(fcp_location=&quot;lab&quot;; IF(glider_type=&quot;G2&quot;;&quot;exit pico&quot;;&quot;exit shell&quot;); &quot;exit&quot;)" office:value-type="string" office:string-value="exit shell" calcext:value-type="string">
              <text:p>exit shell</text:p>
            </table:table-cell>
            <table:table-cell table:style-name="ce88" table:content-validation-name="val1" office:value-type="string" calcext:value-type="string" table:number-columns-spanned="2" table:number-rows-spanned="1">
              <text:p>y</text:p>
            </table:table-cell>
            <table:covered-table-cell table:style-name="ce117"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39" table:formula="of:=IF(nose_installed=&quot;no&quot;;&quot;-&quot;;IF(fcp_location=&quot;lab&quot;;&quot;verify nose recovery voltage is 0&quot;;&quot;-&quot;))" office:value-type="string" office:string-value="verify nose recovery voltage is 0" calcext:value-type="string">
              <text:p>verify nose recovery voltage is 0</text:p>
            </table:table-cell>
            <table:table-cell table:style-name="ce61" office:value-type="string" calcext:value-type="string">
              <text:p>-</text:p>
            </table:table-cell>
            <table:table-cell table:style-name="ce88" table:content-validation-name="val1" table:formula="of:=IF([.$H$20]=&quot;no&quot;;&quot;na&quot;;IF([.$H$15]=&quot;yes&quot;;&quot;na&quot;;&quot;n&quot;))" office:value-type="string" office:string-value="n" calcext:value-type="string" table:number-columns-spanned="2" table:number-rows-spanned="1">
              <text:p>n</text:p>
            </table:table-cell>
            <table:covered-table-cell table:style-name="ce117"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7">
            <table:table-cell table:number-columns-repeated="2"/>
            <table:table-cell table:style-name="ce15"/>
            <table:table-cell table:style-name="ce47" table:formula="of:=IF(nose_installed=&quot;no&quot;;&quot;-&quot;;IF(fcp_location=&quot;lab&quot;;&quot;CONFIRM RECOVERY LEAD IS CONNECTED&quot;;&quot;-&quot;))" office:value-type="string" office:string-value="CONFIRM RECOVERY LEAD IS CONNECTED" calcext:value-type="string">
              <text:p>CONFIRM RECOVERY LEAD IS CONNECTED</text:p>
            </table:table-cell>
            <table:table-cell table:style-name="ce61" office:value-type="string" calcext:value-type="string">
              <text:p>-</text:p>
            </table:table-cell>
            <table:table-cell table:style-name="ce88" table:content-validation-name="val1" table:formula="of:=IF([.$H$20]=&quot;no&quot;;&quot;na&quot;;&quot;n&quot;)" office:value-type="string" office:string-value="n" calcext:value-type="string" table:number-columns-spanned="2" table:number-rows-spanned="1">
              <text:p>n</text:p>
            </table:table-cell>
            <table:covered-table-cell table:style-name="ce117"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7">
            <table:table-cell table:number-columns-repeated="2"/>
            <table:table-cell table:style-name="ce15"/>
            <table:table-cell table:style-name="ce39" office:value-type="string" calcext:value-type="string">
              <text:p>Re-install nose cone</text:p>
            </table:table-cell>
            <table:table-cell table:style-name="ce61" office:value-type="string" calcext:value-type="string">
              <text:p>-</text:p>
            </table:table-cell>
            <table:table-cell table:style-name="ce88" table:content-validation-name="val1" table:formula="of:=IF([.$H$20]=&quot;no&quot;;&quot;na&quot;;&quot;n&quot;)" office:value-type="string" office:string-value="n" calcext:value-type="string" table:number-columns-spanned="2" table:number-rows-spanned="1">
              <text:p>n</text:p>
            </table:table-cell>
            <table:covered-table-cell table:style-name="ce117"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2">
            <table:table-cell table:number-columns-repeated="2"/>
            <table:table-cell table:style-name="ce15"/>
            <table:table-cell table:style-name="ce39" table:formula="of:=IF(fcp_location=&quot;lab&quot;;&quot;confirm ejection weight supply lead is 0V&quot;;&quot;-&quot;)" office:value-type="string" office:string-value="confirm ejection weight supply lead is 0V" calcext:value-type="string">
              <text:p>confirm ejection weight supply lead is 0V</text:p>
            </table:table-cell>
            <table:table-cell table:style-name="ce61" office:value-type="string" calcext:value-type="string">
              <text:p>-</text:p>
            </table:table-cell>
            <table:table-cell table:style-name="ce88" table:content-validation-name="val1" table:formula="of:=IF([.$H$15]=&quot;yes&quot;;&quot;na&quot;;&quot;n&quot;)" office:value-type="string" office:string-value="n" calcext:value-type="string" table:number-columns-spanned="2" table:number-rows-spanned="1">
              <text:p>n</text:p>
            </table:table-cell>
            <table:covered-table-cell table:style-name="ce117"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18">
            <table:table-cell table:number-columns-repeated="2"/>
            <table:table-cell table:style-name="ce15"/>
            <table:table-cell table:style-name="ce47" table:formula="of:=IF(fcp_location=&quot;lab&quot;;&quot;CONFIRM EJECTION LEAD IS CONNECTED&quot;;&quot;-&quot;)" office:value-type="string" office:string-value="CONFIRM EJECTION LEAD IS CONNECTED" calcext:value-type="string">
              <text:p>CONFIRM EJECTION LEAD IS CONNECTED</text:p>
            </table:table-cell>
            <table:table-cell table:style-name="ce61" office:value-type="string" calcext:value-type="string">
              <text:p>-</text:p>
            </table:table-cell>
            <table:table-cell table:style-name="ce88" table:content-validation-name="val1" office:value-type="string" calcext:value-type="string" table:number-columns-spanned="2" table:number-rows-spanned="1">
              <text:p>n</text:p>
            </table:table-cell>
            <table:covered-table-cell table:style-name="ce117"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 table:style-name="ro3">
            <table:table-cell table:number-columns-repeated="2"/>
            <table:table-cell table:style-name="ce15"/>
            <table:table-cell table:style-name="ce40" office:value-type="string" calcext:value-type="string">
              <text:p>Re-install cowling</text:p>
            </table:table-cell>
            <table:table-cell table:style-name="ce63" office:value-type="string" calcext:value-type="string">
              <text:p>-</text:p>
            </table:table-cell>
            <table:table-cell table:style-name="ce88" table:content-validation-name="val1" office:value-type="string" calcext:value-type="string" table:number-columns-spanned="2" table:number-rows-spanned="1">
              <text:p>n</text:p>
            </table:table-cell>
            <table:covered-table-cell table:style-name="ce117" table:content-validation-name="val1"/>
            <table:table-cell table:style-name="ce139" office:value-type="string" calcext:value-type="string">
              <text:p>-</text:p>
            </table:table-cell>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2"/>
            <table:table-cell table:style-name="ce218"/>
            <table:table-cell table:number-columns-repeated="16363"/>
          </table:table-row>
        </table:table-row-group>
        <table:table-row table:style-name="ro2">
          <table:table-cell table:number-columns-repeated="2"/>
          <table:table-cell table:style-name="ce16"/>
          <table:table-cell table:style-name="ce48" table:number-columns-repeated="2"/>
          <table:table-cell table:style-name="ce90" table:number-columns-repeated="2"/>
          <table:table-cell table:style-name="ce146"/>
          <table:table-cell table:style-name="ce163" table:number-columns-spanned="5" table:number-rows-spanned="1"/>
          <table:covered-table-cell table:number-columns-repeated="3" table:style-name="ce176"/>
          <table:covered-table-cell table:style-name="ce163"/>
          <table:table-cell table:style-name="ce196"/>
          <table:table-cell table:style-name="ce202" table:number-columns-repeated="2"/>
          <table:table-cell table:style-name="ce209"/>
          <table:table-cell table:number-columns-repeated="2"/>
          <table:table-cell table:style-name="ce213"/>
          <table:table-cell table:style-name="ce219"/>
          <table:table-cell table:number-columns-repeated="16363"/>
        </table:table-row>
        <table:table-row table:style-name="ro19">
          <table:table-cell table:number-columns-repeated="2"/>
          <table:table-cell table:style-name="ce10" table:formula="of:=[.D16]" office:value-type="string" office:string-value="Outdoor" calcext:value-type="string" table:number-columns-spanned="3" table:number-rows-spanned="1">
            <text:p>Outdoor</text:p>
          </table:table-cell>
          <table:covered-table-cell table:number-columns-repeated="2" table:style-name="ce35"/>
          <table:table-cell table:style-name="ce80" office:value-type="string" calcext:value-type="string">
            <text:p>Task Complete</text:p>
          </table:table-cell>
          <table:table-cell table:style-name="ce107" table:formula="of:=IF([.E16]=&quot;y&quot;;IF(AND([.G133]=&quot;complete&quot;;[.G144]=&quot;complete&quot;;[.G176]=&quot;complete&quot;); &quot;Section Complete&quot;; &quot;Section Incomplete&quot;);&quot;Section Complete&quot;)" office:value-type="string" office:string-value="Section Complete" calcext:value-type="string">
            <text:p>Section Complete</text:p>
          </table:table-cell>
          <table:table-cell table:style-name="ce80" office:value-type="string" calcext:value-type="string">
            <text:p>Extra</text:p>
          </table:table-cell>
          <table:table-cell table:style-name="ce154" office:value-type="string" calcext:value-type="string" table:number-columns-spanned="5" table:number-rows-spanned="1">
            <text:p>Comments</text:p>
          </table:table-cell>
          <table:covered-table-cell table:number-columns-repeated="3" table:style-name="ce80"/>
          <table:covered-table-cell table:style-name="ce154"/>
          <table:table-cell table:style-name="ce191"/>
          <table:table-cell table:style-name="ce199" table:number-columns-repeated="2"/>
          <table:table-cell table:style-name="ce205"/>
          <table:table-cell table:number-columns-repeated="2"/>
          <table:table-cell table:style-name="ce210" office:value-type="string" calcext:value-type="string" table:number-columns-spanned="2" table:number-rows-spanned="1">
            <text:p>COPY AND PASTE OUTDOOR WHERE DIALOG BELOW IN USER INPUT LINE</text:p>
          </table:table-cell>
          <table:covered-table-cell table:style-name="ce217"/>
          <table:table-cell table:number-columns-repeated="16363"/>
        </table:table-row>
        <table:table-row-group>
          <table:table-row table:style-name="ro10">
            <table:table-cell table:number-columns-repeated="2"/>
            <table:table-cell table:style-name="ce11" office:value-type="string" calcext:value-type="string" table:number-columns-spanned="4" table:number-rows-spanned="1">
              <text:p>setup and stabalze glider</text:p>
            </table:table-cell>
            <table:covered-table-cell table:number-columns-repeated="3" table:style-name="ce36"/>
            <table:table-cell table:style-name="ce108" table:formula="of:=IF(COUNTIF([.F134:.G143];&quot;Y&quot;)+COUNTIF([.F134:.G143];&quot;na&quot;)+COUNTIF([.F134:.G143];&quot;n/a&quot;)=COUNTA([.F134:.G143]); &quot;Complete&quot;; &quot;Incomplete&quot;)" office:value-type="string" office:string-value="Incomplete" calcext:value-type="string">
              <text:p>Incomplete</text:p>
            </table:table-cell>
            <table:table-cell table:style-name="ce135"/>
            <table:table-cell table:style-name="ce155" table:number-columns-spanned="5" table:number-rows-spanned="1"/>
            <table:covered-table-cell table:number-columns-repeated="3" table:style-name="ce169"/>
            <table:covered-table-cell table:style-name="ce155"/>
            <table:table-cell table:style-name="ce192"/>
            <table:table-cell table:style-name="ce200" table:number-columns-repeated="2"/>
            <table:table-cell table:style-name="ce206"/>
            <table:table-cell table:number-columns-repeated="2"/>
            <table:table-cell table:style-name="ce211" office:value-type="string" calcext:value-type="string">
              <text:p>USER INPUT</text:p>
            </table:table-cell>
            <table:table-cell table:style-name="ce220"/>
            <table:table-cell table:number-columns-repeated="16363"/>
          </table:table-row>
          <table:table-row table:style-name="ro2">
            <table:table-cell table:number-columns-repeated="2"/>
            <table:table-cell table:style-name="ce15"/>
            <table:table-cell table:style-name="ce44" office:value-type="string" calcext:value-type="string">
              <text:p>make sure glider is outdoor and has clear sight of sky</text:p>
            </table:table-cell>
            <table:table-cell table:style-name="ce60" office:value-type="string" calcext:value-type="string">
              <text:p><text:s/></text:p>
            </table:table-cell>
            <table:table-cell table:style-name="ce91" table:content-validation-name="val1" office:value-type="string" calcext:value-type="string" table:number-columns-spanned="2" table:number-rows-spanned="1">
              <text:p>n</text:p>
            </table:table-cell>
            <table:covered-table-cell table:style-name="ce119" table:content-validation-name="val1"/>
            <table:table-cell table:style-name="ce136" office:value-type="string" calcext:value-type="string">
              <text:p>Input surface log file name</text:p>
            </table:table-cell>
            <table:table-cell table:style-name="ce156" table:number-columns-spanned="5" table:number-rows-spanned="1"/>
            <table:covered-table-cell table:number-columns-repeated="3" table:style-name="ce170"/>
            <table:covered-table-cell table:style-name="ce156"/>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11">
            <table:table-cell table:number-columns-repeated="2"/>
            <table:table-cell table:style-name="ce15"/>
            <table:table-cell table:style-name="ce39" office:value-type="string" calcext:value-type="string">
              <text:p>Power on glider with green plug / run application from dos</text:p>
            </table:table-cell>
            <table:table-cell table:style-name="ce61" office:value-type="string" calcext:value-type="string">
              <text:p>app</text:p>
            </table:table-cell>
            <table:table-cell table:style-name="ce91" table:content-validation-name="val1" office:value-type="string" calcext:value-type="string" table:number-columns-spanned="2" table:number-rows-spanned="1">
              <text:p>n</text:p>
            </table:table-cell>
            <table:covered-table-cell table:style-name="ce119"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stabilise glider out of initial</text:p>
            </table:table-cell>
            <table:table-cell table:style-name="ce61" office:value-type="string" calcext:value-type="string">
              <text:p>ctrl-c</text:p>
            </table:table-cell>
            <table:table-cell table:style-name="ce91" table:content-validation-name="val1" office:value-type="string" calcext:value-type="string" table:number-columns-spanned="2" table:number-rows-spanned="1">
              <text:p>n</text:p>
            </table:table-cell>
            <table:covered-table-cell table:style-name="ce119"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turn on lab mode</text:p>
            </table:table-cell>
            <table:table-cell table:style-name="ce61" office:value-type="string" calcext:value-type="string">
              <text:p>lab_mode on</text:p>
            </table:table-cell>
            <table:table-cell table:style-name="ce91" table:content-validation-name="val1" office:value-type="string" calcext:value-type="string" table:number-columns-spanned="2" table:number-rows-spanned="1">
              <text:p>n</text:p>
            </table:table-cell>
            <table:covered-table-cell table:style-name="ce119"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turn off iridium</text:p>
            </table:table-cell>
            <table:table-cell table:style-name="ce61" office:value-type="string" calcext:value-type="string">
              <text:p>callback 30</text:p>
            </table:table-cell>
            <table:table-cell table:style-name="ce91" table:content-validation-name="val1" office:value-type="string" calcext:value-type="string" table:number-columns-spanned="2" table:number-rows-spanned="1">
              <text:p>n</text:p>
            </table:table-cell>
            <table:covered-table-cell table:style-name="ce119"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turn on logging</text:p>
            </table:table-cell>
            <table:table-cell table:style-name="ce61" office:value-type="string" calcext:value-type="string">
              <text:p>logging on</text:p>
            </table:table-cell>
            <table:table-cell table:style-name="ce91" table:content-validation-name="val1" office:value-type="string" calcext:value-type="string" table:number-columns-spanned="2" table:number-rows-spanned="1">
              <text:p>n</text:p>
            </table:table-cell>
            <table:covered-table-cell table:style-name="ce119"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note log file name</text:p>
            </table:table-cell>
            <table:table-cell table:style-name="ce61" office:value-type="string" calcext:value-type="string">
              <text:p><text:s/></text:p>
            </table:table-cell>
            <table:table-cell table:style-name="ce91" table:content-validation-name="val1" office:value-type="string" calcext:value-type="string" table:number-columns-spanned="2" table:number-rows-spanned="1">
              <text:p>n</text:p>
            </table:table-cell>
            <table:covered-table-cell table:style-name="ce119" table:content-validation-name="val1"/>
            <table:table-cell table:style-name="ce137" office:value-type="string" calcext:value-type="string">
              <text:p>input log file name</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check time</text:p>
            </table:table-cell>
            <table:table-cell table:style-name="ce61" office:value-type="string" calcext:value-type="string">
              <text:p>date</text:p>
            </table:table-cell>
            <table:table-cell table:style-name="ce91" table:content-validation-name="val1" office:value-type="string" calcext:value-type="string" table:number-columns-spanned="2" table:number-rows-spanned="1">
              <text:p>n</text:p>
            </table:table-cell>
            <table:covered-table-cell table:style-name="ce119"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type where and copy contents to the right</text:p>
            </table:table-cell>
            <table:table-cell table:style-name="ce61" office:value-type="string" calcext:value-type="string">
              <text:p>where</text:p>
            </table:table-cell>
            <table:table-cell table:style-name="ce92" table:content-validation-name="val1" office:value-type="string" calcext:value-type="string" table:number-columns-spanned="2" table:number-rows-spanned="1">
              <text:p>n</text:p>
            </table:table-cell>
            <table:covered-table-cell table:style-name="ce120"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40" office:value-type="string" calcext:value-type="string">
              <text:p>if time is off, sync time</text:p>
            </table:table-cell>
            <table:table-cell table:style-name="ce63" office:value-type="string" calcext:value-type="string">
              <text:p>sync_time</text:p>
            </table:table-cell>
            <table:table-cell table:style-name="ce91" table:content-validation-name="val1" office:value-type="string" calcext:value-type="string" table:number-columns-spanned="2" table:number-rows-spanned="1">
              <text:p>n</text:p>
            </table:table-cell>
            <table:covered-table-cell table:style-name="ce119" table:content-validation-name="val1"/>
            <table:table-cell table:style-name="ce139" office:value-type="string" calcext:value-type="string">
              <text:p>-</text:p>
            </table:table-cell>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1" office:value-type="string" calcext:value-type="string" table:number-columns-spanned="4" table:number-rows-spanned="1">
              <text:p>component checks </text:p>
            </table:table-cell>
            <table:covered-table-cell table:number-columns-repeated="3" table:style-name="ce36"/>
            <table:table-cell table:style-name="ce108" table:formula="of:=IF(COUNTIF([.F145:.G175];&quot;Y&quot;)+COUNTIF([.F145:.G175];&quot;na&quot;)+COUNTIF([.F145:.G175];&quot;n/a&quot;)+COUNTIF([.F145:.G175];&quot;nothing&quot;)=COUNTA([.F145:.G175]); &quot;Complete&quot;; &quot;Incomplete&quot;)" office:value-type="string" office:string-value="Incomplete" calcext:value-type="string">
              <text:p>Incomplete</text:p>
            </table:table-cell>
            <table:table-cell table:style-name="ce140"/>
            <table:table-cell table:style-name="ce159" table:number-columns-spanned="5" table:number-rows-spanned="1"/>
            <table:covered-table-cell table:number-columns-repeated="3" table:style-name="ce172"/>
            <table:covered-table-cell table:style-name="ce186"/>
            <table:table-cell table:style-name="ce192"/>
            <table:table-cell table:style-name="ce200" table:number-columns-repeated="2"/>
            <table:table-cell table:style-name="ce206"/>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43" office:value-type="string" calcext:value-type="string" table:number-columns-spanned="2" table:number-rows-spanned="1">
              <text:p>Attitude sensor</text:p>
            </table:table-cell>
            <table:covered-table-cell table:style-name="ce65"/>
            <table:table-cell table:style-name="ce93" office:value-type="string" calcext:value-type="string" table:number-columns-spanned="2" table:number-rows-spanned="1">
              <text:p>nothing</text:p>
            </table:table-cell>
            <table:covered-table-cell table:style-name="ce121"/>
            <table:table-cell table:style-name="ce143" office:value-type="string" calcext:value-type="string">
              <text:p>-</text:p>
            </table:table-cell>
            <table:table-cell table:style-name="ce160" table:number-columns-spanned="5" table:number-rows-spanned="1"/>
            <table:covered-table-cell table:number-columns-repeated="3" table:style-name="ce173"/>
            <table:covered-table-cell table:style-name="ce187"/>
            <table:table-cell table:style-name="ce195" office:value-type="string" calcext:value-type="string">
              <text:p>-</text:p>
            </table:table-cell>
            <table:table-cell table:number-columns-repeated="2" table:style-name="ce201" office:value-type="string" calcext:value-type="string">
              <text:p>-</text:p>
            </table:table-cell>
            <table:table-cell table:style-name="ce208"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44" office:value-type="string" calcext:value-type="string">
              <text:p>report heading and pitch </text:p>
            </table:table-cell>
            <table:table-cell table:style-name="ce60" office:value-type="string" calcext:value-type="string">
              <text:p>report ++ m_pitch m_heading</text:p>
            </table:table-cell>
            <table:table-cell table:style-name="ce94" table:content-validation-name="val1" office:value-type="string" calcext:value-type="string" table:number-columns-spanned="2" table:number-rows-spanned="1">
              <text:p>n</text:p>
            </table:table-cell>
            <table:covered-table-cell table:style-name="ce122" table:content-validation-name="val1"/>
            <table:table-cell table:style-name="ce136" office:value-type="string" calcext:value-type="string">
              <text:p>-</text:p>
            </table:table-cell>
            <table:table-cell table:style-name="ce156" table:number-columns-spanned="5" table:number-rows-spanned="1"/>
            <table:covered-table-cell table:number-columns-repeated="3" table:style-name="ce170"/>
            <table:covered-table-cell table:style-name="ce156"/>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11">
            <table:table-cell table:number-columns-repeated="2"/>
            <table:table-cell table:style-name="ce15"/>
            <table:table-cell table:style-name="ce39" table:formula="of:=IF(fcp_location=&quot;field&quot;;&quot;Check the reporting is acurate to what the glider is facing. NOTE that this may be off if on vessel&quot;;&quot;rotate glider 360 degrees and check that the heading is correct with declination&quot;)" office:value-type="string" office:string-value="rotate glider 360 degrees and check that the heading is correct with declination" calcext:value-type="string">
              <text:p>rotate glider 360 degrees and check that the heading is correct with declination</text:p>
            </table:table-cell>
            <table:table-cell table:style-name="ce61" office:value-type="string" calcext:value-type="string">
              <text:p>-</text:p>
            </table:table-cell>
            <table:table-cell table:style-name="ce94" table:content-validation-name="val1" office:value-type="string" calcext:value-type="string" table:number-columns-spanned="2" table:number-rows-spanned="1">
              <text:p>n</text:p>
            </table:table-cell>
            <table:covered-table-cell table:style-name="ce12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7"/>
            <table:table-cell table:style-name="ce40" office:value-type="string" calcext:value-type="string">
              <text:p>clear reporting</text:p>
            </table:table-cell>
            <table:table-cell table:style-name="ce63" office:value-type="string" calcext:value-type="string">
              <text:p>report clearall</text:p>
            </table:table-cell>
            <table:table-cell table:style-name="ce94" table:content-validation-name="val1" office:value-type="string" calcext:value-type="string" table:number-columns-spanned="2" table:number-rows-spanned="1">
              <text:p>n</text:p>
            </table:table-cell>
            <table:covered-table-cell table:style-name="ce122" table:content-validation-name="val1"/>
            <table:table-cell table:style-name="ce139" office:value-type="string" calcext:value-type="string">
              <text:p>-</text:p>
            </table:table-cell>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7">
            <table:table-cell table:number-columns-repeated="2"/>
            <table:table-cell table:style-name="ce15"/>
            <table:table-cell table:style-name="ce43" office:value-type="string" calcext:value-type="string" table:number-columns-spanned="2" table:number-rows-spanned="1">
              <text:p>Battery</text:p>
            </table:table-cell>
            <table:covered-table-cell table:style-name="ce65"/>
            <table:table-cell table:style-name="ce93" office:value-type="string" calcext:value-type="string" table:number-columns-spanned="2" table:number-rows-spanned="1">
              <text:p>nothing</text:p>
            </table:table-cell>
            <table:covered-table-cell table:style-name="ce121"/>
            <table:table-cell table:style-name="ce143" office:value-type="string" calcext:value-type="string">
              <text:p>-</text:p>
            </table:table-cell>
            <table:table-cell table:style-name="ce160" table:number-columns-spanned="5" table:number-rows-spanned="1"/>
            <table:covered-table-cell table:number-columns-repeated="3" table:style-name="ce173"/>
            <table:covered-table-cell table:style-name="ce187"/>
            <table:table-cell table:style-name="ce195" office:value-type="string" calcext:value-type="string">
              <text:p>-</text:p>
            </table:table-cell>
            <table:table-cell table:number-columns-repeated="2" table:style-name="ce201" office:value-type="string" calcext:value-type="string">
              <text:p>-</text:p>
            </table:table-cell>
            <table:table-cell table:style-name="ce208"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44" office:value-type="string" calcext:value-type="string">
              <text:p>Ensure battery voltage is correct with batteires supplied. </text:p>
            </table:table-cell>
            <table:table-cell table:style-name="ce60" office:value-type="string" calcext:value-type="string">
              <text:p>get m_battery</text:p>
            </table:table-cell>
            <table:table-cell table:style-name="ce94" table:content-validation-name="val1" office:value-type="string" calcext:value-type="string" table:number-columns-spanned="2" table:number-rows-spanned="1">
              <text:p>y</text:p>
            </table:table-cell>
            <table:covered-table-cell table:style-name="ce122" table:content-validation-name="val1"/>
            <table:table-cell table:style-name="ce141" table:formula="of:=IFERROR(VLOOKUP([.N150];[$hidden_lists.$S$2:.$T$70];2;FALSE());&quot;Not Found&quot;)" office:value-type="string" office:string-value="Not Found" calcext:value-type="string">
              <text:p>Not Found</text:p>
            </table:table-cell>
            <table:table-cell table:style-name="ce156" table:number-columns-spanned="5" table:number-rows-spanned="1"/>
            <table:covered-table-cell table:number-columns-repeated="3" table:style-name="ce170"/>
            <table:covered-table-cell table:style-name="ce156"/>
            <table:table-cell table:style-name="ce193" office:value-type="string" calcext:value-type="string">
              <text:p>m_battery</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Turn argos off</text:p>
            </table:table-cell>
            <table:table-cell table:style-name="ce61" office:value-type="string" calcext:value-type="string">
              <text:p>put c_argos_on 0</text:p>
            </table:table-cell>
            <table:table-cell table:style-name="ce94" table:content-validation-name="val1" office:value-type="string" calcext:value-type="string" table:number-columns-spanned="2" table:number-rows-spanned="1">
              <text:p>y</text:p>
            </table:table-cell>
            <table:covered-table-cell table:style-name="ce12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17">
            <table:table-cell table:number-columns-repeated="2"/>
            <table:table-cell table:style-name="ce15"/>
            <table:table-cell table:style-name="ce38" office:value-type="string" calcext:value-type="string">
              <text:p>Check battery current with nothing running is between 0.086 and 0.288</text:p>
            </table:table-cell>
            <table:table-cell table:style-name="ce61" office:value-type="string" calcext:value-type="string">
              <text:p>report ++ m_coulomb_current</text:p>
            </table:table-cell>
            <table:table-cell table:style-name="ce94" table:content-validation-name="val1" office:value-type="string" calcext:value-type="string" table:number-columns-spanned="2" table:number-rows-spanned="1">
              <text:p>y</text:p>
            </table:table-cell>
            <table:covered-table-cell table:style-name="ce122" table:content-validation-name="val1"/>
            <table:table-cell table:style-name="ce137" office:value-type="string" calcext:value-type="string">
              <text:p>user input</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0">
            <table:table-cell table:number-columns-repeated="2"/>
            <table:table-cell table:style-name="ce15"/>
            <table:table-cell table:style-name="ce39" table:formula="of:=IF(glider_type=&quot;G2&quot;; &quot;-&quot;; &quot;Check emergency battery voltage&quot;)" office:value-type="string" office:string-value="Check emergency battery voltage" calcext:value-type="string">
              <text:p>Check emergency battery voltage</text:p>
            </table:table-cell>
            <table:table-cell table:style-name="ce61" table:formula="of:=IF(glider_type=&quot;g2&quot;;&quot;-&quot;;&quot;get m_bms_emergency_battery_voltage&quot;)" office:value-type="string" office:string-value="get m_bms_emergency_battery_voltage" calcext:value-type="string">
              <text:p>get m_bms_emergency_battery_voltage</text:p>
            </table:table-cell>
            <table:table-cell table:style-name="ce94" table:content-validation-name="val1" office:value-type="string" calcext:value-type="string" table:number-columns-spanned="2" table:number-rows-spanned="1">
              <text:p>y</text:p>
            </table:table-cell>
            <table:covered-table-cell table:style-name="ce122" table:content-validation-name="val1"/>
            <table:table-cell table:style-name="ce137" office:value-type="string" calcext:value-type="string">
              <text:p>user input</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 table:style-name="ro20">
            <table:table-cell table:number-columns-repeated="2"/>
            <table:table-cell table:style-name="ce15"/>
            <table:table-cell table:style-name="ce39" table:formula="of:=IF(glider_type=&quot;G2&quot;; &quot;-&quot;; &quot;Verify BMS system is working corectly&quot;)" office:value-type="string" office:string-value="Verify BMS system is working corectly" calcext:value-type="string">
              <text:p>Verify BMS system is working corectly</text:p>
            </table:table-cell>
            <table:table-cell table:style-name="ce61" table:formula="of:=IF(glider_type=&quot;g2&quot;;&quot;-&quot;;&quot;report ++ m_bms_pitch_current m_bms_aft_current m_bms_ebay_current&quot;)" office:value-type="string" office:string-value="report ++ m_bms_pitch_current m_bms_aft_current m_bms_ebay_current" calcext:value-type="string">
              <text:p>report ++ m_bms_pitch_current m_bms_aft_current m_bms_ebay_current</text:p>
            </table:table-cell>
            <table:table-cell table:style-name="ce94" table:content-validation-name="val1" office:value-type="string" calcext:value-type="string" table:number-columns-spanned="2" table:number-rows-spanned="1">
              <text:p>y</text:p>
            </table:table-cell>
            <table:covered-table-cell table:style-name="ce12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 table:style-name="ro2">
            <table:table-cell table:number-columns-repeated="2"/>
            <table:table-cell table:style-name="ce15"/>
            <table:table-cell table:style-name="ce39" table:formula="of:=IF(glider_type=&quot;G2&quot;; &quot;-&quot;; &quot;pitch current okay? Record no load values&quot;)" office:value-type="string" office:string-value="pitch current okay? Record no load values" calcext:value-type="string">
              <text:p>pitch current okay? Record no load values</text:p>
            </table:table-cell>
            <table:table-cell table:style-name="ce61" office:value-type="string" calcext:value-type="string">
              <text:p>-</text:p>
            </table:table-cell>
            <table:table-cell table:style-name="ce94" table:content-validation-name="val1" office:value-type="string" calcext:value-type="string" table:number-columns-spanned="2" table:number-rows-spanned="1">
              <text:p>y</text:p>
            </table:table-cell>
            <table:covered-table-cell table:style-name="ce122" table:content-validation-name="val1"/>
            <table:table-cell table:style-name="ce137" office:value-type="string" calcext:value-type="string">
              <text:p>user input</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 table:style-name="ro7">
            <table:table-cell table:number-columns-repeated="2"/>
            <table:table-cell table:style-name="ce15"/>
            <table:table-cell table:style-name="ce39" table:formula="of:=IF(glider_type=&quot;G2&quot;; &quot;-&quot;; &quot;aft current okay? Record no load values&quot;)" office:value-type="string" office:string-value="aft current okay? Record no load values" calcext:value-type="string">
              <text:p>aft current okay? Record no load values</text:p>
            </table:table-cell>
            <table:table-cell table:style-name="ce61" office:value-type="string" calcext:value-type="string">
              <text:p>-</text:p>
            </table:table-cell>
            <table:table-cell table:style-name="ce94" table:content-validation-name="val1" office:value-type="string" calcext:value-type="string" table:number-columns-spanned="2" table:number-rows-spanned="1">
              <text:p>y</text:p>
            </table:table-cell>
            <table:covered-table-cell table:style-name="ce122" table:content-validation-name="val1"/>
            <table:table-cell table:style-name="ce137" office:value-type="string" calcext:value-type="string">
              <text:p>user input</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 table:style-name="ro2">
            <table:table-cell table:number-columns-repeated="2"/>
            <table:table-cell table:style-name="ce15"/>
            <table:table-cell table:style-name="ce39" table:formula="of:=IF(glider_type=&quot;G2&quot;; &quot;-&quot;; &quot;ebay current okay? Record no load values&quot;)" office:value-type="string" office:string-value="ebay current okay? Record no load values" calcext:value-type="string">
              <text:p>ebay current okay? Record no load values</text:p>
            </table:table-cell>
            <table:table-cell table:style-name="ce61" office:value-type="string" calcext:value-type="string">
              <text:p>-</text:p>
            </table:table-cell>
            <table:table-cell table:style-name="ce94" table:content-validation-name="val1" office:value-type="string" calcext:value-type="string" table:number-columns-spanned="2" table:number-rows-spanned="1">
              <text:p>y</text:p>
            </table:table-cell>
            <table:covered-table-cell table:style-name="ce122" table:content-validation-name="val1"/>
            <table:table-cell table:style-name="ce137" office:value-type="string" calcext:value-type="string">
              <text:p>user input</text:p>
            </table:table-cell>
            <table:table-cell table:number-columns-repeated="5"/>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shift ballast to 0</text:p>
            </table:table-cell>
            <table:table-cell table:style-name="ce61" table:formula="of:=IF(OR(pump_type=50;pump_type=200);&quot;put c_ballast_pumped 0&quot;; &quot;put c_de_oil_vol 0&quot;)" office:value-type="string" office:string-value="put c_de_oil_vol 0" calcext:value-type="string">
              <text:p>put c_de_oil_vol 0</text:p>
            </table:table-cell>
            <table:table-cell table:style-name="ce94" table:content-validation-name="val1" office:value-type="string" calcext:value-type="string" table:number-columns-spanned="2" table:number-rows-spanned="1">
              <text:p>y</text:p>
            </table:table-cell>
            <table:covered-table-cell table:style-name="ce123"/>
            <table:table-cell table:style-name="ce137"/>
            <table:table-cell table:style-name="ce157" table:number-columns-spanned="5" table:number-rows-spanned="1"/>
            <table:covered-table-cell table:number-columns-repeated="3" table:style-name="ce171"/>
            <table:covered-table-cell table:style-name="ce157"/>
            <table:table-cell table:style-name="ce193"/>
            <table:table-cell table:number-columns-repeated="2"/>
            <table:table-cell table:style-name="ce207"/>
            <table:table-cell table:number-columns-repeated="2"/>
            <table:table-cell table:style-name="ce215"/>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check current under load, looks okay? </text:p>
            </table:table-cell>
            <table:table-cell table:style-name="ce61" table:formula="of:=IF(OR(pump_type=50;pump_type=200);&quot;put c_ballast_pumped 1000&quot;; &quot;put c_de_oil_vol 1000&quot;)" office:value-type="string" office:string-value="put c_de_oil_vol 1000" calcext:value-type="string">
              <text:p>put c_de_oil_vol 1000</text:p>
            </table:table-cell>
            <table:table-cell table:style-name="ce94" table:content-validation-name="val1" office:value-type="string" calcext:value-type="string" table:number-columns-spanned="2" table:number-rows-spanned="1">
              <text:p>y</text:p>
            </table:table-cell>
            <table:covered-table-cell table:style-name="ce12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Clear all reporting</text:p>
            </table:table-cell>
            <table:table-cell table:style-name="ce61" office:value-type="string" calcext:value-type="string">
              <text:p>report clearall</text:p>
            </table:table-cell>
            <table:table-cell table:style-name="ce94" table:content-validation-name="val1" office:value-type="string" calcext:value-type="string" table:number-columns-spanned="2" table:number-rows-spanned="1">
              <text:p>y</text:p>
            </table:table-cell>
            <table:covered-table-cell table:style-name="ce122" table:content-validation-name="val1"/>
            <table:table-cell table:style-name="ce137" office:value-type="string" calcext:value-type="string">
              <text:p>-</text:p>
            </table:table-cell>
            <table:table-cell table:number-columns-repeated="5"/>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 table:style-name="ro21">
            <table:table-cell table:number-columns-repeated="2"/>
            <table:table-cell table:style-name="ce15"/>
            <table:table-cell table:style-name="ce39" table:formula="of:=IF(glider_type=&quot;G2&quot;; &quot;-&quot;; &quot;verify emergency BMS battery volatge &quot;)" office:value-type="string" office:string-value="verify emergency BMS battery volatge " calcext:value-type="string">
              <text:p>verify emergency BMS battery volatge </text:p>
            </table:table-cell>
            <table:table-cell table:style-name="ce61" table:formula="of:=IF(glider_type=&quot;g2&quot;;&quot;-&quot;;&quot;get m_bms_emergency_battery_voltage&quot;)" office:value-type="string" office:string-value="get m_bms_emergency_battery_voltage" calcext:value-type="string">
              <text:p>get m_bms_emergency_battery_voltage</text:p>
            </table:table-cell>
            <table:table-cell table:style-name="ce94" table:content-validation-name="val1" table:formula="of:=IF([.H16]=&quot;G2&quot;; &quot;na&quot;; IF([.H16]=&quot;G3&quot;; &quot;n&quot;; &quot;na&quot;))" office:value-type="string" office:string-value="na" calcext:value-type="string" table:number-columns-spanned="2" table:number-rows-spanned="1">
              <text:p>na</text:p>
            </table:table-cell>
            <table:covered-table-cell table:style-name="ce12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 table:style-name="ro12">
            <table:table-cell table:number-columns-repeated="2"/>
            <table:table-cell table:style-name="ce15"/>
            <table:table-cell table:style-name="ce39" office:value-type="string" calcext:value-type="string">
              <text:p>assuming battery coulomb amphr was set to 0 when first installed, check coulomb amphor is increasing porperly.</text:p>
            </table:table-cell>
            <table:table-cell table:style-name="ce61" office:value-type="string" calcext:value-type="string">
              <text:p>get m_coulomb_amphr_total</text:p>
            </table:table-cell>
            <table:table-cell table:style-name="ce94" table:content-validation-name="val1" office:value-type="string" calcext:value-type="string" table:number-columns-spanned="2" table:number-rows-spanned="1">
              <text:p>y</text:p>
            </table:table-cell>
            <table:covered-table-cell table:style-name="ce122" table:content-validation-name="val1"/>
            <table:table-cell table:style-name="ce138" table:formula="of:=IFERROR(VLOOKUP([.N162];[$hidden_lists.$S$2:.$T$70];2;FALSE());&quot;Not Found&quot;)" office:value-type="string" office:string-value="Not Found" calcext:value-type="string">
              <text:p>Not Found</text:p>
            </table:table-cell>
            <table:table-cell table:style-name="ce164" table:number-columns-spanned="5" table:number-rows-spanned="1"/>
            <table:covered-table-cell table:number-columns-repeated="3" table:style-name="ce177"/>
            <table:covered-table-cell table:style-name="ce164"/>
            <table:table-cell table:style-name="ce193" office:value-type="string" calcext:value-type="string">
              <text:p>m_coulomb_amphr_total</text:p>
            </table:table-cell>
            <table:table-cell table:formula="of:=IFERROR([.H162]-[.H50]; &quot;not yet input&quot;)" office:value-type="string" office:string-value="not yet input" calcext:value-type="string">
              <text:p>not yet input</text:p>
            </table:table-cell>
            <table:table-cell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 table:style-name="ro9">
            <table:table-cell table:number-columns-repeated="2"/>
            <table:table-cell table:style-name="ce15"/>
            <table:table-cell table:style-name="ce40" office:value-type="string" calcext:value-type="string">
              <text:p>check battery capacity is correctly recorded. If not change autoexec.mi </text:p>
            </table:table-cell>
            <table:table-cell table:style-name="ce70" office:value-type="string" calcext:value-type="string">
              <text:p>get f_coulomb_battery_capacity</text:p>
            </table:table-cell>
            <table:table-cell table:style-name="ce94" table:content-validation-name="val1" office:value-type="string" calcext:value-type="string" table:number-columns-spanned="2" table:number-rows-spanned="1">
              <text:p>y</text:p>
            </table:table-cell>
            <table:covered-table-cell table:style-name="ce122" table:content-validation-name="val1"/>
            <table:table-cell table:style-name="ce139" office:value-type="string" calcext:value-type="string">
              <text:p>-</text:p>
            </table:table-cell>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 table:style-name="ro2">
            <table:table-cell table:number-columns-repeated="2"/>
            <table:table-cell table:style-name="ce17"/>
            <table:table-cell table:style-name="ce43" office:value-type="string" calcext:value-type="string" table:number-columns-spanned="2" table:number-rows-spanned="1">
              <text:p>GPS sensor</text:p>
            </table:table-cell>
            <table:covered-table-cell table:style-name="ce65"/>
            <table:table-cell table:style-name="ce93" office:value-type="string" calcext:value-type="string" table:number-columns-spanned="2" table:number-rows-spanned="1">
              <text:p>nothing</text:p>
            </table:table-cell>
            <table:covered-table-cell table:style-name="ce121"/>
            <table:table-cell table:style-name="ce143" office:value-type="string" calcext:value-type="string">
              <text:p>-</text:p>
            </table:table-cell>
            <table:table-cell table:style-name="ce160" table:number-columns-spanned="5" table:number-rows-spanned="1"/>
            <table:covered-table-cell table:number-columns-repeated="3" table:style-name="ce173"/>
            <table:covered-table-cell table:style-name="ce187"/>
            <table:table-cell table:style-name="ce195" office:value-type="string" calcext:value-type="string">
              <text:p>-</text:p>
            </table:table-cell>
            <table:table-cell table:number-columns-repeated="2" table:style-name="ce201" office:value-type="string" calcext:value-type="string">
              <text:p>-</text:p>
            </table:table-cell>
            <table:table-cell table:style-name="ce208" office:value-type="string" calcext:value-type="string">
              <text:p>-</text:p>
            </table:table-cell>
            <table:table-cell table:number-columns-repeated="2"/>
            <table:table-cell table:style-name="ce215"/>
            <table:table-cell table:style-name="ce220"/>
            <table:table-cell table:number-columns-repeated="16363"/>
          </table:table-row>
          <table:table-row table:style-name="ro2">
            <table:table-cell table:number-columns-repeated="2"/>
            <table:table-cell table:style-name="ce15"/>
            <table:table-cell table:style-name="ce44" office:value-type="string" calcext:value-type="string">
              <text:p>turn on gps to verbose</text:p>
            </table:table-cell>
            <table:table-cell table:style-name="ce60" office:value-type="string" calcext:value-type="string">
              <text:p>put c_gps_on 3</text:p>
            </table:table-cell>
            <table:table-cell table:style-name="ce94" table:content-validation-name="val1" office:value-type="string" calcext:value-type="string" table:number-columns-spanned="2" table:number-rows-spanned="1">
              <text:p>n</text:p>
            </table:table-cell>
            <table:covered-table-cell table:style-name="ce122" table:content-validation-name="val1"/>
            <table:table-cell table:style-name="ce136" office:value-type="string" calcext:value-type="string">
              <text:p>-</text:p>
            </table:table-cell>
            <table:table-cell table:style-name="ce156" table:number-columns-spanned="5" table:number-rows-spanned="1"/>
            <table:covered-table-cell table:number-columns-repeated="3" table:style-name="ce170"/>
            <table:covered-table-cell table:style-name="ce156"/>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verify gps fix within 2 min</text:p>
            </table:table-cell>
            <table:table-cell table:style-name="ce61" office:value-type="string" calcext:value-type="string">
              <text:p>-</text:p>
            </table:table-cell>
            <table:table-cell table:style-name="ce94" table:content-validation-name="val1" office:value-type="string" calcext:value-type="string" table:number-columns-spanned="2" table:number-rows-spanned="1">
              <text:p>n</text:p>
            </table:table-cell>
            <table:covered-table-cell table:style-name="ce12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verify correct gps position </text:p>
            </table:table-cell>
            <table:table-cell table:style-name="ce61" office:value-type="string" calcext:value-type="string">
              <text:p>-</text:p>
            </table:table-cell>
            <table:table-cell table:style-name="ce94" table:content-validation-name="val1" office:value-type="string" calcext:value-type="string" table:number-columns-spanned="2" table:number-rows-spanned="1">
              <text:p>n</text:p>
            </table:table-cell>
            <table:covered-table-cell table:style-name="ce12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40" office:value-type="string" calcext:value-type="string">
              <text:p>turn off gps from verbose</text:p>
            </table:table-cell>
            <table:table-cell table:style-name="ce63" office:value-type="string" calcext:value-type="string">
              <text:p>put c_gps_on 1</text:p>
            </table:table-cell>
            <table:table-cell table:style-name="ce94" table:content-validation-name="val1" office:value-type="string" calcext:value-type="string" table:number-columns-spanned="2" table:number-rows-spanned="1">
              <text:p>n</text:p>
            </table:table-cell>
            <table:covered-table-cell table:style-name="ce122" table:content-validation-name="val1"/>
            <table:table-cell table:style-name="ce139" office:value-type="string" calcext:value-type="string">
              <text:p>-</text:p>
            </table:table-cell>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43" office:value-type="string" calcext:value-type="string" table:number-columns-spanned="2" table:number-rows-spanned="1">
              <text:p>iridium checks</text:p>
            </table:table-cell>
            <table:covered-table-cell table:style-name="ce65"/>
            <table:table-cell table:style-name="ce93" office:value-type="string" calcext:value-type="string" table:number-columns-spanned="2" table:number-rows-spanned="1">
              <text:p>nothing</text:p>
            </table:table-cell>
            <table:covered-table-cell table:style-name="ce121"/>
            <table:table-cell table:style-name="ce143" office:value-type="string" calcext:value-type="string">
              <text:p>-</text:p>
            </table:table-cell>
            <table:table-cell table:style-name="ce160" table:number-columns-spanned="5" table:number-rows-spanned="1"/>
            <table:covered-table-cell table:number-columns-repeated="3" table:style-name="ce173"/>
            <table:covered-table-cell table:style-name="ce187"/>
            <table:table-cell table:style-name="ce195" office:value-type="string" calcext:value-type="string">
              <text:p>-</text:p>
            </table:table-cell>
            <table:table-cell table:number-columns-repeated="2" table:style-name="ce201" office:value-type="string" calcext:value-type="string">
              <text:p>-</text:p>
            </table:table-cell>
            <table:table-cell table:style-name="ce208"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44" office:value-type="string" calcext:value-type="string">
              <text:p>turn off scripts on main and backup SFMC servers</text:p>
            </table:table-cell>
            <table:table-cell table:style-name="ce60" office:value-type="string" calcext:value-type="string">
              <text:p>-</text:p>
            </table:table-cell>
            <table:table-cell table:style-name="ce94" table:content-validation-name="val1" office:value-type="string" calcext:value-type="string" table:number-columns-spanned="2" table:number-rows-spanned="1">
              <text:p>n</text:p>
            </table:table-cell>
            <table:covered-table-cell table:style-name="ce122" table:content-validation-name="val1"/>
            <table:table-cell table:style-name="ce136" office:value-type="string" calcext:value-type="string">
              <text:p>-</text:p>
            </table:table-cell>
            <table:table-cell table:style-name="ce156" table:number-columns-spanned="5" table:number-rows-spanned="1"/>
            <table:covered-table-cell table:number-columns-repeated="3" table:style-name="ce170"/>
            <table:covered-table-cell table:style-name="ce156"/>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call primary server</text:p>
            </table:table-cell>
            <table:table-cell table:style-name="ce61" office:value-type="string" calcext:value-type="string">
              <text:p>callback 0 0</text:p>
            </table:table-cell>
            <table:table-cell table:style-name="ce94" table:content-validation-name="val1" office:value-type="string" calcext:value-type="string" table:number-columns-spanned="2" table:number-rows-spanned="1">
              <text:p>n</text:p>
            </table:table-cell>
            <table:covered-table-cell table:style-name="ce12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verify iridium call in</text:p>
            </table:table-cell>
            <table:table-cell table:style-name="ce61" office:value-type="string" calcext:value-type="string">
              <text:p>-</text:p>
            </table:table-cell>
            <table:table-cell table:style-name="ce94" table:content-validation-name="val1" office:value-type="string" calcext:value-type="string" table:number-columns-spanned="2" table:number-rows-spanned="1">
              <text:p>n</text:p>
            </table:table-cell>
            <table:covered-table-cell table:style-name="ce12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call backup server</text:p>
            </table:table-cell>
            <table:table-cell table:style-name="ce61" office:value-type="string" calcext:value-type="string">
              <text:p>callback 0 1</text:p>
            </table:table-cell>
            <table:table-cell table:style-name="ce94" table:content-validation-name="val1" office:value-type="string" calcext:value-type="string" table:number-columns-spanned="2" table:number-rows-spanned="1">
              <text:p>n</text:p>
            </table:table-cell>
            <table:covered-table-cell table:style-name="ce12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verify iridium call in</text:p>
            </table:table-cell>
            <table:table-cell table:style-name="ce61" office:value-type="string" calcext:value-type="string">
              <text:p>-</text:p>
            </table:table-cell>
            <table:table-cell table:style-name="ce94" table:content-validation-name="val1" office:value-type="string" calcext:value-type="string" table:number-columns-spanned="2" table:number-rows-spanned="1">
              <text:p>n</text:p>
            </table:table-cell>
            <table:covered-table-cell table:style-name="ce122"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 table:style-name="ro2">
            <table:table-cell table:number-columns-repeated="2"/>
            <table:table-cell table:style-name="ce15"/>
            <table:table-cell table:style-name="ce40" office:value-type="string" calcext:value-type="string">
              <text:p>turn off iridium</text:p>
            </table:table-cell>
            <table:table-cell table:style-name="ce63" office:value-type="string" calcext:value-type="string">
              <text:p>callback 30</text:p>
            </table:table-cell>
            <table:table-cell table:style-name="ce94" table:content-validation-name="val1" office:value-type="string" calcext:value-type="string" table:number-columns-spanned="2" table:number-rows-spanned="1">
              <text:p>n</text:p>
            </table:table-cell>
            <table:covered-table-cell table:style-name="ce122" table:content-validation-name="val1"/>
            <table:table-cell table:style-name="ce139" office:value-type="string" calcext:value-type="string">
              <text:p>-</text:p>
            </table:table-cell>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 table:style-name="ro2">
            <table:table-cell table:number-columns-repeated="2"/>
            <table:table-cell table:style-name="ce11" office:value-type="string" calcext:value-type="string" table:number-columns-spanned="4" table:number-rows-spanned="1">
              <text:p>status and house keeping</text:p>
            </table:table-cell>
            <table:covered-table-cell table:number-columns-repeated="3" table:style-name="ce36"/>
            <table:table-cell table:style-name="ce108" table:formula="of:=IF(COUNTIF([.F177:.G189];&quot;Y&quot;)+COUNTIF([.F177:.G189];&quot;na&quot;)+COUNTIF([.F177:.G189];&quot;n/a&quot;)=COUNTA([.F177:.G189]); &quot;Complete&quot;; &quot;Incomplete&quot;)" office:value-type="string" office:string-value="Incomplete" calcext:value-type="string">
              <text:p>Incomplete</text:p>
            </table:table-cell>
            <table:table-cell table:style-name="ce140"/>
            <table:table-cell table:style-name="ce159" table:number-columns-spanned="5" table:number-rows-spanned="1"/>
            <table:covered-table-cell table:number-columns-repeated="3" table:style-name="ce172"/>
            <table:covered-table-cell table:style-name="ce186"/>
            <table:table-cell table:style-name="ce192"/>
            <table:table-cell table:style-name="ce200" table:number-columns-repeated="2"/>
            <table:table-cell table:style-name="ce206"/>
            <table:table-cell table:number-columns-repeated="2"/>
            <table:table-cell table:style-name="ce215"/>
            <table:table-cell table:style-name="ce220"/>
            <table:table-cell table:number-columns-repeated="16363"/>
          </table:table-row>
          <table:table-row table:style-name="ro2">
            <table:table-cell table:number-columns-repeated="2"/>
            <table:table-cell table:style-name="ce15"/>
            <table:table-cell table:style-name="ce44" office:value-type="string" calcext:value-type="string">
              <text:p>run status mission</text:p>
            </table:table-cell>
            <table:table-cell table:style-name="ce60" office:value-type="string" calcext:value-type="string">
              <text:p>run status.mi</text:p>
            </table:table-cell>
            <table:table-cell table:style-name="ce95" table:content-validation-name="val1" office:value-type="string" calcext:value-type="string" table:number-columns-spanned="2" table:number-rows-spanned="1">
              <text:p>n</text:p>
            </table:table-cell>
            <table:covered-table-cell table:style-name="ce124" table:content-validation-name="val1"/>
            <table:table-cell table:style-name="ce136" office:value-type="string" calcext:value-type="string">
              <text:p>-</text:p>
            </table:table-cell>
            <table:table-cell table:style-name="ce156" table:number-columns-spanned="5" table:number-rows-spanned="1"/>
            <table:covered-table-cell table:number-columns-repeated="3" table:style-name="ce170"/>
            <table:covered-table-cell table:style-name="ce156"/>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did mission complete normally? </text:p>
            </table:table-cell>
            <table:table-cell table:style-name="ce61" office:value-type="string" calcext:value-type="string">
              <text:p>-</text:p>
            </table:table-cell>
            <table:table-cell table:style-name="ce95" table:content-validation-name="val1" office:value-type="string" calcext:value-type="string" table:number-columns-spanned="2" table:number-rows-spanned="1">
              <text:p>n</text:p>
            </table:table-cell>
            <table:covered-table-cell table:style-name="ce124"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turn off iridium</text:p>
            </table:table-cell>
            <table:table-cell table:style-name="ce61" office:value-type="string" calcext:value-type="string">
              <text:p>callback 30</text:p>
            </table:table-cell>
            <table:table-cell table:style-name="ce95" table:content-validation-name="val1" office:value-type="string" calcext:value-type="string" table:number-columns-spanned="2" table:number-rows-spanned="1">
              <text:p>n</text:p>
            </table:table-cell>
            <table:covered-table-cell table:style-name="ce124"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 table:style-name="ro2">
            <table:table-cell table:number-columns-repeated="2"/>
            <table:table-cell table:style-name="ce15"/>
            <table:table-cell table:style-name="ce39" table:formula="of:=IF(in_out_going=&quot;in-coming&quot;; &quot;-&quot;; &quot;send all data&quot;)" office:value-type="string" office:string-value="send all data" calcext:value-type="string">
              <text:p>send all data</text:p>
            </table:table-cell>
            <table:table-cell table:style-name="ce61" table:formula="of:=IF(in_out_going=&quot;in-coming&quot;; &quot;-&quot;; &quot;send *.*&quot;)" office:value-type="string" office:string-value="send *.*" calcext:value-type="string">
              <text:p>send *.*</text:p>
            </table:table-cell>
            <table:table-cell table:style-name="ce95" table:content-validation-name="val1" office:value-type="string" calcext:value-type="string" table:number-columns-spanned="2" table:number-rows-spanned="1">
              <text:p>n</text:p>
            </table:table-cell>
            <table:covered-table-cell table:style-name="ce124"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 table:style-name="ro2">
            <table:table-cell table:number-columns-repeated="2"/>
            <table:table-cell table:style-name="ce15"/>
            <table:table-cell table:style-name="ce39" table:formula="of:=IF(in_out_going=&quot;in-coming&quot;; &quot;-&quot;; &quot;delete all irrelevant logs&quot;)" office:value-type="string" office:string-value="delete all irrelevant logs" calcext:value-type="string">
              <text:p>delete all irrelevant logs</text:p>
            </table:table-cell>
            <table:table-cell table:style-name="ce61" table:formula="of:=IF(in_out_going=&quot;in-coming&quot;; &quot;-&quot;; &quot;dellog all&quot;)" office:value-type="string" office:string-value="dellog all" calcext:value-type="string">
              <text:p>dellog all</text:p>
            </table:table-cell>
            <table:table-cell table:style-name="ce95" table:content-validation-name="val1" office:value-type="string" calcext:value-type="string" table:number-columns-spanned="2" table:number-rows-spanned="1">
              <text:p>n</text:p>
            </table:table-cell>
            <table:covered-table-cell table:style-name="ce124"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pull drive all the way in</text:p>
            </table:table-cell>
            <table:table-cell table:style-name="ce61" table:formula="of:=IF(OR(pump_type=50;pump_type=200);&quot;put c_ballast_pumped -1000&quot;; &quot;put c_de_oil_vol -1000&quot;)" office:value-type="string" office:string-value="put c_de_oil_vol -1000" calcext:value-type="string">
              <text:p>put c_de_oil_vol -1000</text:p>
            </table:table-cell>
            <table:table-cell table:style-name="ce95" table:content-validation-name="val1" office:value-type="string" calcext:value-type="string" table:number-columns-spanned="2" table:number-rows-spanned="1">
              <text:p>n</text:p>
            </table:table-cell>
            <table:covered-table-cell table:style-name="ce124"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39" office:value-type="string" calcext:value-type="string">
              <text:p>turn off air pump</text:p>
            </table:table-cell>
            <table:table-cell table:style-name="ce61" office:value-type="string" calcext:value-type="string">
              <text:p>put c_air_pump 0</text:p>
            </table:table-cell>
            <table:table-cell table:style-name="ce95" table:content-validation-name="val1" office:value-type="string" calcext:value-type="string" table:number-columns-spanned="2" table:number-rows-spanned="1">
              <text:p>n</text:p>
            </table:table-cell>
            <table:covered-table-cell table:style-name="ce124"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5"/>
            <table:table-cell table:style-name="ce39" table:formula="of:=IF(fcp_location=&quot;lab&quot;; IF(glider_type=&quot;G2&quot;;&quot;exit to picodos&quot;;&quot;exit to shelldos&quot;); &quot;exit gliderdos. NOTE: with exit command you will have 30 min to finish the next few steps&quot;)" office:value-type="string" office:string-value="exit to shelldos" calcext:value-type="string">
              <text:p>exit to shelldos</text:p>
            </table:table-cell>
            <table:table-cell table:style-name="ce61" table:formula="of:=IF(fcp_location=&quot;lab&quot;; IF(glider_type=&quot;G2&quot;;&quot;exit pico&quot;;&quot;exit shell&quot;); &quot;exit&quot;)" office:value-type="string" office:string-value="exit shell" calcext:value-type="string">
              <text:p>exit shell</text:p>
            </table:table-cell>
            <table:table-cell table:style-name="ce95" table:content-validation-name="val1" office:value-type="string" calcext:value-type="string" table:number-columns-spanned="2" table:number-rows-spanned="1">
              <text:p>n</text:p>
            </table:table-cell>
            <table:covered-table-cell table:style-name="ce124"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2">
            <table:table-cell table:number-columns-repeated="2"/>
            <table:table-cell table:style-name="ce15"/>
            <table:table-cell table:style-name="ce40" table:formula="of:=IF(OR(in_out_going=&quot;in-coming&quot;;in_out_going=&quot;stay-in-lab&quot;);&quot;Confirm glider is in boot &quot;&amp;IF(glider_type=&quot;g2&quot;;&quot;pico&quot;;&quot;shell&quot;);&quot;Confirm boot app. NOTE if unsure, power down glider and power back up. If boots into &quot;&amp;IF(glider_type=&quot;g2&quot;;&quot;pico&quot;;&quot;shell&quot;)&amp;&quot; then make sure it boots app. Otherwise follow the above steps again to make sure it is able to travel&quot;)" office:value-type="string" office:string-value="Confirm boot app. NOTE if unsure, power down glider and power back up. If boots into shell then make sure it boots app. Otherwise follow the above steps again to make sure it is able to travel" calcext:value-type="string">
              <text:p>Confirm boot app. NOTE if unsure, power down glider and power back up. If boots into shell then make sure it boots app. Otherwise follow the above steps again to make sure it is able to travel</text:p>
            </table:table-cell>
            <table:table-cell table:style-name="ce63" office:value-type="string" calcext:value-type="string">
              <text:p>boot</text:p>
            </table:table-cell>
            <table:table-cell table:style-name="ce95" table:content-validation-name="val1" office:value-type="string" calcext:value-type="string" table:number-columns-spanned="2" table:number-rows-spanned="1">
              <text:p>n</text:p>
            </table:table-cell>
            <table:covered-table-cell table:style-name="ce124" table:content-validation-name="val1"/>
            <table:table-cell table:style-name="ce139" office:value-type="string" calcext:value-type="string">
              <text:p>-</text:p>
            </table:table-cell>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4"/>
            <table:table-cell table:style-name="ce220"/>
            <table:table-cell table:number-columns-repeated="16363"/>
          </table:table-row>
          <table:table-row table:style-name="ro2">
            <table:table-cell table:number-columns-repeated="2"/>
            <table:table-cell table:style-name="ce18" table:formula="of:=IF(in_out_going=&quot;out-going&quot;;&quot;ONLY FOLLOW IF RUNNING HELIUM TEST&quot;;&quot; &quot;)" office:value-type="string" office:string-value=" " calcext:value-type="string" table:number-columns-spanned="1" table:number-rows-spanned="4">
              <text:p><text:s/></text:p>
            </table:table-cell>
            <table:table-cell table:style-name="ce49" table:formula="of:=IF(in_out_going=&quot;out-going&quot;;IF(fcp_location=&quot;field&quot;; &quot;-&quot;; IF(glider_type=&quot;G2&quot;; &quot;if running a helium test: boot to pico&quot;; &quot;if running a helium test: boot to shell&quot;));&quot;-&quot;)" office:value-type="string" office:string-value="-" calcext:value-type="string">
              <text:p>-</text:p>
            </table:table-cell>
            <table:table-cell table:style-name="ce71" table:formula="of:=IF(in_out_going=&quot;out-going&quot;;IF(fcp_location=&quot;field&quot;;&quot;-&quot;;IF(glider_type=&quot;G2&quot;; &quot;boot pico&quot;; &quot;boot shell&quot;));&quot;-&quot;)" office:value-type="string" office:string-value="-" calcext:value-type="string">
              <text:p>-</text:p>
            </table:table-cell>
            <table:table-cell table:style-name="ce96" table:content-validation-name="val1" office:value-type="string" calcext:value-type="string" table:number-columns-spanned="2" table:number-rows-spanned="1">
              <text:p>na</text:p>
            </table:table-cell>
            <table:covered-table-cell table:style-name="ce125" table:content-validation-name="val1"/>
            <table:table-cell table:style-name="ce147" office:value-type="string" calcext:value-type="string">
              <text:p>-</text:p>
            </table:table-cell>
            <table:table-cell table:style-name="ce165" table:number-columns-spanned="5" table:number-rows-spanned="1"/>
            <table:covered-table-cell table:number-columns-repeated="3" table:style-name="ce178"/>
            <table:covered-table-cell table:style-name="ce165"/>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 table:style-name="ro2">
            <table:table-cell table:number-columns-repeated="2"/>
            <table:covered-table-cell table:style-name="ce19"/>
            <table:table-cell table:style-name="ce39" table:formula="of:=IF(in_out_going=&quot;out-going&quot;;IF(fcp_location=&quot;field&quot;; &quot;-&quot;; &quot;close the air pump valve whiile is shell or pico&quot;);&quot;-&quot;)" office:value-type="string" office:string-value="-" calcext:value-type="string">
              <text:p>-</text:p>
            </table:table-cell>
            <table:table-cell table:style-name="ce61" table:formula="of:=IF(in_out_going=&quot;out-going&quot;;IF(fcp_location=&quot;field&quot;; &quot;-&quot;; IF(glider_type=&quot;g2&quot;;&quot;talk att&quot;;&quot;talk attitude&quot;));&quot;-&quot;)" office:value-type="string" office:string-value="-" calcext:value-type="string">
              <text:p>-</text:p>
            </table:table-cell>
            <table:table-cell table:style-name="ce97" table:content-validation-name="val1" office:value-type="string" calcext:value-type="string" table:number-columns-spanned="2" table:number-rows-spanned="1">
              <text:p>na</text:p>
            </table:table-cell>
            <table:covered-table-cell table:style-name="ce126" table:content-validation-name="val1"/>
            <table:table-cell table:style-name="ce137" office:value-type="string" calcext:value-type="string">
              <text:p>-</text:p>
            </table:table-cell>
            <table:table-cell table:style-name="ce157" table:number-columns-spanned="5" table:number-rows-spanned="1"/>
            <table:covered-table-cell table:number-columns-repeated="3" table:style-name="ce171"/>
            <table:covered-table-cell table:style-name="ce157"/>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 table:style-name="ro6">
            <table:table-cell table:number-columns-repeated="2"/>
            <table:covered-table-cell table:style-name="ce19"/>
            <table:table-cell table:style-name="ce40" table:formula="of:=IF(in_out_going=&quot;out-going&quot;;IF(fcp_location=&quot;field&quot;; &quot;-&quot;; IF(OR(pump_type=50;pump_type=200); &quot;remove altimeter bracket and install nose cap&quot;; &quot;-&quot;));&quot;-&quot;)" office:value-type="string" office:string-value="-" calcext:value-type="string">
              <text:p>-</text:p>
            </table:table-cell>
            <table:table-cell table:style-name="ce63" office:value-type="string" calcext:value-type="string">
              <text:p>-</text:p>
            </table:table-cell>
            <table:table-cell table:style-name="ce97" table:content-validation-name="val1" office:value-type="string" calcext:value-type="string" table:number-columns-spanned="2" table:number-rows-spanned="1">
              <text:p>na</text:p>
            </table:table-cell>
            <table:covered-table-cell table:style-name="ce123"/>
            <table:table-cell table:style-name="ce139" office:value-type="string" calcext:value-type="string">
              <text:p>-</text:p>
            </table:table-cell>
            <table:table-cell table:style-name="ce166" table:number-columns-repeated="4"/>
            <table:table-cell table:style-name="ce158"/>
            <table:table-cell table:style-name="ce193"/>
            <table:table-cell table:number-columns-repeated="2"/>
            <table:table-cell table:style-name="ce207"/>
            <table:table-cell table:number-columns-repeated="2"/>
            <table:table-cell table:style-name="ce215"/>
            <table:table-cell table:style-name="ce220"/>
            <table:table-cell table:number-columns-repeated="16363"/>
          </table:table-row>
          <table:table-row table:style-name="ro3">
            <table:table-cell table:number-columns-repeated="2"/>
            <table:covered-table-cell table:style-name="ce19"/>
            <table:table-cell table:style-name="ce40" table:formula="of:=IF(in_out_going=&quot;out-going&quot;;IF(fcp_location=&quot;field&quot;; &quot;-&quot;; &quot;change to boot app and restart the shutdown process&quot;);&quot;-&quot;)" office:value-type="string" office:string-value="-" calcext:value-type="string">
              <text:p>-</text:p>
            </table:table-cell>
            <table:table-cell table:style-name="ce63" table:formula="of:=IF(in_out_going=&quot;out-going&quot;;IF(fcp_location=&quot;field&quot;; &quot;-&quot;; &quot;boot app&quot;);&quot;-&quot;)" office:value-type="string" office:string-value="-" calcext:value-type="string">
              <text:p>-</text:p>
            </table:table-cell>
            <table:table-cell table:style-name="ce95" table:content-validation-name="val1" office:value-type="string" calcext:value-type="string" table:number-columns-spanned="2" table:number-rows-spanned="1">
              <text:p>na</text:p>
            </table:table-cell>
            <table:covered-table-cell table:style-name="ce124" table:content-validation-name="val1"/>
            <table:table-cell table:style-name="ce139" office:value-type="string" calcext:value-type="string">
              <text:p>-</text:p>
            </table:table-cell>
            <table:table-cell table:style-name="ce158" table:number-columns-spanned="5" table:number-rows-spanned="1"/>
            <table:covered-table-cell table:number-columns-repeated="3" table:style-name="ce166"/>
            <table:covered-table-cell table:style-name="ce158"/>
            <table:table-cell table:style-name="ce193" office:value-type="string" calcext:value-type="string">
              <text:p>-</text:p>
            </table:table-cell>
            <table:table-cell table:number-columns-repeated="2" office:value-type="string" calcext:value-type="string">
              <text:p>-</text:p>
            </table:table-cell>
            <table:table-cell table:style-name="ce207" office:value-type="string" calcext:value-type="string">
              <text:p>-</text:p>
            </table:table-cell>
            <table:table-cell table:number-columns-repeated="2"/>
            <table:table-cell table:style-name="ce215"/>
            <table:table-cell table:style-name="ce220"/>
            <table:table-cell table:number-columns-repeated="16363"/>
          </table:table-row>
        </table:table-row-group>
        <table:table-row table:style-name="ro2">
          <table:table-cell table:number-columns-repeated="2"/>
          <table:table-cell table:style-name="ce20"/>
          <table:table-cell table:style-name="ce50" table:number-columns-repeated="2"/>
          <table:table-cell table:style-name="ce98"/>
          <table:table-cell table:style-name="ce127"/>
          <table:table-cell table:style-name="ce50"/>
          <table:table-cell table:style-name="ce167" table:number-columns-spanned="5" table:number-rows-spanned="1"/>
          <table:covered-table-cell table:number-columns-repeated="3" table:style-name="ce179"/>
          <table:covered-table-cell table:style-name="ce167"/>
          <table:table-cell table:style-name="ce196"/>
          <table:table-cell table:style-name="ce202" table:number-columns-repeated="2"/>
          <table:table-cell table:style-name="ce209"/>
          <table:table-cell table:number-columns-repeated="2"/>
          <table:table-cell table:style-name="ce215"/>
          <table:table-cell table:style-name="ce220"/>
          <table:table-cell table:number-columns-repeated="16363"/>
        </table:table-row>
        <table:table-row table:style-name="ro10">
          <table:table-cell table:number-columns-repeated="19"/>
          <table:table-cell table:style-name="ce215"/>
          <table:table-cell table:style-name="ce220"/>
          <table:table-cell table:number-columns-repeated="16363"/>
        </table:table-row>
        <table:table-row table:style-name="ro2" table:number-rows-repeated="27">
          <table:table-cell table:number-columns-repeated="19"/>
          <table:table-cell table:style-name="ce215"/>
          <table:table-cell table:style-name="ce220"/>
          <table:table-cell table:number-columns-repeated="16363"/>
        </table:table-row>
        <table:table-row table:style-name="ro23">
          <table:table-cell table:number-columns-repeated="19"/>
          <table:table-cell table:style-name="ce215"/>
          <table:table-cell table:style-name="ce220"/>
          <table:table-cell table:number-columns-repeated="16363"/>
        </table:table-row>
        <table:table-row table:style-name="ro24" table:number-rows-repeated="2">
          <table:table-cell table:number-columns-repeated="19"/>
          <table:table-cell table:style-name="ce215"/>
          <table:table-cell table:style-name="ce220"/>
          <table:table-cell table:number-columns-repeated="16363"/>
        </table:table-row>
        <table:table-row table:style-name="ro2">
          <table:table-cell table:number-columns-repeated="19"/>
          <table:table-cell table:style-name="ce215"/>
          <table:table-cell table:style-name="ce220"/>
          <table:table-cell table:number-columns-repeated="16363"/>
        </table:table-row>
        <table:table-row table:style-name="ro9">
          <table:table-cell table:number-columns-repeated="19"/>
          <table:table-cell table:style-name="ce215"/>
          <table:table-cell table:style-name="ce220"/>
          <table:table-cell table:number-columns-repeated="16363"/>
        </table:table-row>
        <table:table-row table:style-name="ro10">
          <table:table-cell table:number-columns-repeated="19"/>
          <table:table-cell table:style-name="ce216"/>
          <table:table-cell table:style-name="ce221"/>
          <table:table-cell table:number-columns-repeated="16363"/>
        </table:table-row>
        <table:table-row table:style-name="ro2" table:number-rows-repeated="15">
          <table:table-cell table:number-columns-repeated="16384"/>
        </table:table-row>
        <table:table-row table:style-name="ro9">
          <table:table-cell table:number-columns-repeated="16384"/>
        </table:table-row>
        <table:table-row table:style-name="ro10">
          <table:table-cell table:number-columns-repeated="16384"/>
        </table:table-row>
        <table:table-row table:style-name="ro2" table:number-rows-repeated="15">
          <table:table-cell table:number-columns-repeated="16384"/>
        </table:table-row>
        <table:table-row table:style-name="ro9">
          <table:table-cell table:number-columns-repeated="16384"/>
        </table:table-row>
        <table:table-row table:style-name="ro10">
          <table:table-cell table:number-columns-repeated="16384"/>
        </table:table-row>
        <table:table-row table:style-name="ro2" table:number-rows-repeated="15">
          <table:table-cell table:number-columns-repeated="16384"/>
        </table:table-row>
        <table:table-row table:style-name="ro9">
          <table:table-cell table:number-columns-repeated="16384"/>
        </table:table-row>
        <table:table-row table:style-name="ro10">
          <table:table-cell table:number-columns-repeated="16384"/>
        </table:table-row>
        <table:table-row table:style-name="ro2" table:number-rows-repeated="21">
          <table:table-cell table:number-columns-repeated="16384"/>
        </table:table-row>
        <table:table-row table:style-name="ro9">
          <table:table-cell table:number-columns-repeated="16384"/>
        </table:table-row>
        <table:table-row table:style-name="ro10">
          <table:table-cell table:number-columns-repeated="16384"/>
        </table:table-row>
        <table:table-row table:style-name="ro2" table:number-rows-repeated="1048277">
          <table:table-cell table:number-columns-repeated="16384"/>
        </table:table-row>
        <table:table-row table:style-name="ro2">
          <table:table-cell table:number-columns-repeated="16384"/>
        </table:table-row>
        <calcext:conditional-formats>
          <calcext:conditional-format calcext:target-range-address="Checklist.D35:Checklist.E50 Checklist.D52:Checklist.E55 Checklist.D57:Checklist.E67 Checklist.D69:Checklist.E72 Checklist.D74:Checklist.E75 Checklist.D77:Checklist.E82 Checklist.D84:Checklist.E86 Checklist.D88:Checklist.E92 Checklist.D94:Checklist.E99 Checklist.D101:Checklist.E105 Checklist.D107:Checklist.E107 Checklist.D109:Checklist.E110 Checklist.D112:Checklist.E116 Checklist.D118:Checklist.E130 Checklist.D134:Checklist.E143 Checklist.D146:Checklist.E148 Checklist.D150:Checklist.E163 Checklist.D165:Checklist.E168 Checklist.D170:Checklist.E175 Checklist.D177:Checklist.E189">
            <calcext:condition calcext:apply-style-name="ConditionalStyle_41" calcext:value="=&quot;-&quot;" calcext:base-cell-address="Checklist.D35"/>
          </calcext:conditional-format>
          <calcext:conditional-format calcext:target-range-address="Checklist.F145:Checklist.G157 Checklist.F158:Checklist.F158 Checklist.F159:Checklist.G175">
            <calcext:condition calcext:apply-style-name="ConditionalStyle_16" calcext:value="=&quot;n/a&quot;" calcext:base-cell-address="Checklist.F145"/>
            <calcext:condition calcext:apply-style-name="ConditionalStyle_15" calcext:value="=&quot;na&quot;" calcext:base-cell-address="Checklist.F145"/>
            <calcext:condition calcext:apply-style-name="ConditionalStyle_14" calcext:value="=&quot;y&quot;" calcext:base-cell-address="Checklist.F145"/>
            <calcext:condition calcext:apply-style-name="ConditionalStyle_13" calcext:value="=&quot;n&quot;" calcext:base-cell-address="Checklist.F145"/>
          </calcext:conditional-format>
          <calcext:conditional-format calcext:target-range-address="Checklist.F52:Checklist.G86">
            <calcext:condition calcext:apply-style-name="ConditionalStyle_34" calcext:value="=&quot;n/a&quot;" calcext:base-cell-address="Checklist.F52"/>
            <calcext:condition calcext:apply-style-name="ConditionalStyle_33" calcext:value="=&quot;na&quot;" calcext:base-cell-address="Checklist.F52"/>
            <calcext:condition calcext:apply-style-name="ConditionalStyle_32" calcext:value="=&quot;y&quot;" calcext:base-cell-address="Checklist.F52"/>
            <calcext:condition calcext:apply-style-name="ConditionalStyle_31" calcext:value="=&quot;n&quot;" calcext:base-cell-address="Checklist.F52"/>
          </calcext:conditional-format>
          <calcext:conditional-format calcext:target-range-address="Checklist.F94:Checklist.G130">
            <calcext:condition calcext:apply-style-name="ConditionalStyle_25" calcext:value="=&quot;y&quot;" calcext:base-cell-address="Checklist.F94"/>
            <calcext:condition calcext:apply-style-name="ConditionalStyle_24" calcext:value="=&quot;n&quot;" calcext:base-cell-address="Checklist.F94"/>
            <calcext:condition calcext:apply-style-name="ConditionalStyle_23" calcext:value="=&quot;n/a&quot;" calcext:base-cell-address="Checklist.F94"/>
            <calcext:condition calcext:apply-style-name="ConditionalStyle_22" calcext:value="=&quot;na&quot;" calcext:base-cell-address="Checklist.F94"/>
          </calcext:conditional-format>
          <calcext:conditional-format calcext:target-range-address="Checklist.F78:Checklist.G78">
            <calcext:condition calcext:apply-style-name="ConditionalStyle_30" calcext:value="=&quot;nothing&quot;" calcext:base-cell-address="Checklist.F78"/>
          </calcext:conditional-format>
          <calcext:conditional-format calcext:target-range-address="Checklist.F49:Checklist.G49">
            <calcext:condition calcext:apply-style-name="ConditionalStyle_35" calcext:value="=&quot;nothing&quot;" calcext:base-cell-address="Checklist.F49"/>
          </calcext:conditional-format>
          <calcext:conditional-format calcext:target-range-address="Checklist.F35:Checklist.G50">
            <calcext:condition calcext:apply-style-name="ConditionalStyle_40" calcext:value="=&quot;n/a&quot;" calcext:base-cell-address="Checklist.F35"/>
            <calcext:condition calcext:apply-style-name="ConditionalStyle_39" calcext:value="=&quot;na&quot;" calcext:base-cell-address="Checklist.F35"/>
            <calcext:condition calcext:apply-style-name="ConditionalStyle_38" calcext:value="=&quot;y&quot;" calcext:base-cell-address="Checklist.F35"/>
            <calcext:condition calcext:apply-style-name="ConditionalStyle_37" calcext:value="=&quot;n&quot;" calcext:base-cell-address="Checklist.F35"/>
          </calcext:conditional-format>
          <calcext:conditional-format calcext:target-range-address="Checklist.F186:Checklist.G187 Checklist.F188:Checklist.F188">
            <calcext:condition calcext:apply-style-name="ConditionalStyle_8" calcext:value="=&quot;nothing&quot;" calcext:base-cell-address="Checklist.F186"/>
          </calcext:conditional-format>
          <calcext:conditional-format calcext:target-range-address="Checklist.F177:Checklist.G187 Checklist.F188:Checklist.F188 Checklist.F189:Checklist.G189">
            <calcext:condition calcext:apply-style-name="ConditionalStyle_9" calcext:value="=&quot;n/a&quot;" calcext:base-cell-address="Checklist.F177"/>
            <calcext:condition calcext:apply-style-name="ConditionalStyle_12" calcext:value="=&quot;na&quot;" calcext:base-cell-address="Checklist.F177"/>
            <calcext:condition calcext:apply-style-name="ConditionalStyle_11" calcext:value="=&quot;y&quot;" calcext:base-cell-address="Checklist.F177"/>
            <calcext:condition calcext:apply-style-name="ConditionalStyle_10" calcext:value="=&quot;n&quot;" calcext:base-cell-address="Checklist.F177"/>
          </calcext:conditional-format>
          <calcext:conditional-format calcext:target-range-address="Checklist.F142:Checklist.G142">
            <calcext:condition calcext:apply-style-name="ConditionalStyle_17" calcext:value="=&quot;nothing&quot;" calcext:base-cell-address="Checklist.F142"/>
          </calcext:conditional-format>
          <calcext:conditional-format calcext:target-range-address="Checklist.F134:Checklist.G143">
            <calcext:condition calcext:apply-style-name="ConditionalStyle_21" calcext:value="=&quot;n/a&quot;" calcext:base-cell-address="Checklist.F134"/>
            <calcext:condition calcext:apply-style-name="ConditionalStyle_20" calcext:value="=&quot;na&quot;" calcext:base-cell-address="Checklist.F134"/>
            <calcext:condition calcext:apply-style-name="ConditionalStyle_19" calcext:value="=&quot;y&quot;" calcext:base-cell-address="Checklist.F134"/>
            <calcext:condition calcext:apply-style-name="ConditionalStyle_18" calcext:value="=&quot;n&quot;" calcext:base-cell-address="Checklist.F134"/>
          </calcext:conditional-format>
          <calcext:conditional-format calcext:target-range-address="Checklist.F45:Checklist.G45">
            <calcext:condition calcext:apply-style-name="ConditionalStyle_36" calcext:value="=&quot;nothing&quot;" calcext:base-cell-address="Checklist.F45"/>
          </calcext:conditional-format>
          <calcext:conditional-format calcext:target-range-address="Checklist.F88:Checklist.G92">
            <calcext:condition calcext:apply-style-name="ConditionalStyle_29" calcext:value="=&quot;n/a&quot;" calcext:base-cell-address="Checklist.F88"/>
            <calcext:condition calcext:apply-style-name="ConditionalStyle_28" calcext:value="=&quot;na&quot;" calcext:base-cell-address="Checklist.F88"/>
            <calcext:condition calcext:apply-style-name="ConditionalStyle_27" calcext:value="=&quot;y&quot;" calcext:base-cell-address="Checklist.F88"/>
            <calcext:condition calcext:apply-style-name="ConditionalStyle_26" calcext:value="=&quot;n&quot;" calcext:base-cell-address="Checklist.F88"/>
          </calcext:conditional-format>
          <calcext:conditional-format calcext:target-range-address="Checklist.G87:Checklist.G87">
            <calcext:condition calcext:apply-style-name="ConditionalStyle_3" calcext:value="=&quot;complete&quot;" calcext:base-cell-address="Checklist.G87"/>
            <calcext:condition calcext:apply-style-name="ConditionalStyle_2" calcext:value="=&quot;incomplete&quot;" calcext:base-cell-address="Checklist.G87"/>
          </calcext:conditional-format>
          <calcext:conditional-format calcext:target-range-address="Checklist.N44:Checklist.N44">
            <calcext:condition calcext:apply-style-name="ConditionalStyle_1" calcext:value="=&quot; &quot;" calcext:base-cell-address="Checklist.N44"/>
          </calcext:conditional-format>
          <calcext:conditional-format calcext:target-range-address="Checklist.G34:Checklist.G34 Checklist.G51:Checklist.G51 Checklist.G93:Checklist.G93 Checklist.G133:Checklist.G133 Checklist.G144:Checklist.G144 Checklist.G176:Checklist.G176">
            <calcext:condition calcext:apply-style-name="ConditionalStyle_5" calcext:value="=&quot;complete&quot;" calcext:base-cell-address="Checklist.G34"/>
            <calcext:condition calcext:apply-style-name="ConditionalStyle_4" calcext:value="=&quot;incomplete&quot;" calcext:base-cell-address="Checklist.G34"/>
          </calcext:conditional-format>
          <calcext:conditional-format calcext:target-range-address="Checklist.G33:Checklist.G33 Checklist.G132:Checklist.G132">
            <calcext:condition calcext:apply-style-name="ConditionalStyle_7" calcext:value="=&quot;Section Complete&quot;" calcext:base-cell-address="Checklist.G33"/>
            <calcext:condition calcext:apply-style-name="ConditionalStyle_6" calcext:value="=&quot;Section Incomplete&quot;" calcext:base-cell-address="Checklist.G33"/>
          </calcext:conditional-format>
        </calcext:conditional-formats>
      </table:table>
      <table:table table:name="hidden_lists" table:style-name="ta2">
        <table:table-column table:style-name="co14" table:number-columns-repeated="10" table:default-cell-style-name="Default"/>
        <table:table-column table:style-name="co14" table:default-cell-style-name="ce225"/>
        <table:table-column table:style-name="co15" table:default-cell-style-name="Default"/>
        <table:table-column table:style-name="co14" table:default-cell-style-name="Default"/>
        <table:table-column table:style-name="co16" table:default-cell-style-name="Default"/>
        <table:table-column table:style-name="co14" table:default-cell-style-name="ce228"/>
        <table:table-column table:style-name="co14" table:default-cell-style-name="ce225"/>
        <table:table-column table:style-name="co14" table:number-columns-repeated="2" table:default-cell-style-name="Default"/>
        <table:table-column table:style-name="co5" table:default-cell-style-name="Default"/>
        <table:table-column table:style-name="co14" table:default-cell-style-name="ce228"/>
        <table:table-column table:style-name="co14" table:number-columns-repeated="16364" table:default-cell-style-name="Default"/>
        <table:table-row table:style-name="ro2">
          <table:table-cell office:value-type="string" calcext:value-type="string">
            <text:p>glider types</text:p>
          </table:table-cell>
          <table:table-cell office:value-type="string" calcext:value-type="string">
            <text:p>pumps</text:p>
          </table:table-cell>
          <table:table-cell office:value-type="string" calcext:value-type="string">
            <text:p>battery types</text:p>
          </table:table-cell>
          <table:table-cell office:value-type="string" calcext:value-type="string">
            <text:p>Generic Y/n</text:p>
          </table:table-cell>
          <table:table-cell table:number-columns-repeated="6"/>
          <table:table-cell table:style-name="ce224" office:value-type="string" calcext:value-type="string">
            <text:p>INDOOR WHERE DIALOG</text:p>
          </table:table-cell>
          <table:table-cell table:style-name="ce226" table:number-columns-repeated="3"/>
          <table:table-cell table:style-name="ce227"/>
          <table:table-cell table:style-name="ce224" office:value-type="string" calcext:value-type="string">
            <text:p>OUTDOOR WHERE DIALOG</text:p>
          </table:table-cell>
          <table:table-cell table:style-name="ce226" table:number-columns-repeated="3"/>
          <table:table-cell table:style-name="ce227"/>
          <table:table-cell table:number-columns-repeated="16364"/>
        </table:table-row>
        <table:table-row table:style-name="ro2">
          <table:table-cell office:value-type="string" calcext:value-type="string">
            <text:p>G2</text:p>
          </table:table-cell>
          <table:table-cell office:value-type="float" office:value="50" calcext:value-type="float">
            <text:p>50</text:p>
          </table:table-cell>
          <table:table-cell office:value-type="string" calcext:value-type="string">
            <text:p>3s</text:p>
          </table:table-cell>
          <table:table-cell office:value-type="string" calcext:value-type="string">
            <text:p>y</text:p>
          </table:table-cell>
          <table:table-cell office:value-type="string" calcext:value-type="string">
            <text:p>yes</text:p>
          </table:table-cell>
          <table:table-cell table:number-columns-repeated="5"/>
          <table:table-cell table:formula="of:=[$Checklist.T34]" office:value-type="string" office:string-value="USER INPUT" calcext:value-type="string">
            <text:p>USER INPUT</text:p>
          </table:table-cell>
          <table:table-cell table:formula="of:=IF(ISNUMBER(FIND(&quot;:&quot;;[.K2])); RIGHT([.K2]; LEN([.K2]) - FIND(&quot;:&quot;;[.K2]));&quot;&quot;)">
            <text:p/>
          </table:table-cell>
          <table:table-cell table:formula="of:=IF(ISNUMBER(FIND(&quot; &quot;; [.L2])); LEFT([.L2]; FIND(&quot; &quot;; [.L2] &amp; &quot; &quot;; FIND(&quot; &quot;;[.L2])+1) - 1); [.L2])">
            <text:p/>
          </table:table-cell>
          <table:table-cell table:formula="of:=IF(ISNUMBER(FIND(&quot;(&quot;; [.M2])); LEFT([.M2]; FIND(&quot;(&quot;; [.M2]) - 1); [.M2])">
            <text:p/>
          </table:table-cell>
          <table:table-cell table:formula="of:=IF(ISNUMBER(FIND(&quot;=&quot;;[.M2])); RIGHT([.M2]; LEN([.M2]) - FIND(&quot;=&quot;;[.M2]));&quot;&quot;)">
            <text:p/>
          </table:table-cell>
          <table:table-cell table:formula="of:=[$Checklist.T133]" office:value-type="string" office:string-value="USER INPUT" calcext:value-type="string">
            <text:p>USER INPUT</text:p>
          </table:table-cell>
          <table:table-cell table:formula="of:=IF(ISNUMBER(FIND(&quot;:&quot;;[.P2])); RIGHT([.P2]; LEN([.P2]) - FIND(&quot;:&quot;;[.P2]));&quot;&quot;)">
            <text:p/>
          </table:table-cell>
          <table:table-cell table:formula="of:=IF(ISNUMBER(FIND(&quot; &quot;; [.Q2])); LEFT([.Q2]; FIND(&quot; &quot;; [.Q2] &amp; &quot; &quot;; FIND(&quot; &quot;;[.Q2])+1) - 1); [.Q2])">
            <text:p/>
          </table:table-cell>
          <table:table-cell table:formula="of:=IF(ISNUMBER(FIND(&quot;(&quot;; [.R2])); LEFT([.R2]; FIND(&quot;(&quot;; [.R2]) - 1); [.R2])">
            <text:p/>
          </table:table-cell>
          <table:table-cell table:formula="of:=IF(ISNUMBER(FIND(&quot;=&quot;;[.R2])); RIGHT([.R2]; LEN([.R2]) - FIND(&quot;=&quot;;[.R2]));&quot;&quot;)">
            <text:p/>
          </table:table-cell>
          <table:table-cell table:number-columns-repeated="16364"/>
        </table:table-row>
        <table:table-row table:style-name="ro2">
          <table:table-cell office:value-type="string" calcext:value-type="string">
            <text:p>G3</text:p>
          </table:table-cell>
          <table:table-cell office:value-type="float" office:value="200" calcext:value-type="float">
            <text:p>200</text:p>
          </table:table-cell>
          <table:table-cell office:value-type="string" calcext:value-type="string">
            <text:p>3s ext</text:p>
          </table:table-cell>
          <table:table-cell office:value-type="string" calcext:value-type="string">
            <text:p>n</text:p>
          </table:table-cell>
          <table:table-cell office:value-type="string" calcext:value-type="string">
            <text:p>no</text:p>
          </table:table-cell>
          <table:table-cell table:number-columns-repeated="5"/>
          <table:table-cell table:formula="of:=[$Checklist.T35]" office:value-type="float" office:value="0" calcext:value-type="float">
            <text:p>0</text:p>
          </table:table-cell>
          <table:table-cell table:formula="of:=IF(ISNUMBER(FIND(&quot;:&quot;;[.K3])); RIGHT([.K3]; LEN([.K3]) - FIND(&quot;:&quot;;[.K3]));&quot;&quot;)">
            <text:p/>
          </table:table-cell>
          <table:table-cell table:formula="of:=IF(ISNUMBER(FIND(&quot; &quot;; [.L3])); LEFT([.L3]; FIND(&quot; &quot;; [.L3] &amp; &quot; &quot;; FIND(&quot; &quot;;[.L3])+1) - 1); [.L3])">
            <text:p/>
          </table:table-cell>
          <table:table-cell table:formula="of:=IF(ISNUMBER(FIND(&quot;(&quot;; [.M3])); LEFT([.M3]; FIND(&quot;(&quot;; [.M3]) - 1); [.M3])">
            <text:p/>
          </table:table-cell>
          <table:table-cell table:formula="of:=IF(ISNUMBER(FIND(&quot;=&quot;;[.M3])); RIGHT([.M3]; LEN([.M3]) - FIND(&quot;=&quot;;[.M3]));&quot;&quot;)">
            <text:p/>
          </table:table-cell>
          <table:table-cell table:formula="of:=[$Checklist.T134]" office:value-type="float" office:value="0" calcext:value-type="float">
            <text:p>0</text:p>
          </table:table-cell>
          <table:table-cell table:formula="of:=IF(ISNUMBER(FIND(&quot;:&quot;;[.P3])); RIGHT([.P3]; LEN([.P3]) - FIND(&quot;:&quot;;[.P3]));&quot;&quot;)">
            <text:p/>
          </table:table-cell>
          <table:table-cell table:formula="of:=IF(ISNUMBER(FIND(&quot; &quot;; [.Q3])); LEFT([.Q3]; FIND(&quot; &quot;; [.Q3] &amp; &quot; &quot;; FIND(&quot; &quot;;[.Q3])+1) - 1); [.Q3])">
            <text:p/>
          </table:table-cell>
          <table:table-cell table:formula="of:=IF(ISNUMBER(FIND(&quot;(&quot;; [.R3])); LEFT([.R3]; FIND(&quot;(&quot;; [.R3]) - 1); [.R3])">
            <text:p/>
          </table:table-cell>
          <table:table-cell table:formula="of:=IF(ISNUMBER(FIND(&quot;=&quot;;[.R3])); RIGHT([.R3]; LEN([.R3]) - FIND(&quot;=&quot;;[.R3]));&quot;&quot;)">
            <text:p/>
          </table:table-cell>
          <table:table-cell table:number-columns-repeated="16364"/>
        </table:table-row>
        <table:table-row table:style-name="ro2">
          <table:table-cell/>
          <table:table-cell office:value-type="float" office:value="350" calcext:value-type="float">
            <text:p>350</text:p>
          </table:table-cell>
          <table:table-cell office:value-type="string" calcext:value-type="string">
            <text:p>4s</text:p>
          </table:table-cell>
          <table:table-cell office:value-type="string" calcext:value-type="string">
            <text:p>na</text:p>
          </table:table-cell>
          <table:table-cell table:number-columns-repeated="6"/>
          <table:table-cell table:formula="of:=[$Checklist.T36]" office:value-type="string" office:string-value="Vehicle Name: unit_1236" calcext:value-type="string">
            <text:p>Vehicle Name: unit_1236</text:p>
          </table:table-cell>
          <table:table-cell table:formula="of:=IF(ISNUMBER(FIND(&quot;:&quot;;[.K4])); RIGHT([.K4]; LEN([.K4]) - FIND(&quot;:&quot;;[.K4]));&quot;&quot;)" office:value-type="string" office:string-value=" unit_1236" calcext:value-type="string">
            <text:p><text:s/>unit_1236</text:p>
          </table:table-cell>
          <table:table-cell table:formula="of:=IF(ISNUMBER(FIND(&quot; &quot;; [.L4])); LEFT([.L4]; FIND(&quot; &quot;; [.L4] &amp; &quot; &quot;; FIND(&quot; &quot;;[.L4])+1) - 1); [.L4])" office:value-type="string" office:string-value=" unit_1236" calcext:value-type="string">
            <text:p><text:s/>unit_1236</text:p>
          </table:table-cell>
          <table:table-cell table:formula="of:=IF(ISNUMBER(FIND(&quot;(&quot;; [.M4])); LEFT([.M4]; FIND(&quot;(&quot;; [.M4]) - 1); [.M4])" office:value-type="string" office:string-value=" unit_1236" calcext:value-type="string">
            <text:p><text:s/>unit_1236</text:p>
          </table:table-cell>
          <table:table-cell table:formula="of:=IF(ISNUMBER(FIND(&quot;=&quot;;[.M4])); RIGHT([.M4]; LEN([.M4]) - FIND(&quot;=&quot;;[.M4]));&quot;&quot;)">
            <text:p/>
          </table:table-cell>
          <table:table-cell table:formula="of:=[$Checklist.T135]" office:value-type="float" office:value="0" calcext:value-type="float">
            <text:p>0</text:p>
          </table:table-cell>
          <table:table-cell table:formula="of:=IF(ISNUMBER(FIND(&quot;:&quot;;[.P4])); RIGHT([.P4]; LEN([.P4]) - FIND(&quot;:&quot;;[.P4]));&quot;&quot;)">
            <text:p/>
          </table:table-cell>
          <table:table-cell table:formula="of:=IF(ISNUMBER(FIND(&quot; &quot;; [.Q4])); LEFT([.Q4]; FIND(&quot; &quot;; [.Q4] &amp; &quot; &quot;; FIND(&quot; &quot;;[.Q4])+1) - 1); [.Q4])">
            <text:p/>
          </table:table-cell>
          <table:table-cell table:formula="of:=IF(ISNUMBER(FIND(&quot;(&quot;; [.R4])); LEFT([.R4]; FIND(&quot;(&quot;; [.R4]) - 1); [.R4])">
            <text:p/>
          </table:table-cell>
          <table:table-cell table:formula="of:=IF(ISNUMBER(FIND(&quot;=&quot;;[.R4])); RIGHT([.R4]; LEN([.R4]) - FIND(&quot;=&quot;;[.R4]));&quot;&quot;)">
            <text:p/>
          </table:table-cell>
          <table:table-cell table:number-columns-repeated="16364"/>
        </table:table-row>
        <table:table-row table:style-name="ro2">
          <table:table-cell/>
          <table:table-cell office:value-type="float" office:value="1000" calcext:value-type="float">
            <text:p>1000</text:p>
          </table:table-cell>
          <table:table-cell office:value-type="string" calcext:value-type="string">
            <text:p>4s extended </text:p>
          </table:table-cell>
          <table:table-cell office:value-type="string" calcext:value-type="string">
            <text:p>n/a</text:p>
          </table:table-cell>
          <table:table-cell table:number-columns-repeated="6"/>
          <table:table-cell table:formula="of:=[$Checklist.T37]" office:value-type="string" office:string-value="Curr Time: Fri Sep 26 08:22:04 2025 MT:     309" calcext:value-type="string">
            <text:p>Curr Time: Fri Sep 26 08:22:04 2025 MT: <text:s text:c="4"/>309</text:p>
          </table:table-cell>
          <table:table-cell table:formula="of:=IF(ISNUMBER(FIND(&quot;:&quot;;[.K5])); RIGHT([.K5]; LEN([.K5]) - FIND(&quot;:&quot;;[.K5]));&quot;&quot;)" office:value-type="string" office:string-value=" Fri Sep 26 08:22:04 2025 MT:     309" calcext:value-type="string">
            <text:p><text:s/>Fri Sep 26 08:22:04 2025 MT: <text:s text:c="4"/>309</text:p>
          </table:table-cell>
          <table:table-cell table:formula="of:=IF(ISNUMBER(FIND(&quot; &quot;; [.L5])); LEFT([.L5]; FIND(&quot; &quot;; [.L5] &amp; &quot; &quot;; FIND(&quot; &quot;;[.L5])+1) - 1); [.L5])" office:value-type="string" office:string-value=" Fri" calcext:value-type="string">
            <text:p><text:s/>Fri</text:p>
          </table:table-cell>
          <table:table-cell table:formula="of:=IF(ISNUMBER(FIND(&quot;(&quot;; [.M5])); LEFT([.M5]; FIND(&quot;(&quot;; [.M5]) - 1); [.M5])" office:value-type="string" office:string-value=" Fri" calcext:value-type="string">
            <text:p><text:s/>Fri</text:p>
          </table:table-cell>
          <table:table-cell table:formula="of:=IF(ISNUMBER(FIND(&quot;=&quot;;[.M5])); RIGHT([.M5]; LEN([.M5]) - FIND(&quot;=&quot;;[.M5]));&quot;&quot;)">
            <text:p/>
          </table:table-cell>
          <table:table-cell table:formula="of:=[$Checklist.T136]" office:value-type="float" office:value="0" calcext:value-type="float">
            <text:p>0</text:p>
          </table:table-cell>
          <table:table-cell table:formula="of:=IF(ISNUMBER(FIND(&quot;:&quot;;[.P5])); RIGHT([.P5]; LEN([.P5]) - FIND(&quot;:&quot;;[.P5]));&quot;&quot;)">
            <text:p/>
          </table:table-cell>
          <table:table-cell table:formula="of:=IF(ISNUMBER(FIND(&quot; &quot;; [.Q5])); LEFT([.Q5]; FIND(&quot; &quot;; [.Q5] &amp; &quot; &quot;; FIND(&quot; &quot;;[.Q5])+1) - 1); [.Q5])">
            <text:p/>
          </table:table-cell>
          <table:table-cell table:formula="of:=IF(ISNUMBER(FIND(&quot;(&quot;; [.R5])); LEFT([.R5]; FIND(&quot;(&quot;; [.R5]) - 1); [.R5])">
            <text:p/>
          </table:table-cell>
          <table:table-cell table:formula="of:=IF(ISNUMBER(FIND(&quot;=&quot;;[.R5])); RIGHT([.R5]; LEN([.R5]) - FIND(&quot;=&quot;;[.R5]));&quot;&quot;)">
            <text:p/>
          </table:table-cell>
          <table:table-cell table:number-columns-repeated="16364"/>
        </table:table-row>
        <table:table-row table:style-name="ro2">
          <table:table-cell table:number-columns-repeated="2"/>
          <table:table-cell office:value-type="string" calcext:value-type="string">
            <text:p>lith-ion</text:p>
          </table:table-cell>
          <table:table-cell table:number-columns-repeated="7"/>
          <table:table-cell table:formula="of:=[$Checklist.T38]" office:value-type="string" office:string-value="DR  Location:  5706.046 N  -206.220 E measured    310.037 secs ago" calcext:value-type="string">
            <text:p>DR <text:s/>Location: <text:s/>5706.046 N <text:s/>-206.220 E measured <text:s text:c="3"/>310.037 secs ago</text:p>
          </table:table-cell>
          <table:table-cell table:formula="of:=IF(ISNUMBER(FIND(&quot;:&quot;;[.K6])); RIGHT([.K6]; LEN([.K6]) - FIND(&quot;:&quot;;[.K6]));&quot;&quot;)" office:value-type="string" office:string-value="  5706.046 N  -206.220 E measured    310.037 secs ago" calcext:value-type="string">
            <text:p><text:s text:c="2"/>5706.046 N <text:s/>-206.220 E measured <text:s text:c="3"/>310.037 secs ago</text:p>
          </table:table-cell>
          <table:table-cell table:formula="of:=IF(ISNUMBER(FIND(&quot; &quot;; [.L6])); LEFT([.L6]; FIND(&quot; &quot;; [.L6] &amp; &quot; &quot;; FIND(&quot; &quot;;[.L6])+1) - 1); [.L6])" office:value-type="string" office:string-value=" " calcext:value-type="string">
            <text:p><text:s/></text:p>
          </table:table-cell>
          <table:table-cell table:formula="of:=IF(ISNUMBER(FIND(&quot;(&quot;; [.M6])); LEFT([.M6]; FIND(&quot;(&quot;; [.M6]) - 1); [.M6])" office:value-type="string" office:string-value=" " calcext:value-type="string">
            <text:p><text:s/></text:p>
          </table:table-cell>
          <table:table-cell table:formula="of:=IF(ISNUMBER(FIND(&quot;=&quot;;[.M6])); RIGHT([.M6]; LEN([.M6]) - FIND(&quot;=&quot;;[.M6]));&quot;&quot;)">
            <text:p/>
          </table:table-cell>
          <table:table-cell table:formula="of:=[$Checklist.T137]" office:value-type="float" office:value="0" calcext:value-type="float">
            <text:p>0</text:p>
          </table:table-cell>
          <table:table-cell table:formula="of:=IF(ISNUMBER(FIND(&quot;:&quot;;[.P6])); RIGHT([.P6]; LEN([.P6]) - FIND(&quot;:&quot;;[.P6]));&quot;&quot;)">
            <text:p/>
          </table:table-cell>
          <table:table-cell table:formula="of:=IF(ISNUMBER(FIND(&quot; &quot;; [.Q6])); LEFT([.Q6]; FIND(&quot; &quot;; [.Q6] &amp; &quot; &quot;; FIND(&quot; &quot;;[.Q6])+1) - 1); [.Q6])">
            <text:p/>
          </table:table-cell>
          <table:table-cell table:formula="of:=IF(ISNUMBER(FIND(&quot;(&quot;; [.R6])); LEFT([.R6]; FIND(&quot;(&quot;; [.R6]) - 1); [.R6])">
            <text:p/>
          </table:table-cell>
          <table:table-cell table:formula="of:=IF(ISNUMBER(FIND(&quot;=&quot;;[.R6])); RIGHT([.R6]; LEN([.R6]) - FIND(&quot;=&quot;;[.R6]));&quot;&quot;)">
            <text:p/>
          </table:table-cell>
          <table:table-cell table:number-columns-repeated="16364"/>
        </table:table-row>
        <table:table-row table:style-name="ro2">
          <table:table-cell table:number-columns-repeated="2"/>
          <table:table-cell office:value-type="string" calcext:value-type="string">
            <text:p>lith-ion extended</text:p>
          </table:table-cell>
          <table:table-cell table:number-columns-repeated="7"/>
          <table:table-cell table:formula="of:=[$Checklist.T39]" office:value-type="string" office:string-value="GPS TooFar:   69696969.000 N 69696969.000 E measured     1e+308 secs ago" calcext:value-type="string">
            <text:p>GPS TooFar: <text:s text:c="2"/>69696969.000 N 69696969.000 E measured <text:s text:c="4"/>1e+308 secs ago</text:p>
          </table:table-cell>
          <table:table-cell table:formula="of:=IF(ISNUMBER(FIND(&quot;:&quot;;[.K7])); RIGHT([.K7]; LEN([.K7]) - FIND(&quot;:&quot;;[.K7]));&quot;&quot;)" office:value-type="string" office:string-value="   69696969.000 N 69696969.000 E measured     1e+308 secs ago" calcext:value-type="string">
            <text:p><text:s text:c="3"/>69696969.000 N 69696969.000 E measured <text:s text:c="4"/>1e+308 secs ago</text:p>
          </table:table-cell>
          <table:table-cell table:formula="of:=IF(ISNUMBER(FIND(&quot; &quot;; [.L7])); LEFT([.L7]; FIND(&quot; &quot;; [.L7] &amp; &quot; &quot;; FIND(&quot; &quot;;[.L7])+1) - 1); [.L7])" office:value-type="string" office:string-value=" " calcext:value-type="string">
            <text:p><text:s/></text:p>
          </table:table-cell>
          <table:table-cell table:formula="of:=IF(ISNUMBER(FIND(&quot;(&quot;; [.M7])); LEFT([.M7]; FIND(&quot;(&quot;; [.M7]) - 1); [.M7])" office:value-type="string" office:string-value=" " calcext:value-type="string">
            <text:p><text:s/></text:p>
          </table:table-cell>
          <table:table-cell table:formula="of:=IF(ISNUMBER(FIND(&quot;=&quot;;[.M7])); RIGHT([.M7]; LEN([.M7]) - FIND(&quot;=&quot;;[.M7]));&quot;&quot;)">
            <text:p/>
          </table:table-cell>
          <table:table-cell table:formula="of:=[$Checklist.T138]" office:value-type="float" office:value="0" calcext:value-type="float">
            <text:p>0</text:p>
          </table:table-cell>
          <table:table-cell table:formula="of:=IF(ISNUMBER(FIND(&quot;:&quot;;[.P7])); RIGHT([.P7]; LEN([.P7]) - FIND(&quot;:&quot;;[.P7]));&quot;&quot;)">
            <text:p/>
          </table:table-cell>
          <table:table-cell table:formula="of:=IF(ISNUMBER(FIND(&quot; &quot;; [.Q7])); LEFT([.Q7]; FIND(&quot; &quot;; [.Q7] &amp; &quot; &quot;; FIND(&quot; &quot;;[.Q7])+1) - 1); [.Q7])">
            <text:p/>
          </table:table-cell>
          <table:table-cell table:formula="of:=IF(ISNUMBER(FIND(&quot;(&quot;; [.R7])); LEFT([.R7]; FIND(&quot;(&quot;; [.R7]) - 1); [.R7])">
            <text:p/>
          </table:table-cell>
          <table:table-cell table:formula="of:=IF(ISNUMBER(FIND(&quot;=&quot;;[.R7])); RIGHT([.R7]; LEN([.R7]) - FIND(&quot;=&quot;;[.R7]));&quot;&quot;)">
            <text:p/>
          </table:table-cell>
          <table:table-cell table:number-columns-repeated="16364"/>
        </table:table-row>
        <table:table-row table:style-name="ro2">
          <table:table-cell table:number-columns-repeated="10"/>
          <table:table-cell table:formula="of:=[$Checklist.T40]" office:value-type="string" office:string-value="GPS Invalid :  6938.645 N  1856.992 E measured      1.087 secs ago" calcext:value-type="string">
            <text:p>GPS Invalid : <text:s/>6938.645 N <text:s/>1856.992 E measured <text:s text:c="5"/>1.087 secs ago</text:p>
          </table:table-cell>
          <table:table-cell table:formula="of:=IF(ISNUMBER(FIND(&quot;:&quot;;[.K8])); RIGHT([.K8]; LEN([.K8]) - FIND(&quot;:&quot;;[.K8]));&quot;&quot;)" office:value-type="string" office:string-value="  6938.645 N  1856.992 E measured      1.087 secs ago" calcext:value-type="string">
            <text:p><text:s text:c="2"/>6938.645 N <text:s/>1856.992 E measured <text:s text:c="5"/>1.087 secs ago</text:p>
          </table:table-cell>
          <table:table-cell table:formula="of:=IF(ISNUMBER(FIND(&quot; &quot;; [.L8])); LEFT([.L8]; FIND(&quot; &quot;; [.L8] &amp; &quot; &quot;; FIND(&quot; &quot;;[.L8])+1) - 1); [.L8])" office:value-type="string" office:string-value=" " calcext:value-type="string">
            <text:p><text:s/></text:p>
          </table:table-cell>
          <table:table-cell table:formula="of:=IF(ISNUMBER(FIND(&quot;(&quot;; [.M8])); LEFT([.M8]; FIND(&quot;(&quot;; [.M8]) - 1); [.M8])" office:value-type="string" office:string-value=" " calcext:value-type="string">
            <text:p><text:s/></text:p>
          </table:table-cell>
          <table:table-cell table:formula="of:=IF(ISNUMBER(FIND(&quot;=&quot;;[.M8])); RIGHT([.M8]; LEN([.M8]) - FIND(&quot;=&quot;;[.M8]));&quot;&quot;)">
            <text:p/>
          </table:table-cell>
          <table:table-cell table:formula="of:=[$Checklist.T139]" office:value-type="float" office:value="0" calcext:value-type="float">
            <text:p>0</text:p>
          </table:table-cell>
          <table:table-cell table:formula="of:=IF(ISNUMBER(FIND(&quot;:&quot;;[.P8])); RIGHT([.P8]; LEN([.P8]) - FIND(&quot;:&quot;;[.P8]));&quot;&quot;)">
            <text:p/>
          </table:table-cell>
          <table:table-cell table:formula="of:=IF(ISNUMBER(FIND(&quot; &quot;; [.Q8])); LEFT([.Q8]; FIND(&quot; &quot;; [.Q8] &amp; &quot; &quot;; FIND(&quot; &quot;;[.Q8])+1) - 1); [.Q8])">
            <text:p/>
          </table:table-cell>
          <table:table-cell table:formula="of:=IF(ISNUMBER(FIND(&quot;(&quot;; [.R8])); LEFT([.R8]; FIND(&quot;(&quot;; [.R8]) - 1); [.R8])">
            <text:p/>
          </table:table-cell>
          <table:table-cell table:formula="of:=IF(ISNUMBER(FIND(&quot;=&quot;;[.R8])); RIGHT([.R8]; LEN([.R8]) - FIND(&quot;=&quot;;[.R8]));&quot;&quot;)">
            <text:p/>
          </table:table-cell>
          <table:table-cell table:number-columns-repeated="16364"/>
        </table:table-row>
        <table:table-row table:style-name="ro2">
          <table:table-cell table:number-columns-repeated="10"/>
          <table:table-cell table:formula="of:=[$Checklist.T41]" office:value-type="string" office:string-value="GPS Location: 69696969.000 N 69696969.000 E measured     1e+308 secs ago" calcext:value-type="string">
            <text:p>GPS Location: 69696969.000 N 69696969.000 E measured <text:s text:c="4"/>1e+308 secs ago</text:p>
          </table:table-cell>
          <table:table-cell table:formula="of:=IF(ISNUMBER(FIND(&quot;:&quot;;[.K9])); RIGHT([.K9]; LEN([.K9]) - FIND(&quot;:&quot;;[.K9]));&quot;&quot;)" office:value-type="string" office:string-value=" 69696969.000 N 69696969.000 E measured     1e+308 secs ago" calcext:value-type="string">
            <text:p><text:s/>69696969.000 N 69696969.000 E measured <text:s text:c="4"/>1e+308 secs ago</text:p>
          </table:table-cell>
          <table:table-cell table:formula="of:=IF(ISNUMBER(FIND(&quot; &quot;; [.L9])); LEFT([.L9]; FIND(&quot; &quot;; [.L9] &amp; &quot; &quot;; FIND(&quot; &quot;;[.L9])+1) - 1); [.L9])" office:value-type="string" office:string-value=" 69696969.000" calcext:value-type="string">
            <text:p><text:s/>69696969.000</text:p>
          </table:table-cell>
          <table:table-cell table:formula="of:=IF(ISNUMBER(FIND(&quot;(&quot;; [.M9])); LEFT([.M9]; FIND(&quot;(&quot;; [.M9]) - 1); [.M9])" office:value-type="string" office:string-value=" 69696969.000" calcext:value-type="string">
            <text:p><text:s/>69696969.000</text:p>
          </table:table-cell>
          <table:table-cell table:formula="of:=IF(ISNUMBER(FIND(&quot;=&quot;;[.M9])); RIGHT([.M9]; LEN([.M9]) - FIND(&quot;=&quot;;[.M9]));&quot;&quot;)">
            <text:p/>
          </table:table-cell>
          <table:table-cell table:formula="of:=[$Checklist.T140]" office:value-type="float" office:value="0" calcext:value-type="float">
            <text:p>0</text:p>
          </table:table-cell>
          <table:table-cell table:formula="of:=IF(ISNUMBER(FIND(&quot;:&quot;;[.P9])); RIGHT([.P9]; LEN([.P9]) - FIND(&quot;:&quot;;[.P9]));&quot;&quot;)">
            <text:p/>
          </table:table-cell>
          <table:table-cell table:formula="of:=IF(ISNUMBER(FIND(&quot; &quot;; [.Q9])); LEFT([.Q9]; FIND(&quot; &quot;; [.Q9] &amp; &quot; &quot;; FIND(&quot; &quot;;[.Q9])+1) - 1); [.Q9])">
            <text:p/>
          </table:table-cell>
          <table:table-cell table:formula="of:=IF(ISNUMBER(FIND(&quot;(&quot;; [.R9])); LEFT([.R9]; FIND(&quot;(&quot;; [.R9]) - 1); [.R9])">
            <text:p/>
          </table:table-cell>
          <table:table-cell table:formula="of:=IF(ISNUMBER(FIND(&quot;=&quot;;[.R9])); RIGHT([.R9]; LEN([.R9]) - FIND(&quot;=&quot;;[.R9]));&quot;&quot;)">
            <text:p/>
          </table:table-cell>
          <table:table-cell table:number-columns-repeated="16364"/>
        </table:table-row>
        <table:table-row table:style-name="ro2">
          <table:table-cell table:number-columns-repeated="10"/>
          <table:table-cell table:formula="of:=[$Checklist.T42]" office:value-type="string" office:string-value="   sensor:c_wpt_lat(lat)=0                         1e+308 secs ago" calcext:value-type="string">
            <text:p><text:s text:c="3"/>sensor:c_wpt_lat(lat)=0 <text:s text:c="24"/>1e+308 secs ago</text:p>
          </table:table-cell>
          <table:table-cell table:formula="of:=IF(ISNUMBER(FIND(&quot;:&quot;;[.K10])); RIGHT([.K10]; LEN([.K10]) - FIND(&quot;:&quot;;[.K10]));&quot;&quot;)" office:value-type="string" office:string-value="c_wpt_lat(lat)=0                         1e+308 secs ago" calcext:value-type="string">
            <text:p>c_wpt_lat(lat)=0 <text:s text:c="24"/>1e+308 secs ago</text:p>
          </table:table-cell>
          <table:table-cell table:formula="of:=IF(ISNUMBER(FIND(&quot; &quot;; [.L10])); LEFT([.L10]; FIND(&quot; &quot;; [.L10] &amp; &quot; &quot;; FIND(&quot; &quot;;[.L10])+1) - 1); [.L10])" office:value-type="string" office:string-value="c_wpt_lat(lat)=0 " calcext:value-type="string">
            <text:p>c_wpt_lat(lat)=0 </text:p>
          </table:table-cell>
          <table:table-cell table:formula="of:=IF(ISNUMBER(FIND(&quot;(&quot;; [.M10])); LEFT([.M10]; FIND(&quot;(&quot;; [.M10]) - 1); [.M10])" office:value-type="string" office:string-value="c_wpt_lat" calcext:value-type="string">
            <text:p>c_wpt_lat</text:p>
          </table:table-cell>
          <table:table-cell table:formula="of:=IF(ISNUMBER(FIND(&quot;=&quot;;[.M10])); RIGHT([.M10]; LEN([.M10]) - FIND(&quot;=&quot;;[.M10]));&quot;&quot;)" office:value-type="string" office:string-value="0 " calcext:value-type="string">
            <text:p>0 </text:p>
          </table:table-cell>
          <table:table-cell table:formula="of:=[$Checklist.T141]" office:value-type="float" office:value="0" calcext:value-type="float">
            <text:p>0</text:p>
          </table:table-cell>
          <table:table-cell table:formula="of:=IF(ISNUMBER(FIND(&quot;:&quot;;[.P10])); RIGHT([.P10]; LEN([.P10]) - FIND(&quot;:&quot;;[.P10]));&quot;&quot;)">
            <text:p/>
          </table:table-cell>
          <table:table-cell table:formula="of:=IF(ISNUMBER(FIND(&quot; &quot;; [.Q10])); LEFT([.Q10]; FIND(&quot; &quot;; [.Q10] &amp; &quot; &quot;; FIND(&quot; &quot;;[.Q10])+1) - 1); [.Q10])">
            <text:p/>
          </table:table-cell>
          <table:table-cell table:formula="of:=IF(ISNUMBER(FIND(&quot;(&quot;; [.R10])); LEFT([.R10]; FIND(&quot;(&quot;; [.R10]) - 1); [.R10])">
            <text:p/>
          </table:table-cell>
          <table:table-cell table:formula="of:=IF(ISNUMBER(FIND(&quot;=&quot;;[.R10])); RIGHT([.R10]; LEN([.R10]) - FIND(&quot;=&quot;;[.R10]));&quot;&quot;)">
            <text:p/>
          </table:table-cell>
          <table:table-cell table:number-columns-repeated="3"/>
          <table:table-cell office:value-type="string" calcext:value-type="string">
            <text:p>s</text:p>
          </table:table-cell>
          <table:table-cell table:number-columns-repeated="16360"/>
        </table:table-row>
        <table:table-row table:style-name="ro2">
          <table:table-cell table:number-columns-repeated="10"/>
          <table:table-cell table:formula="of:=[$Checklist.T43]" office:value-type="string" office:string-value="   sensor:c_wpt_lon(lon)=0                         1e+308 secs ago" calcext:value-type="string">
            <text:p><text:s text:c="3"/>sensor:c_wpt_lon(lon)=0 <text:s text:c="24"/>1e+308 secs ago</text:p>
          </table:table-cell>
          <table:table-cell table:formula="of:=IF(ISNUMBER(FIND(&quot;:&quot;;[.K11])); RIGHT([.K11]; LEN([.K11]) - FIND(&quot;:&quot;;[.K11]));&quot;&quot;)" office:value-type="string" office:string-value="c_wpt_lon(lon)=0                         1e+308 secs ago" calcext:value-type="string">
            <text:p>c_wpt_lon(lon)=0 <text:s text:c="24"/>1e+308 secs ago</text:p>
          </table:table-cell>
          <table:table-cell table:formula="of:=IF(ISNUMBER(FIND(&quot; &quot;; [.L11])); LEFT([.L11]; FIND(&quot; &quot;; [.L11] &amp; &quot; &quot;; FIND(&quot; &quot;;[.L11])+1) - 1); [.L11])" office:value-type="string" office:string-value="c_wpt_lon(lon)=0 " calcext:value-type="string">
            <text:p>c_wpt_lon(lon)=0 </text:p>
          </table:table-cell>
          <table:table-cell table:formula="of:=IF(ISNUMBER(FIND(&quot;(&quot;; [.M11])); LEFT([.M11]; FIND(&quot;(&quot;; [.M11]) - 1); [.M11])" office:value-type="string" office:string-value="c_wpt_lon" calcext:value-type="string">
            <text:p>c_wpt_lon</text:p>
          </table:table-cell>
          <table:table-cell table:formula="of:=IF(ISNUMBER(FIND(&quot;=&quot;;[.M11])); RIGHT([.M11]; LEN([.M11]) - FIND(&quot;=&quot;;[.M11]));&quot;&quot;)" office:value-type="string" office:string-value="0 " calcext:value-type="string">
            <text:p>0 </text:p>
          </table:table-cell>
          <table:table-cell table:formula="of:=[$Checklist.T142]" office:value-type="float" office:value="0" calcext:value-type="float">
            <text:p>0</text:p>
          </table:table-cell>
          <table:table-cell table:formula="of:=IF(ISNUMBER(FIND(&quot;:&quot;;[.P11])); RIGHT([.P11]; LEN([.P11]) - FIND(&quot;:&quot;;[.P11]));&quot;&quot;)">
            <text:p/>
          </table:table-cell>
          <table:table-cell table:formula="of:=IF(ISNUMBER(FIND(&quot; &quot;; [.Q11])); LEFT([.Q11]; FIND(&quot; &quot;; [.Q11] &amp; &quot; &quot;; FIND(&quot; &quot;;[.Q11])+1) - 1); [.Q11])">
            <text:p/>
          </table:table-cell>
          <table:table-cell table:formula="of:=IF(ISNUMBER(FIND(&quot;(&quot;; [.R11])); LEFT([.R11]; FIND(&quot;(&quot;; [.R11]) - 1); [.R11])">
            <text:p/>
          </table:table-cell>
          <table:table-cell table:formula="of:=IF(ISNUMBER(FIND(&quot;=&quot;;[.R11])); RIGHT([.R11]; LEN([.R11]) - FIND(&quot;=&quot;;[.R11]));&quot;&quot;)">
            <text:p/>
          </table:table-cell>
          <table:table-cell table:number-columns-repeated="3"/>
          <table:table-cell table:formula="of:=IFERROR(VLOOKUP([.X10];[.N2:.O70];2;FALSE());&quot;Not Found&quot;)" office:value-type="string" office:string-value="Not Found" calcext:value-type="string">
            <text:p>Not Found</text:p>
          </table:table-cell>
          <table:table-cell table:number-columns-repeated="16360"/>
        </table:table-row>
        <table:table-row table:style-name="ro2">
          <table:table-cell table:number-columns-repeated="10"/>
          <table:table-cell table:formula="of:=[$Checklist.T44]" office:value-type="string" office:string-value="   sensor:m_battery(volts)=16.3959067655903         0.234 secs ago" calcext:value-type="string">
            <text:p><text:s text:c="3"/>sensor:m_battery(volts)=16.3959067655903 <text:s text:c="8"/>0.234 secs ago</text:p>
          </table:table-cell>
          <table:table-cell table:formula="of:=IF(ISNUMBER(FIND(&quot;:&quot;;[.K12])); RIGHT([.K12]; LEN([.K12]) - FIND(&quot;:&quot;;[.K12]));&quot;&quot;)" office:value-type="string" office:string-value="m_battery(volts)=16.3959067655903         0.234 secs ago" calcext:value-type="string">
            <text:p>m_battery(volts)=16.3959067655903 <text:s text:c="8"/>0.234 secs ago</text:p>
          </table:table-cell>
          <table:table-cell table:formula="of:=IF(ISNUMBER(FIND(&quot; &quot;; [.L12])); LEFT([.L12]; FIND(&quot; &quot;; [.L12] &amp; &quot; &quot;; FIND(&quot; &quot;;[.L12])+1) - 1); [.L12])" office:value-type="string" office:string-value="m_battery(volts)=16.3959067655903 " calcext:value-type="string">
            <text:p>m_battery(volts)=16.3959067655903 </text:p>
          </table:table-cell>
          <table:table-cell table:formula="of:=IF(ISNUMBER(FIND(&quot;(&quot;; [.M12])); LEFT([.M12]; FIND(&quot;(&quot;; [.M12]) - 1); [.M12])" office:value-type="string" office:string-value="m_battery" calcext:value-type="string">
            <text:p>m_battery</text:p>
          </table:table-cell>
          <table:table-cell table:formula="of:=IF(ISNUMBER(FIND(&quot;=&quot;;[.M12])); RIGHT([.M12]; LEN([.M12]) - FIND(&quot;=&quot;;[.M12]));&quot;&quot;)" office:value-type="string" office:string-value="16.3959067655903 " calcext:value-type="string">
            <text:p>16.3959067655903 </text:p>
          </table:table-cell>
          <table:table-cell table:formula="of:=[$Checklist.T143]" office:value-type="float" office:value="0" calcext:value-type="float">
            <text:p>0</text:p>
          </table:table-cell>
          <table:table-cell table:formula="of:=IF(ISNUMBER(FIND(&quot;:&quot;;[.P12])); RIGHT([.P12]; LEN([.P12]) - FIND(&quot;:&quot;;[.P12]));&quot;&quot;)">
            <text:p/>
          </table:table-cell>
          <table:table-cell table:formula="of:=IF(ISNUMBER(FIND(&quot; &quot;; [.Q12])); LEFT([.Q12]; FIND(&quot; &quot;; [.Q12] &amp; &quot; &quot;; FIND(&quot; &quot;;[.Q12])+1) - 1); [.Q12])">
            <text:p/>
          </table:table-cell>
          <table:table-cell table:formula="of:=IF(ISNUMBER(FIND(&quot;(&quot;; [.R12])); LEFT([.R12]; FIND(&quot;(&quot;; [.R12]) - 1); [.R12])">
            <text:p/>
          </table:table-cell>
          <table:table-cell table:formula="of:=IF(ISNUMBER(FIND(&quot;=&quot;;[.R12])); RIGHT([.R12]; LEN([.R12]) - FIND(&quot;=&quot;;[.R12]));&quot;&quot;)">
            <text:p/>
          </table:table-cell>
          <table:table-cell table:number-columns-repeated="16364"/>
        </table:table-row>
        <table:table-row table:style-name="ro2">
          <table:table-cell table:number-columns-repeated="10"/>
          <table:table-cell table:formula="of:=[$Checklist.T45]" office:value-type="string" office:string-value="   sensor:m_coulomb_amphr_total(amp-hrs)=44.819886        0.369 secs ago" calcext:value-type="string">
            <text:p><text:s text:c="3"/>sensor:m_coulomb_amphr_total(amp-hrs)=44.819886 <text:s text:c="7"/>0.369 secs ago</text:p>
          </table:table-cell>
          <table:table-cell table:formula="of:=IF(ISNUMBER(FIND(&quot;:&quot;;[.K13])); RIGHT([.K13]; LEN([.K13]) - FIND(&quot;:&quot;;[.K13]));&quot;&quot;)" office:value-type="string" office:string-value="m_coulomb_amphr_total(amp-hrs)=44.819886        0.369 secs ago" calcext:value-type="string">
            <text:p>m_coulomb_amphr_total(amp-hrs)=44.819886 <text:s text:c="7"/>0.369 secs ago</text:p>
          </table:table-cell>
          <table:table-cell table:formula="of:=IF(ISNUMBER(FIND(&quot; &quot;; [.L13])); LEFT([.L13]; FIND(&quot; &quot;; [.L13] &amp; &quot; &quot;; FIND(&quot; &quot;;[.L13])+1) - 1); [.L13])" office:value-type="string" office:string-value="m_coulomb_amphr_total(amp-hrs)=44.819886 " calcext:value-type="string">
            <text:p>m_coulomb_amphr_total(amp-hrs)=44.819886 </text:p>
          </table:table-cell>
          <table:table-cell table:formula="of:=IF(ISNUMBER(FIND(&quot;(&quot;; [.M13])); LEFT([.M13]; FIND(&quot;(&quot;; [.M13]) - 1); [.M13])" office:value-type="string" office:string-value="m_coulomb_amphr_total" calcext:value-type="string">
            <text:p>m_coulomb_amphr_total</text:p>
          </table:table-cell>
          <table:table-cell table:formula="of:=IF(ISNUMBER(FIND(&quot;=&quot;;[.M13])); RIGHT([.M13]; LEN([.M13]) - FIND(&quot;=&quot;;[.M13]));&quot;&quot;)" office:value-type="string" office:string-value="44.819886 " calcext:value-type="string">
            <text:p>44.819886 </text:p>
          </table:table-cell>
          <table:table-cell table:formula="of:=[$Checklist.T144]" office:value-type="float" office:value="0" calcext:value-type="float">
            <text:p>0</text:p>
          </table:table-cell>
          <table:table-cell table:formula="of:=IF(ISNUMBER(FIND(&quot;:&quot;;[.P13])); RIGHT([.P13]; LEN([.P13]) - FIND(&quot;:&quot;;[.P13]));&quot;&quot;)">
            <text:p/>
          </table:table-cell>
          <table:table-cell table:formula="of:=IF(ISNUMBER(FIND(&quot; &quot;; [.Q13])); LEFT([.Q13]; FIND(&quot; &quot;; [.Q13] &amp; &quot; &quot;; FIND(&quot; &quot;;[.Q13])+1) - 1); [.Q13])">
            <text:p/>
          </table:table-cell>
          <table:table-cell table:formula="of:=IF(ISNUMBER(FIND(&quot;(&quot;; [.R13])); LEFT([.R13]; FIND(&quot;(&quot;; [.R13]) - 1); [.R13])">
            <text:p/>
          </table:table-cell>
          <table:table-cell table:formula="of:=IF(ISNUMBER(FIND(&quot;=&quot;;[.R13])); RIGHT([.R13]; LEN([.R13]) - FIND(&quot;=&quot;;[.R13]));&quot;&quot;)">
            <text:p/>
          </table:table-cell>
          <table:table-cell table:number-columns-repeated="16364"/>
        </table:table-row>
        <table:table-row table:style-name="ro2">
          <table:table-cell table:number-columns-repeated="10"/>
          <table:table-cell table:formula="of:=[$Checklist.T46]" office:value-type="string" office:string-value="   sensor:m_digifin_leakdetect_reading(nodim)=1023        3.864 secs ago" calcext:value-type="string">
            <text:p><text:s text:c="3"/>sensor:m_digifin_leakdetect_reading(nodim)=1023 <text:s text:c="7"/>3.864 secs ago</text:p>
          </table:table-cell>
          <table:table-cell table:formula="of:=IF(ISNUMBER(FIND(&quot;:&quot;;[.K14])); RIGHT([.K14]; LEN([.K14]) - FIND(&quot;:&quot;;[.K14]));&quot;&quot;)" office:value-type="string" office:string-value="m_digifin_leakdetect_reading(nodim)=1023        3.864 secs ago" calcext:value-type="string">
            <text:p>m_digifin_leakdetect_reading(nodim)=1023 <text:s text:c="7"/>3.864 secs ago</text:p>
          </table:table-cell>
          <table:table-cell table:formula="of:=IF(ISNUMBER(FIND(&quot; &quot;; [.L14])); LEFT([.L14]; FIND(&quot; &quot;; [.L14] &amp; &quot; &quot;; FIND(&quot; &quot;;[.L14])+1) - 1); [.L14])" office:value-type="string" office:string-value="m_digifin_leakdetect_reading(nodim)=1023 " calcext:value-type="string">
            <text:p>m_digifin_leakdetect_reading(nodim)=1023 </text:p>
          </table:table-cell>
          <table:table-cell table:formula="of:=IF(ISNUMBER(FIND(&quot;(&quot;; [.M14])); LEFT([.M14]; FIND(&quot;(&quot;; [.M14]) - 1); [.M14])" office:value-type="string" office:string-value="m_digifin_leakdetect_reading" calcext:value-type="string">
            <text:p>m_digifin_leakdetect_reading</text:p>
          </table:table-cell>
          <table:table-cell table:formula="of:=IF(ISNUMBER(FIND(&quot;=&quot;;[.M14])); RIGHT([.M14]; LEN([.M14]) - FIND(&quot;=&quot;;[.M14]));&quot;&quot;)" office:value-type="string" office:string-value="1023 " calcext:value-type="string">
            <text:p>1023 </text:p>
          </table:table-cell>
          <table:table-cell table:formula="of:=[$Checklist.T145]" office:value-type="float" office:value="0" calcext:value-type="float">
            <text:p>0</text:p>
          </table:table-cell>
          <table:table-cell table:formula="of:=IF(ISNUMBER(FIND(&quot;:&quot;;[.P14])); RIGHT([.P14]; LEN([.P14]) - FIND(&quot;:&quot;;[.P14]));&quot;&quot;)">
            <text:p/>
          </table:table-cell>
          <table:table-cell table:formula="of:=IF(ISNUMBER(FIND(&quot; &quot;; [.Q14])); LEFT([.Q14]; FIND(&quot; &quot;; [.Q14] &amp; &quot; &quot;; FIND(&quot; &quot;;[.Q14])+1) - 1); [.Q14])">
            <text:p/>
          </table:table-cell>
          <table:table-cell table:formula="of:=IF(ISNUMBER(FIND(&quot;(&quot;; [.R14])); LEFT([.R14]; FIND(&quot;(&quot;; [.R14]) - 1); [.R14])">
            <text:p/>
          </table:table-cell>
          <table:table-cell table:formula="of:=IF(ISNUMBER(FIND(&quot;=&quot;;[.R14])); RIGHT([.R14]; LEN([.R14]) - FIND(&quot;=&quot;;[.R14]));&quot;&quot;)">
            <text:p/>
          </table:table-cell>
          <table:table-cell table:number-columns-repeated="16364"/>
        </table:table-row>
        <table:table-row table:style-name="ro2">
          <table:table-cell table:number-columns-repeated="10"/>
          <table:table-cell table:formula="of:=[$Checklist.T47]" office:value-type="string" office:string-value="   sensor:m_iridium_attempt_num(nodim)=1          293.343 secs ago" calcext:value-type="string">
            <text:p><text:s text:c="3"/>sensor:m_iridium_attempt_num(nodim)=1 <text:s text:c="9"/>293.343 secs ago</text:p>
          </table:table-cell>
          <table:table-cell table:formula="of:=IF(ISNUMBER(FIND(&quot;:&quot;;[.K15])); RIGHT([.K15]; LEN([.K15]) - FIND(&quot;:&quot;;[.K15]));&quot;&quot;)" office:value-type="string" office:string-value="m_iridium_attempt_num(nodim)=1          293.343 secs ago" calcext:value-type="string">
            <text:p>m_iridium_attempt_num(nodim)=1 <text:s text:c="9"/>293.343 secs ago</text:p>
          </table:table-cell>
          <table:table-cell table:formula="of:=IF(ISNUMBER(FIND(&quot; &quot;; [.L15])); LEFT([.L15]; FIND(&quot; &quot;; [.L15] &amp; &quot; &quot;; FIND(&quot; &quot;;[.L15])+1) - 1); [.L15])" office:value-type="string" office:string-value="m_iridium_attempt_num(nodim)=1 " calcext:value-type="string">
            <text:p>m_iridium_attempt_num(nodim)=1 </text:p>
          </table:table-cell>
          <table:table-cell table:formula="of:=IF(ISNUMBER(FIND(&quot;(&quot;; [.M15])); LEFT([.M15]; FIND(&quot;(&quot;; [.M15]) - 1); [.M15])" office:value-type="string" office:string-value="m_iridium_attempt_num" calcext:value-type="string">
            <text:p>m_iridium_attempt_num</text:p>
          </table:table-cell>
          <table:table-cell table:formula="of:=IF(ISNUMBER(FIND(&quot;=&quot;;[.M15])); RIGHT([.M15]; LEN([.M15]) - FIND(&quot;=&quot;;[.M15]));&quot;&quot;)" office:value-type="string" office:string-value="1 " calcext:value-type="string">
            <text:p>1 </text:p>
          </table:table-cell>
          <table:table-cell table:formula="of:=[$Checklist.T146]" office:value-type="float" office:value="0" calcext:value-type="float">
            <text:p>0</text:p>
          </table:table-cell>
          <table:table-cell table:formula="of:=IF(ISNUMBER(FIND(&quot;:&quot;;[.P15])); RIGHT([.P15]; LEN([.P15]) - FIND(&quot;:&quot;;[.P15]));&quot;&quot;)">
            <text:p/>
          </table:table-cell>
          <table:table-cell table:formula="of:=IF(ISNUMBER(FIND(&quot; &quot;; [.Q15])); LEFT([.Q15]; FIND(&quot; &quot;; [.Q15] &amp; &quot; &quot;; FIND(&quot; &quot;;[.Q15])+1) - 1); [.Q15])">
            <text:p/>
          </table:table-cell>
          <table:table-cell table:formula="of:=IF(ISNUMBER(FIND(&quot;(&quot;; [.R15])); LEFT([.R15]; FIND(&quot;(&quot;; [.R15]) - 1); [.R15])">
            <text:p/>
          </table:table-cell>
          <table:table-cell table:formula="of:=IF(ISNUMBER(FIND(&quot;=&quot;;[.R15])); RIGHT([.R15]; LEN([.R15]) - FIND(&quot;=&quot;;[.R15]));&quot;&quot;)">
            <text:p/>
          </table:table-cell>
          <table:table-cell table:number-columns-repeated="16364"/>
        </table:table-row>
        <table:table-row table:style-name="ro2">
          <table:table-cell table:number-columns-repeated="10"/>
          <table:table-cell table:formula="of:=[$Checklist.T48]" office:value-type="string" office:string-value="   sensor:m_iridium_signal_strength(nodim)=0      284.171 secs ago" calcext:value-type="string">
            <text:p><text:s text:c="3"/>sensor:m_iridium_signal_strength(nodim)=0 <text:s text:c="5"/>284.171 secs ago</text:p>
          </table:table-cell>
          <table:table-cell table:formula="of:=IF(ISNUMBER(FIND(&quot;:&quot;;[.K16])); RIGHT([.K16]; LEN([.K16]) - FIND(&quot;:&quot;;[.K16]));&quot;&quot;)" office:value-type="string" office:string-value="m_iridium_signal_strength(nodim)=0      284.171 secs ago" calcext:value-type="string">
            <text:p>m_iridium_signal_strength(nodim)=0 <text:s text:c="5"/>284.171 secs ago</text:p>
          </table:table-cell>
          <table:table-cell table:formula="of:=IF(ISNUMBER(FIND(&quot; &quot;; [.L16])); LEFT([.L16]; FIND(&quot; &quot;; [.L16] &amp; &quot; &quot;; FIND(&quot; &quot;;[.L16])+1) - 1); [.L16])" office:value-type="string" office:string-value="m_iridium_signal_strength(nodim)=0 " calcext:value-type="string">
            <text:p>m_iridium_signal_strength(nodim)=0 </text:p>
          </table:table-cell>
          <table:table-cell table:formula="of:=IF(ISNUMBER(FIND(&quot;(&quot;; [.M16])); LEFT([.M16]; FIND(&quot;(&quot;; [.M16]) - 1); [.M16])" office:value-type="string" office:string-value="m_iridium_signal_strength" calcext:value-type="string">
            <text:p>m_iridium_signal_strength</text:p>
          </table:table-cell>
          <table:table-cell table:formula="of:=IF(ISNUMBER(FIND(&quot;=&quot;;[.M16])); RIGHT([.M16]; LEN([.M16]) - FIND(&quot;=&quot;;[.M16]));&quot;&quot;)" office:value-type="string" office:string-value="0 " calcext:value-type="string">
            <text:p>0 </text:p>
          </table:table-cell>
          <table:table-cell table:formula="of:=[$Checklist.T147]" office:value-type="float" office:value="0" calcext:value-type="float">
            <text:p>0</text:p>
          </table:table-cell>
          <table:table-cell table:formula="of:=IF(ISNUMBER(FIND(&quot;:&quot;;[.P16])); RIGHT([.P16]; LEN([.P16]) - FIND(&quot;:&quot;;[.P16]));&quot;&quot;)">
            <text:p/>
          </table:table-cell>
          <table:table-cell table:formula="of:=IF(ISNUMBER(FIND(&quot; &quot;; [.Q16])); LEFT([.Q16]; FIND(&quot; &quot;; [.Q16] &amp; &quot; &quot;; FIND(&quot; &quot;;[.Q16])+1) - 1); [.Q16])">
            <text:p/>
          </table:table-cell>
          <table:table-cell table:formula="of:=IF(ISNUMBER(FIND(&quot;(&quot;; [.R16])); LEFT([.R16]; FIND(&quot;(&quot;; [.R16]) - 1); [.R16])">
            <text:p/>
          </table:table-cell>
          <table:table-cell table:formula="of:=IF(ISNUMBER(FIND(&quot;=&quot;;[.R16])); RIGHT([.R16]; LEN([.R16]) - FIND(&quot;=&quot;;[.R16]));&quot;&quot;)">
            <text:p/>
          </table:table-cell>
          <table:table-cell table:number-columns-repeated="16364"/>
        </table:table-row>
        <table:table-row table:style-name="ro2">
          <table:table-cell table:number-columns-repeated="10"/>
          <table:table-cell table:formula="of:=[$Checklist.T49]" office:value-type="string" office:string-value="   sensor:m_leakdetect_voltage(volts)=2.47655677655678        0.101 secs ago" calcext:value-type="string">
            <text:p><text:s text:c="3"/>sensor:m_leakdetect_voltage(volts)=2.47655677655678 <text:s text:c="7"/>0.101 secs ago</text:p>
          </table:table-cell>
          <table:table-cell table:formula="of:=IF(ISNUMBER(FIND(&quot;:&quot;;[.K17])); RIGHT([.K17]; LEN([.K17]) - FIND(&quot;:&quot;;[.K17]));&quot;&quot;)" office:value-type="string" office:string-value="m_leakdetect_voltage(volts)=2.47655677655678        0.101 secs ago" calcext:value-type="string">
            <text:p>m_leakdetect_voltage(volts)=2.47655677655678 <text:s text:c="7"/>0.101 secs ago</text:p>
          </table:table-cell>
          <table:table-cell table:formula="of:=IF(ISNUMBER(FIND(&quot; &quot;; [.L17])); LEFT([.L17]; FIND(&quot; &quot;; [.L17] &amp; &quot; &quot;; FIND(&quot; &quot;;[.L17])+1) - 1); [.L17])" office:value-type="string" office:string-value="m_leakdetect_voltage(volts)=2.47655677655678 " calcext:value-type="string">
            <text:p>m_leakdetect_voltage(volts)=2.47655677655678 </text:p>
          </table:table-cell>
          <table:table-cell table:formula="of:=IF(ISNUMBER(FIND(&quot;(&quot;; [.M17])); LEFT([.M17]; FIND(&quot;(&quot;; [.M17]) - 1); [.M17])" office:value-type="string" office:string-value="m_leakdetect_voltage" calcext:value-type="string">
            <text:p>m_leakdetect_voltage</text:p>
          </table:table-cell>
          <table:table-cell table:formula="of:=IF(ISNUMBER(FIND(&quot;=&quot;;[.M17])); RIGHT([.M17]; LEN([.M17]) - FIND(&quot;=&quot;;[.M17]));&quot;&quot;)" office:value-type="string" office:string-value="2.47655677655678 " calcext:value-type="string">
            <text:p>2.47655677655678 </text:p>
          </table:table-cell>
          <table:table-cell table:formula="of:=[$Checklist.T148]" office:value-type="float" office:value="0" calcext:value-type="float">
            <text:p>0</text:p>
          </table:table-cell>
          <table:table-cell table:formula="of:=IF(ISNUMBER(FIND(&quot;:&quot;;[.P17])); RIGHT([.P17]; LEN([.P17]) - FIND(&quot;:&quot;;[.P17]));&quot;&quot;)">
            <text:p/>
          </table:table-cell>
          <table:table-cell table:formula="of:=IF(ISNUMBER(FIND(&quot; &quot;; [.Q17])); LEFT([.Q17]; FIND(&quot; &quot;; [.Q17] &amp; &quot; &quot;; FIND(&quot; &quot;;[.Q17])+1) - 1); [.Q17])">
            <text:p/>
          </table:table-cell>
          <table:table-cell table:formula="of:=IF(ISNUMBER(FIND(&quot;(&quot;; [.R17])); LEFT([.R17]; FIND(&quot;(&quot;; [.R17]) - 1); [.R17])">
            <text:p/>
          </table:table-cell>
          <table:table-cell table:formula="of:=IF(ISNUMBER(FIND(&quot;=&quot;;[.R17])); RIGHT([.R17]; LEN([.R17]) - FIND(&quot;=&quot;;[.R17]));&quot;&quot;)">
            <text:p/>
          </table:table-cell>
          <table:table-cell table:number-columns-repeated="16364"/>
        </table:table-row>
        <table:table-row table:style-name="ro2">
          <table:table-cell table:number-columns-repeated="10"/>
          <table:table-cell table:formula="of:=[$Checklist.T50]" office:value-type="string" office:string-value="   sensor:m_leakdetect_voltage_forward(volts)=2.48180708180708        0.063 secs ago" calcext:value-type="string">
            <text:p><text:s text:c="3"/>sensor:m_leakdetect_voltage_forward(volts)=2.48180708180708 <text:s text:c="7"/>0.063 secs ago</text:p>
          </table:table-cell>
          <table:table-cell table:formula="of:=IF(ISNUMBER(FIND(&quot;:&quot;;[.K18])); RIGHT([.K18]; LEN([.K18]) - FIND(&quot;:&quot;;[.K18]));&quot;&quot;)" office:value-type="string" office:string-value="m_leakdetect_voltage_forward(volts)=2.48180708180708        0.063 secs ago" calcext:value-type="string">
            <text:p>m_leakdetect_voltage_forward(volts)=2.48180708180708 <text:s text:c="7"/>0.063 secs ago</text:p>
          </table:table-cell>
          <table:table-cell table:formula="of:=IF(ISNUMBER(FIND(&quot; &quot;; [.L18])); LEFT([.L18]; FIND(&quot; &quot;; [.L18] &amp; &quot; &quot;; FIND(&quot; &quot;;[.L18])+1) - 1); [.L18])" office:value-type="string" office:string-value="m_leakdetect_voltage_forward(volts)=2.48180708180708 " calcext:value-type="string">
            <text:p>m_leakdetect_voltage_forward(volts)=2.48180708180708 </text:p>
          </table:table-cell>
          <table:table-cell table:formula="of:=IF(ISNUMBER(FIND(&quot;(&quot;; [.M18])); LEFT([.M18]; FIND(&quot;(&quot;; [.M18]) - 1); [.M18])" office:value-type="string" office:string-value="m_leakdetect_voltage_forward" calcext:value-type="string">
            <text:p>m_leakdetect_voltage_forward</text:p>
          </table:table-cell>
          <table:table-cell table:formula="of:=IF(ISNUMBER(FIND(&quot;=&quot;;[.M18])); RIGHT([.M18]; LEN([.M18]) - FIND(&quot;=&quot;;[.M18]));&quot;&quot;)" office:value-type="string" office:string-value="2.48180708180708 " calcext:value-type="string">
            <text:p>2.48180708180708 </text:p>
          </table:table-cell>
          <table:table-cell table:formula="of:=[$Checklist.T149]" office:value-type="float" office:value="0" calcext:value-type="float">
            <text:p>0</text:p>
          </table:table-cell>
          <table:table-cell table:formula="of:=IF(ISNUMBER(FIND(&quot;:&quot;;[.P18])); RIGHT([.P18]; LEN([.P18]) - FIND(&quot;:&quot;;[.P18]));&quot;&quot;)">
            <text:p/>
          </table:table-cell>
          <table:table-cell table:formula="of:=IF(ISNUMBER(FIND(&quot; &quot;; [.Q18])); LEFT([.Q18]; FIND(&quot; &quot;; [.Q18] &amp; &quot; &quot;; FIND(&quot; &quot;;[.Q18])+1) - 1); [.Q18])">
            <text:p/>
          </table:table-cell>
          <table:table-cell table:formula="of:=IF(ISNUMBER(FIND(&quot;(&quot;; [.R18])); LEFT([.R18]; FIND(&quot;(&quot;; [.R18]) - 1); [.R18])">
            <text:p/>
          </table:table-cell>
          <table:table-cell table:formula="of:=IF(ISNUMBER(FIND(&quot;=&quot;;[.R18])); RIGHT([.R18]; LEN([.R18]) - FIND(&quot;=&quot;;[.R18]));&quot;&quot;)">
            <text:p/>
          </table:table-cell>
          <table:table-cell table:number-columns-repeated="16364"/>
        </table:table-row>
        <table:table-row table:style-name="ro2">
          <table:table-cell table:number-columns-repeated="10"/>
          <table:table-cell table:formula="of:=[$Checklist.T51]" office:value-type="string" office:string-value="   sensor:m_leakdetect_voltage_science(volts)=2.48495115995116        0.025 secs ago" calcext:value-type="string">
            <text:p><text:s text:c="3"/>sensor:m_leakdetect_voltage_science(volts)=2.48495115995116 <text:s text:c="7"/>0.025 secs ago</text:p>
          </table:table-cell>
          <table:table-cell table:formula="of:=IF(ISNUMBER(FIND(&quot;:&quot;;[.K19])); RIGHT([.K19]; LEN([.K19]) - FIND(&quot;:&quot;;[.K19]));&quot;&quot;)" office:value-type="string" office:string-value="m_leakdetect_voltage_science(volts)=2.48495115995116        0.025 secs ago" calcext:value-type="string">
            <text:p>m_leakdetect_voltage_science(volts)=2.48495115995116 <text:s text:c="7"/>0.025 secs ago</text:p>
          </table:table-cell>
          <table:table-cell table:formula="of:=IF(ISNUMBER(FIND(&quot; &quot;; [.L19])); LEFT([.L19]; FIND(&quot; &quot;; [.L19] &amp; &quot; &quot;; FIND(&quot; &quot;;[.L19])+1) - 1); [.L19])" office:value-type="string" office:string-value="m_leakdetect_voltage_science(volts)=2.48495115995116 " calcext:value-type="string">
            <text:p>m_leakdetect_voltage_science(volts)=2.48495115995116 </text:p>
          </table:table-cell>
          <table:table-cell table:formula="of:=IF(ISNUMBER(FIND(&quot;(&quot;; [.M19])); LEFT([.M19]; FIND(&quot;(&quot;; [.M19]) - 1); [.M19])" office:value-type="string" office:string-value="m_leakdetect_voltage_science" calcext:value-type="string">
            <text:p>m_leakdetect_voltage_science</text:p>
          </table:table-cell>
          <table:table-cell table:formula="of:=IF(ISNUMBER(FIND(&quot;=&quot;;[.M19])); RIGHT([.M19]; LEN([.M19]) - FIND(&quot;=&quot;;[.M19]));&quot;&quot;)" office:value-type="string" office:string-value="2.48495115995116 " calcext:value-type="string">
            <text:p>2.48495115995116 </text:p>
          </table:table-cell>
          <table:table-cell table:formula="of:=[$Checklist.T150]" office:value-type="float" office:value="0" calcext:value-type="float">
            <text:p>0</text:p>
          </table:table-cell>
          <table:table-cell table:formula="of:=IF(ISNUMBER(FIND(&quot;:&quot;;[.P19])); RIGHT([.P19]; LEN([.P19]) - FIND(&quot;:&quot;;[.P19]));&quot;&quot;)">
            <text:p/>
          </table:table-cell>
          <table:table-cell table:formula="of:=IF(ISNUMBER(FIND(&quot; &quot;; [.Q19])); LEFT([.Q19]; FIND(&quot; &quot;; [.Q19] &amp; &quot; &quot;; FIND(&quot; &quot;;[.Q19])+1) - 1); [.Q19])">
            <text:p/>
          </table:table-cell>
          <table:table-cell table:formula="of:=IF(ISNUMBER(FIND(&quot;(&quot;; [.R19])); LEFT([.R19]; FIND(&quot;(&quot;; [.R19]) - 1); [.R19])">
            <text:p/>
          </table:table-cell>
          <table:table-cell table:formula="of:=IF(ISNUMBER(FIND(&quot;=&quot;;[.R19])); RIGHT([.R19]; LEN([.R19]) - FIND(&quot;=&quot;;[.R19]));&quot;&quot;)">
            <text:p/>
          </table:table-cell>
          <table:table-cell table:number-columns-repeated="16364"/>
        </table:table-row>
        <table:table-row table:style-name="ro2">
          <table:table-cell table:number-columns-repeated="10"/>
          <table:table-cell table:formula="of:=[$Checklist.T52]" office:value-type="string" office:string-value="   sensor:m_lithium_battery_relative_charge(%)=79.1535413953489        0.381 secs ago" calcext:value-type="string">
            <text:p><text:s text:c="3"/>sensor:m_lithium_battery_relative_charge(%)=79.1535413953489 <text:s text:c="7"/>0.381 secs ago</text:p>
          </table:table-cell>
          <table:table-cell table:formula="of:=IF(ISNUMBER(FIND(&quot;:&quot;;[.K20])); RIGHT([.K20]; LEN([.K20]) - FIND(&quot;:&quot;;[.K20]));&quot;&quot;)" office:value-type="string" office:string-value="m_lithium_battery_relative_charge(%)=79.1535413953489        0.381 secs ago" calcext:value-type="string">
            <text:p>m_lithium_battery_relative_charge(%)=79.1535413953489 <text:s text:c="7"/>0.381 secs ago</text:p>
          </table:table-cell>
          <table:table-cell table:formula="of:=IF(ISNUMBER(FIND(&quot; &quot;; [.L20])); LEFT([.L20]; FIND(&quot; &quot;; [.L20] &amp; &quot; &quot;; FIND(&quot; &quot;;[.L20])+1) - 1); [.L20])" office:value-type="string" office:string-value="m_lithium_battery_relative_charge(%)=79.1535413953489 " calcext:value-type="string">
            <text:p>m_lithium_battery_relative_charge(%)=79.1535413953489 </text:p>
          </table:table-cell>
          <table:table-cell table:formula="of:=IF(ISNUMBER(FIND(&quot;(&quot;; [.M20])); LEFT([.M20]; FIND(&quot;(&quot;; [.M20]) - 1); [.M20])" office:value-type="string" office:string-value="m_lithium_battery_relative_charge" calcext:value-type="string">
            <text:p>m_lithium_battery_relative_charge</text:p>
          </table:table-cell>
          <table:table-cell table:formula="of:=IF(ISNUMBER(FIND(&quot;=&quot;;[.M20])); RIGHT([.M20]; LEN([.M20]) - FIND(&quot;=&quot;;[.M20]));&quot;&quot;)" office:value-type="string" office:string-value="79.1535413953489 " calcext:value-type="string">
            <text:p>79.1535413953489 </text:p>
          </table:table-cell>
          <table:table-cell table:formula="of:=[$Checklist.T151]" office:value-type="float" office:value="0" calcext:value-type="float">
            <text:p>0</text:p>
          </table:table-cell>
          <table:table-cell table:formula="of:=IF(ISNUMBER(FIND(&quot;:&quot;;[.P20])); RIGHT([.P20]; LEN([.P20]) - FIND(&quot;:&quot;;[.P20]));&quot;&quot;)">
            <text:p/>
          </table:table-cell>
          <table:table-cell table:formula="of:=IF(ISNUMBER(FIND(&quot; &quot;; [.Q20])); LEFT([.Q20]; FIND(&quot; &quot;; [.Q20] &amp; &quot; &quot;; FIND(&quot; &quot;;[.Q20])+1) - 1); [.Q20])">
            <text:p/>
          </table:table-cell>
          <table:table-cell table:formula="of:=IF(ISNUMBER(FIND(&quot;(&quot;; [.R20])); LEFT([.R20]; FIND(&quot;(&quot;; [.R20]) - 1); [.R20])">
            <text:p/>
          </table:table-cell>
          <table:table-cell table:formula="of:=IF(ISNUMBER(FIND(&quot;=&quot;;[.R20])); RIGHT([.R20]; LEN([.R20]) - FIND(&quot;=&quot;;[.R20]));&quot;&quot;)">
            <text:p/>
          </table:table-cell>
          <table:table-cell table:number-columns-repeated="16364"/>
        </table:table-row>
        <table:table-row table:style-name="ro2">
          <table:table-cell table:number-columns-repeated="10"/>
          <table:table-cell table:formula="of:=[$Checklist.T53]" office:value-type="string" office:string-value="   sensor:m_vacuum(inHg)=9.56216344322344             0.2 secs ago" calcext:value-type="string">
            <text:p><text:s text:c="3"/>sensor:m_vacuum(inHg)=9.56216344322344 <text:s text:c="12"/>0.2 secs ago</text:p>
          </table:table-cell>
          <table:table-cell table:formula="of:=IF(ISNUMBER(FIND(&quot;:&quot;;[.K21])); RIGHT([.K21]; LEN([.K21]) - FIND(&quot;:&quot;;[.K21]));&quot;&quot;)" office:value-type="string" office:string-value="m_vacuum(inHg)=9.56216344322344             0.2 secs ago" calcext:value-type="string">
            <text:p>m_vacuum(inHg)=9.56216344322344 <text:s text:c="12"/>0.2 secs ago</text:p>
          </table:table-cell>
          <table:table-cell table:formula="of:=IF(ISNUMBER(FIND(&quot; &quot;; [.L21])); LEFT([.L21]; FIND(&quot; &quot;; [.L21] &amp; &quot; &quot;; FIND(&quot; &quot;;[.L21])+1) - 1); [.L21])" office:value-type="string" office:string-value="m_vacuum(inHg)=9.56216344322344 " calcext:value-type="string">
            <text:p>m_vacuum(inHg)=9.56216344322344 </text:p>
          </table:table-cell>
          <table:table-cell table:formula="of:=IF(ISNUMBER(FIND(&quot;(&quot;; [.M21])); LEFT([.M21]; FIND(&quot;(&quot;; [.M21]) - 1); [.M21])" office:value-type="string" office:string-value="m_vacuum" calcext:value-type="string">
            <text:p>m_vacuum</text:p>
          </table:table-cell>
          <table:table-cell table:formula="of:=IF(ISNUMBER(FIND(&quot;=&quot;;[.M21])); RIGHT([.M21]; LEN([.M21]) - FIND(&quot;=&quot;;[.M21]));&quot;&quot;)" office:value-type="string" office:string-value="9.56216344322344 " calcext:value-type="string">
            <text:p>9.56216344322344 </text:p>
          </table:table-cell>
          <table:table-cell table:formula="of:=[$Checklist.T152]" office:value-type="float" office:value="0" calcext:value-type="float">
            <text:p>0</text:p>
          </table:table-cell>
          <table:table-cell table:formula="of:=IF(ISNUMBER(FIND(&quot;:&quot;;[.P21])); RIGHT([.P21]; LEN([.P21]) - FIND(&quot;:&quot;;[.P21]));&quot;&quot;)">
            <text:p/>
          </table:table-cell>
          <table:table-cell table:formula="of:=IF(ISNUMBER(FIND(&quot; &quot;; [.Q21])); LEFT([.Q21]; FIND(&quot; &quot;; [.Q21] &amp; &quot; &quot;; FIND(&quot; &quot;;[.Q21])+1) - 1); [.Q21])">
            <text:p/>
          </table:table-cell>
          <table:table-cell table:formula="of:=IF(ISNUMBER(FIND(&quot;(&quot;; [.R21])); LEFT([.R21]; FIND(&quot;(&quot;; [.R21]) - 1); [.R21])">
            <text:p/>
          </table:table-cell>
          <table:table-cell table:formula="of:=IF(ISNUMBER(FIND(&quot;=&quot;;[.R21])); RIGHT([.R21]; LEN([.R21]) - FIND(&quot;=&quot;;[.R21]));&quot;&quot;)">
            <text:p/>
          </table:table-cell>
          <table:table-cell table:number-columns-repeated="16364"/>
        </table:table-row>
        <table:table-row table:style-name="ro2">
          <table:table-cell table:number-columns-repeated="10"/>
          <table:table-cell table:formula="of:=[$Checklist.T54]" office:value-type="string" office:string-value="   sensor:m_water_vx(m/s)=0                        1e+308 secs ago" calcext:value-type="string">
            <text:p><text:s text:c="3"/>sensor:m_water_vx(m/s)=0 <text:s text:c="23"/>1e+308 secs ago</text:p>
          </table:table-cell>
          <table:table-cell table:formula="of:=IF(ISNUMBER(FIND(&quot;:&quot;;[.K22])); RIGHT([.K22]; LEN([.K22]) - FIND(&quot;:&quot;;[.K22]));&quot;&quot;)" office:value-type="string" office:string-value="m_water_vx(m/s)=0                        1e+308 secs ago" calcext:value-type="string">
            <text:p>m_water_vx(m/s)=0 <text:s text:c="23"/>1e+308 secs ago</text:p>
          </table:table-cell>
          <table:table-cell table:formula="of:=IF(ISNUMBER(FIND(&quot; &quot;; [.L22])); LEFT([.L22]; FIND(&quot; &quot;; [.L22] &amp; &quot; &quot;; FIND(&quot; &quot;;[.L22])+1) - 1); [.L22])" office:value-type="string" office:string-value="m_water_vx(m/s)=0 " calcext:value-type="string">
            <text:p>m_water_vx(m/s)=0 </text:p>
          </table:table-cell>
          <table:table-cell table:formula="of:=IF(ISNUMBER(FIND(&quot;(&quot;; [.M22])); LEFT([.M22]; FIND(&quot;(&quot;; [.M22]) - 1); [.M22])" office:value-type="string" office:string-value="m_water_vx" calcext:value-type="string">
            <text:p>m_water_vx</text:p>
          </table:table-cell>
          <table:table-cell table:formula="of:=IF(ISNUMBER(FIND(&quot;=&quot;;[.M22])); RIGHT([.M22]; LEN([.M22]) - FIND(&quot;=&quot;;[.M22]));&quot;&quot;)" office:value-type="string" office:string-value="0 " calcext:value-type="string">
            <text:p>0 </text:p>
          </table:table-cell>
          <table:table-cell table:formula="of:=[$Checklist.T154]" office:value-type="float" office:value="0" calcext:value-type="float">
            <text:p>0</text:p>
          </table:table-cell>
          <table:table-cell table:formula="of:=IF(ISNUMBER(FIND(&quot;:&quot;;[.P22])); RIGHT([.P22]; LEN([.P22]) - FIND(&quot;:&quot;;[.P22]));&quot;&quot;)">
            <text:p/>
          </table:table-cell>
          <table:table-cell table:formula="of:=IF(ISNUMBER(FIND(&quot; &quot;; [.Q22])); LEFT([.Q22]; FIND(&quot; &quot;; [.Q22] &amp; &quot; &quot;; FIND(&quot; &quot;;[.Q22])+1) - 1); [.Q22])">
            <text:p/>
          </table:table-cell>
          <table:table-cell table:formula="of:=IF(ISNUMBER(FIND(&quot;(&quot;; [.R22])); LEFT([.R22]; FIND(&quot;(&quot;; [.R22]) - 1); [.R22])">
            <text:p/>
          </table:table-cell>
          <table:table-cell table:formula="of:=IF(ISNUMBER(FIND(&quot;=&quot;;[.R22])); RIGHT([.R22]; LEN([.R22]) - FIND(&quot;=&quot;;[.R22]));&quot;&quot;)">
            <text:p/>
          </table:table-cell>
          <table:table-cell table:number-columns-repeated="16364"/>
        </table:table-row>
        <table:table-row table:style-name="ro2">
          <table:table-cell table:number-columns-repeated="10"/>
          <table:table-cell table:formula="of:=[$Checklist.T55]" office:value-type="string" office:string-value="   sensor:m_water_vy(m/s)=0                        1e+308 secs ago" calcext:value-type="string">
            <text:p><text:s text:c="3"/>sensor:m_water_vy(m/s)=0 <text:s text:c="23"/>1e+308 secs ago</text:p>
          </table:table-cell>
          <table:table-cell table:formula="of:=IF(ISNUMBER(FIND(&quot;:&quot;;[.K23])); RIGHT([.K23]; LEN([.K23]) - FIND(&quot;:&quot;;[.K23]));&quot;&quot;)" office:value-type="string" office:string-value="m_water_vy(m/s)=0                        1e+308 secs ago" calcext:value-type="string">
            <text:p>m_water_vy(m/s)=0 <text:s text:c="23"/>1e+308 secs ago</text:p>
          </table:table-cell>
          <table:table-cell table:formula="of:=IF(ISNUMBER(FIND(&quot; &quot;; [.L23])); LEFT([.L23]; FIND(&quot; &quot;; [.L23] &amp; &quot; &quot;; FIND(&quot; &quot;;[.L23])+1) - 1); [.L23])" office:value-type="string" office:string-value="m_water_vy(m/s)=0 " calcext:value-type="string">
            <text:p>m_water_vy(m/s)=0 </text:p>
          </table:table-cell>
          <table:table-cell table:formula="of:=IF(ISNUMBER(FIND(&quot;(&quot;; [.M23])); LEFT([.M23]; FIND(&quot;(&quot;; [.M23]) - 1); [.M23])" office:value-type="string" office:string-value="m_water_vy" calcext:value-type="string">
            <text:p>m_water_vy</text:p>
          </table:table-cell>
          <table:table-cell table:formula="of:=IF(ISNUMBER(FIND(&quot;=&quot;;[.M23])); RIGHT([.M23]; LEN([.M23]) - FIND(&quot;=&quot;;[.M23]));&quot;&quot;)" office:value-type="string" office:string-value="0 " calcext:value-type="string">
            <text:p>0 </text:p>
          </table:table-cell>
          <table:table-cell table:formula="of:=[$Checklist.T155]" office:value-type="float" office:value="0" calcext:value-type="float">
            <text:p>0</text:p>
          </table:table-cell>
          <table:table-cell table:formula="of:=IF(ISNUMBER(FIND(&quot;:&quot;;[.P23])); RIGHT([.P23]; LEN([.P23]) - FIND(&quot;:&quot;;[.P23]));&quot;&quot;)">
            <text:p/>
          </table:table-cell>
          <table:table-cell table:formula="of:=IF(ISNUMBER(FIND(&quot; &quot;; [.Q23])); LEFT([.Q23]; FIND(&quot; &quot;; [.Q23] &amp; &quot; &quot;; FIND(&quot; &quot;;[.Q23])+1) - 1); [.Q23])">
            <text:p/>
          </table:table-cell>
          <table:table-cell table:formula="of:=IF(ISNUMBER(FIND(&quot;(&quot;; [.R23])); LEFT([.R23]; FIND(&quot;(&quot;; [.R23]) - 1); [.R23])">
            <text:p/>
          </table:table-cell>
          <table:table-cell table:formula="of:=IF(ISNUMBER(FIND(&quot;=&quot;;[.R23])); RIGHT([.R23]; LEN([.R23]) - FIND(&quot;=&quot;;[.R23]));&quot;&quot;)">
            <text:p/>
          </table:table-cell>
          <table:table-cell table:number-columns-repeated="16364"/>
        </table:table-row>
        <table:table-row table:style-name="ro2">
          <table:table-cell table:number-columns-repeated="10"/>
          <table:table-cell table:formula="of:=[$Checklist.T56]" office:value-type="string" office:string-value="   sensor:u_alt_min_depth(m)=2                     1e+308 secs ago" calcext:value-type="string">
            <text:p><text:s text:c="3"/>sensor:u_alt_min_depth(m)=2 <text:s text:c="20"/>1e+308 secs ago</text:p>
          </table:table-cell>
          <table:table-cell table:formula="of:=IF(ISNUMBER(FIND(&quot;:&quot;;[.K24])); RIGHT([.K24]; LEN([.K24]) - FIND(&quot;:&quot;;[.K24]));&quot;&quot;)" office:value-type="string" office:string-value="u_alt_min_depth(m)=2                     1e+308 secs ago" calcext:value-type="string">
            <text:p>u_alt_min_depth(m)=2 <text:s text:c="20"/>1e+308 secs ago</text:p>
          </table:table-cell>
          <table:table-cell table:formula="of:=IF(ISNUMBER(FIND(&quot; &quot;; [.L24])); LEFT([.L24]; FIND(&quot; &quot;; [.L24] &amp; &quot; &quot;; FIND(&quot; &quot;;[.L24])+1) - 1); [.L24])" office:value-type="string" office:string-value="u_alt_min_depth(m)=2 " calcext:value-type="string">
            <text:p>u_alt_min_depth(m)=2 </text:p>
          </table:table-cell>
          <table:table-cell table:formula="of:=IF(ISNUMBER(FIND(&quot;(&quot;; [.M24])); LEFT([.M24]; FIND(&quot;(&quot;; [.M24]) - 1); [.M24])" office:value-type="string" office:string-value="u_alt_min_depth" calcext:value-type="string">
            <text:p>u_alt_min_depth</text:p>
          </table:table-cell>
          <table:table-cell table:formula="of:=IF(ISNUMBER(FIND(&quot;=&quot;;[.M24])); RIGHT([.M24]; LEN([.M24]) - FIND(&quot;=&quot;;[.M24]));&quot;&quot;)" office:value-type="string" office:string-value="2 " calcext:value-type="string">
            <text:p>2 </text:p>
          </table:table-cell>
          <table:table-cell table:formula="of:=[$Checklist.T156]" office:value-type="float" office:value="0" calcext:value-type="float">
            <text:p>0</text:p>
          </table:table-cell>
          <table:table-cell table:formula="of:=IF(ISNUMBER(FIND(&quot;:&quot;;[.P24])); RIGHT([.P24]; LEN([.P24]) - FIND(&quot;:&quot;;[.P24]));&quot;&quot;)">
            <text:p/>
          </table:table-cell>
          <table:table-cell table:formula="of:=IF(ISNUMBER(FIND(&quot; &quot;; [.Q24])); LEFT([.Q24]; FIND(&quot; &quot;; [.Q24] &amp; &quot; &quot;; FIND(&quot; &quot;;[.Q24])+1) - 1); [.Q24])">
            <text:p/>
          </table:table-cell>
          <table:table-cell table:formula="of:=IF(ISNUMBER(FIND(&quot;(&quot;; [.R24])); LEFT([.R24]; FIND(&quot;(&quot;; [.R24]) - 1); [.R24])">
            <text:p/>
          </table:table-cell>
          <table:table-cell table:formula="of:=IF(ISNUMBER(FIND(&quot;=&quot;;[.R24])); RIGHT([.R24]; LEN([.R24]) - FIND(&quot;=&quot;;[.R24]));&quot;&quot;)">
            <text:p/>
          </table:table-cell>
          <table:table-cell table:number-columns-repeated="16364"/>
        </table:table-row>
        <table:table-row table:style-name="ro2">
          <table:table-cell table:number-columns-repeated="10"/>
          <table:table-cell table:formula="of:=[$Checklist.T57]" office:value-type="float" office:value="0" calcext:value-type="float">
            <text:p>0</text:p>
          </table:table-cell>
          <table:table-cell table:formula="of:=IF(ISNUMBER(FIND(&quot;:&quot;;[.K25])); RIGHT([.K25]; LEN([.K25]) - FIND(&quot;:&quot;;[.K25]));&quot;&quot;)">
            <text:p/>
          </table:table-cell>
          <table:table-cell table:formula="of:=IF(ISNUMBER(FIND(&quot; &quot;; [.L25])); LEFT([.L25]; FIND(&quot; &quot;; [.L25] &amp; &quot; &quot;; FIND(&quot; &quot;;[.L25])+1) - 1); [.L25])">
            <text:p/>
          </table:table-cell>
          <table:table-cell table:formula="of:=IF(ISNUMBER(FIND(&quot;(&quot;; [.M25])); LEFT([.M25]; FIND(&quot;(&quot;; [.M25]) - 1); [.M25])">
            <text:p/>
          </table:table-cell>
          <table:table-cell table:formula="of:=IF(ISNUMBER(FIND(&quot;=&quot;;[.M25])); RIGHT([.M25]; LEN([.M25]) - FIND(&quot;=&quot;;[.M25]));&quot;&quot;)">
            <text:p/>
          </table:table-cell>
          <table:table-cell table:formula="of:=[$Checklist.T157]" office:value-type="float" office:value="0" calcext:value-type="float">
            <text:p>0</text:p>
          </table:table-cell>
          <table:table-cell table:formula="of:=IF(ISNUMBER(FIND(&quot;:&quot;;[.P25])); RIGHT([.P25]; LEN([.P25]) - FIND(&quot;:&quot;;[.P25]));&quot;&quot;)">
            <text:p/>
          </table:table-cell>
          <table:table-cell table:formula="of:=IF(ISNUMBER(FIND(&quot; &quot;; [.Q25])); LEFT([.Q25]; FIND(&quot; &quot;; [.Q25] &amp; &quot; &quot;; FIND(&quot; &quot;;[.Q25])+1) - 1); [.Q25])">
            <text:p/>
          </table:table-cell>
          <table:table-cell table:formula="of:=IF(ISNUMBER(FIND(&quot;(&quot;; [.R25])); LEFT([.R25]; FIND(&quot;(&quot;; [.R25]) - 1); [.R25])">
            <text:p/>
          </table:table-cell>
          <table:table-cell table:formula="of:=IF(ISNUMBER(FIND(&quot;=&quot;;[.R25])); RIGHT([.R25]; LEN([.R25]) - FIND(&quot;=&quot;;[.R25]));&quot;&quot;)">
            <text:p/>
          </table:table-cell>
          <table:table-cell table:number-columns-repeated="16364"/>
        </table:table-row>
        <table:table-row table:style-name="ro2">
          <table:table-cell table:number-columns-repeated="10"/>
          <table:table-cell table:formula="of:=[$Checklist.T58]" office:value-type="float" office:value="0" calcext:value-type="float">
            <text:p>0</text:p>
          </table:table-cell>
          <table:table-cell table:formula="of:=IF(ISNUMBER(FIND(&quot;:&quot;;[.K26])); RIGHT([.K26]; LEN([.K26]) - FIND(&quot;:&quot;;[.K26]));&quot;&quot;)">
            <text:p/>
          </table:table-cell>
          <table:table-cell table:formula="of:=IF(ISNUMBER(FIND(&quot; &quot;; [.L26])); LEFT([.L26]; FIND(&quot; &quot;; [.L26] &amp; &quot; &quot;; FIND(&quot; &quot;;[.L26])+1) - 1); [.L26])">
            <text:p/>
          </table:table-cell>
          <table:table-cell table:formula="of:=IF(ISNUMBER(FIND(&quot;(&quot;; [.M26])); LEFT([.M26]; FIND(&quot;(&quot;; [.M26]) - 1); [.M26])">
            <text:p/>
          </table:table-cell>
          <table:table-cell table:formula="of:=IF(ISNUMBER(FIND(&quot;=&quot;;[.M26])); RIGHT([.M26]; LEN([.M26]) - FIND(&quot;=&quot;;[.M26]));&quot;&quot;)">
            <text:p/>
          </table:table-cell>
          <table:table-cell table:formula="of:=[$Checklist.T159]" office:value-type="float" office:value="0" calcext:value-type="float">
            <text:p>0</text:p>
          </table:table-cell>
          <table:table-cell table:formula="of:=IF(ISNUMBER(FIND(&quot;:&quot;;[.P26])); RIGHT([.P26]; LEN([.P26]) - FIND(&quot;:&quot;;[.P26]));&quot;&quot;)">
            <text:p/>
          </table:table-cell>
          <table:table-cell table:formula="of:=IF(ISNUMBER(FIND(&quot; &quot;; [.Q26])); LEFT([.Q26]; FIND(&quot; &quot;; [.Q26] &amp; &quot; &quot;; FIND(&quot; &quot;;[.Q26])+1) - 1); [.Q26])">
            <text:p/>
          </table:table-cell>
          <table:table-cell table:formula="of:=IF(ISNUMBER(FIND(&quot;(&quot;; [.R26])); LEFT([.R26]; FIND(&quot;(&quot;; [.R26]) - 1); [.R26])">
            <text:p/>
          </table:table-cell>
          <table:table-cell table:formula="of:=IF(ISNUMBER(FIND(&quot;=&quot;;[.R26])); RIGHT([.R26]; LEN([.R26]) - FIND(&quot;=&quot;;[.R26]));&quot;&quot;)">
            <text:p/>
          </table:table-cell>
          <table:table-cell table:number-columns-repeated="16364"/>
        </table:table-row>
        <table:table-row table:style-name="ro2">
          <table:table-cell table:number-columns-repeated="10"/>
          <table:table-cell table:formula="of:=[$Checklist.T59]" office:value-type="float" office:value="0" calcext:value-type="float">
            <text:p>0</text:p>
          </table:table-cell>
          <table:table-cell table:formula="of:=IF(ISNUMBER(FIND(&quot;:&quot;;[.K27])); RIGHT([.K27]; LEN([.K27]) - FIND(&quot;:&quot;;[.K27]));&quot;&quot;)">
            <text:p/>
          </table:table-cell>
          <table:table-cell table:formula="of:=IF(ISNUMBER(FIND(&quot; &quot;; [.L27])); LEFT([.L27]; FIND(&quot; &quot;; [.L27] &amp; &quot; &quot;; FIND(&quot; &quot;;[.L27])+1) - 1); [.L27])">
            <text:p/>
          </table:table-cell>
          <table:table-cell table:formula="of:=IF(ISNUMBER(FIND(&quot;(&quot;; [.M27])); LEFT([.M27]; FIND(&quot;(&quot;; [.M27]) - 1); [.M27])">
            <text:p/>
          </table:table-cell>
          <table:table-cell table:formula="of:=IF(ISNUMBER(FIND(&quot;=&quot;;[.M27])); RIGHT([.M27]; LEN([.M27]) - FIND(&quot;=&quot;;[.M27]));&quot;&quot;)">
            <text:p/>
          </table:table-cell>
          <table:table-cell table:formula="of:=[$Checklist.T160]" office:value-type="float" office:value="0" calcext:value-type="float">
            <text:p>0</text:p>
          </table:table-cell>
          <table:table-cell table:formula="of:=IF(ISNUMBER(FIND(&quot;:&quot;;[.P27])); RIGHT([.P27]; LEN([.P27]) - FIND(&quot;:&quot;;[.P27]));&quot;&quot;)">
            <text:p/>
          </table:table-cell>
          <table:table-cell table:formula="of:=IF(ISNUMBER(FIND(&quot; &quot;; [.Q27])); LEFT([.Q27]; FIND(&quot; &quot;; [.Q27] &amp; &quot; &quot;; FIND(&quot; &quot;;[.Q27])+1) - 1); [.Q27])">
            <text:p/>
          </table:table-cell>
          <table:table-cell table:formula="of:=IF(ISNUMBER(FIND(&quot;(&quot;; [.R27])); LEFT([.R27]; FIND(&quot;(&quot;; [.R27]) - 1); [.R27])">
            <text:p/>
          </table:table-cell>
          <table:table-cell table:formula="of:=IF(ISNUMBER(FIND(&quot;=&quot;;[.R27])); RIGHT([.R27]; LEN([.R27]) - FIND(&quot;=&quot;;[.R27]));&quot;&quot;)">
            <text:p/>
          </table:table-cell>
          <table:table-cell table:number-columns-repeated="16364"/>
        </table:table-row>
        <table:table-row table:style-name="ro2">
          <table:table-cell table:number-columns-repeated="10"/>
          <table:table-cell table:formula="of:=[$Checklist.T60]" office:value-type="float" office:value="0" calcext:value-type="float">
            <text:p>0</text:p>
          </table:table-cell>
          <table:table-cell table:formula="of:=IF(ISNUMBER(FIND(&quot;:&quot;;[.K28])); RIGHT([.K28]; LEN([.K28]) - FIND(&quot;:&quot;;[.K28]));&quot;&quot;)">
            <text:p/>
          </table:table-cell>
          <table:table-cell table:formula="of:=IF(ISNUMBER(FIND(&quot; &quot;; [.L28])); LEFT([.L28]; FIND(&quot; &quot;; [.L28] &amp; &quot; &quot;; FIND(&quot; &quot;;[.L28])+1) - 1); [.L28])">
            <text:p/>
          </table:table-cell>
          <table:table-cell table:formula="of:=IF(ISNUMBER(FIND(&quot;(&quot;; [.M28])); LEFT([.M28]; FIND(&quot;(&quot;; [.M28]) - 1); [.M28])">
            <text:p/>
          </table:table-cell>
          <table:table-cell table:formula="of:=IF(ISNUMBER(FIND(&quot;=&quot;;[.M28])); RIGHT([.M28]; LEN([.M28]) - FIND(&quot;=&quot;;[.M28]));&quot;&quot;)">
            <text:p/>
          </table:table-cell>
          <table:table-cell table:formula="of:=[$Checklist.T161]" office:value-type="float" office:value="0" calcext:value-type="float">
            <text:p>0</text:p>
          </table:table-cell>
          <table:table-cell table:formula="of:=IF(ISNUMBER(FIND(&quot;:&quot;;[.P28])); RIGHT([.P28]; LEN([.P28]) - FIND(&quot;:&quot;;[.P28]));&quot;&quot;)">
            <text:p/>
          </table:table-cell>
          <table:table-cell table:formula="of:=IF(ISNUMBER(FIND(&quot; &quot;; [.Q28])); LEFT([.Q28]; FIND(&quot; &quot;; [.Q28] &amp; &quot; &quot;; FIND(&quot; &quot;;[.Q28])+1) - 1); [.Q28])">
            <text:p/>
          </table:table-cell>
          <table:table-cell table:formula="of:=IF(ISNUMBER(FIND(&quot;(&quot;; [.R28])); LEFT([.R28]; FIND(&quot;(&quot;; [.R28]) - 1); [.R28])">
            <text:p/>
          </table:table-cell>
          <table:table-cell table:formula="of:=IF(ISNUMBER(FIND(&quot;=&quot;;[.R28])); RIGHT([.R28]; LEN([.R28]) - FIND(&quot;=&quot;;[.R28]));&quot;&quot;)">
            <text:p/>
          </table:table-cell>
          <table:table-cell table:number-columns-repeated="16364"/>
        </table:table-row>
        <table:table-row table:style-name="ro2">
          <table:table-cell table:number-columns-repeated="10"/>
          <table:table-cell table:formula="of:=[$Checklist.T61]" office:value-type="float" office:value="0" calcext:value-type="float">
            <text:p>0</text:p>
          </table:table-cell>
          <table:table-cell table:formula="of:=IF(ISNUMBER(FIND(&quot;:&quot;;[.K29])); RIGHT([.K29]; LEN([.K29]) - FIND(&quot;:&quot;;[.K29]));&quot;&quot;)">
            <text:p/>
          </table:table-cell>
          <table:table-cell table:formula="of:=IF(ISNUMBER(FIND(&quot; &quot;; [.L29])); LEFT([.L29]; FIND(&quot; &quot;; [.L29] &amp; &quot; &quot;; FIND(&quot; &quot;;[.L29])+1) - 1); [.L29])">
            <text:p/>
          </table:table-cell>
          <table:table-cell table:formula="of:=IF(ISNUMBER(FIND(&quot;(&quot;; [.M29])); LEFT([.M29]; FIND(&quot;(&quot;; [.M29]) - 1); [.M29])">
            <text:p/>
          </table:table-cell>
          <table:table-cell table:formula="of:=IF(ISNUMBER(FIND(&quot;=&quot;;[.M29])); RIGHT([.M29]; LEN([.M29]) - FIND(&quot;=&quot;;[.M29]));&quot;&quot;)">
            <text:p/>
          </table:table-cell>
          <table:table-cell table:formula="of:=[$Checklist.T162]" office:value-type="float" office:value="0" calcext:value-type="float">
            <text:p>0</text:p>
          </table:table-cell>
          <table:table-cell table:formula="of:=IF(ISNUMBER(FIND(&quot;:&quot;;[.P29])); RIGHT([.P29]; LEN([.P29]) - FIND(&quot;:&quot;;[.P29]));&quot;&quot;)">
            <text:p/>
          </table:table-cell>
          <table:table-cell table:formula="of:=IF(ISNUMBER(FIND(&quot; &quot;; [.Q29])); LEFT([.Q29]; FIND(&quot; &quot;; [.Q29] &amp; &quot; &quot;; FIND(&quot; &quot;;[.Q29])+1) - 1); [.Q29])">
            <text:p/>
          </table:table-cell>
          <table:table-cell table:formula="of:=IF(ISNUMBER(FIND(&quot;(&quot;; [.R29])); LEFT([.R29]; FIND(&quot;(&quot;; [.R29]) - 1); [.R29])">
            <text:p/>
          </table:table-cell>
          <table:table-cell table:formula="of:=IF(ISNUMBER(FIND(&quot;=&quot;;[.R29])); RIGHT([.R29]; LEN([.R29]) - FIND(&quot;=&quot;;[.R29]));&quot;&quot;)">
            <text:p/>
          </table:table-cell>
          <table:table-cell table:number-columns-repeated="16364"/>
        </table:table-row>
        <table:table-row table:style-name="ro2">
          <table:table-cell table:number-columns-repeated="10"/>
          <table:table-cell table:formula="of:=[$Checklist.T62]" office:value-type="float" office:value="0" calcext:value-type="float">
            <text:p>0</text:p>
          </table:table-cell>
          <table:table-cell table:formula="of:=IF(ISNUMBER(FIND(&quot;:&quot;;[.K30])); RIGHT([.K30]; LEN([.K30]) - FIND(&quot;:&quot;;[.K30]));&quot;&quot;)">
            <text:p/>
          </table:table-cell>
          <table:table-cell table:formula="of:=IF(ISNUMBER(FIND(&quot; &quot;; [.L30])); LEFT([.L30]; FIND(&quot; &quot;; [.L30] &amp; &quot; &quot;; FIND(&quot; &quot;;[.L30])+1) - 1); [.L30])">
            <text:p/>
          </table:table-cell>
          <table:table-cell table:formula="of:=IF(ISNUMBER(FIND(&quot;(&quot;; [.M30])); LEFT([.M30]; FIND(&quot;(&quot;; [.M30]) - 1); [.M30])">
            <text:p/>
          </table:table-cell>
          <table:table-cell table:formula="of:=IF(ISNUMBER(FIND(&quot;=&quot;;[.M30])); RIGHT([.M30]; LEN([.M30]) - FIND(&quot;=&quot;;[.M30]));&quot;&quot;)">
            <text:p/>
          </table:table-cell>
          <table:table-cell table:formula="of:=[$Checklist.T163]" office:value-type="float" office:value="0" calcext:value-type="float">
            <text:p>0</text:p>
          </table:table-cell>
          <table:table-cell table:formula="of:=IF(ISNUMBER(FIND(&quot;:&quot;;[.P30])); RIGHT([.P30]; LEN([.P30]) - FIND(&quot;:&quot;;[.P30]));&quot;&quot;)">
            <text:p/>
          </table:table-cell>
          <table:table-cell table:formula="of:=IF(ISNUMBER(FIND(&quot; &quot;; [.Q30])); LEFT([.Q30]; FIND(&quot; &quot;; [.Q30] &amp; &quot; &quot;; FIND(&quot; &quot;;[.Q30])+1) - 1); [.Q30])">
            <text:p/>
          </table:table-cell>
          <table:table-cell table:formula="of:=IF(ISNUMBER(FIND(&quot;(&quot;; [.R30])); LEFT([.R30]; FIND(&quot;(&quot;; [.R30]) - 1); [.R30])">
            <text:p/>
          </table:table-cell>
          <table:table-cell table:formula="of:=IF(ISNUMBER(FIND(&quot;=&quot;;[.R30])); RIGHT([.R30]; LEN([.R30]) - FIND(&quot;=&quot;;[.R30]));&quot;&quot;)">
            <text:p/>
          </table:table-cell>
          <table:table-cell table:number-columns-repeated="16364"/>
        </table:table-row>
        <table:table-row table:style-name="ro2">
          <table:table-cell table:number-columns-repeated="10"/>
          <table:table-cell table:formula="of:=[$Checklist.T63]" office:value-type="float" office:value="0" calcext:value-type="float">
            <text:p>0</text:p>
          </table:table-cell>
          <table:table-cell table:formula="of:=IF(ISNUMBER(FIND(&quot;:&quot;;[.K31])); RIGHT([.K31]; LEN([.K31]) - FIND(&quot;:&quot;;[.K31]));&quot;&quot;)">
            <text:p/>
          </table:table-cell>
          <table:table-cell table:formula="of:=IF(ISNUMBER(FIND(&quot; &quot;; [.L31])); LEFT([.L31]; FIND(&quot; &quot;; [.L31] &amp; &quot; &quot;; FIND(&quot; &quot;;[.L31])+1) - 1); [.L31])">
            <text:p/>
          </table:table-cell>
          <table:table-cell table:formula="of:=IF(ISNUMBER(FIND(&quot;(&quot;; [.M31])); LEFT([.M31]; FIND(&quot;(&quot;; [.M31]) - 1); [.M31])">
            <text:p/>
          </table:table-cell>
          <table:table-cell table:formula="of:=IF(ISNUMBER(FIND(&quot;=&quot;;[.M31])); RIGHT([.M31]; LEN([.M31]) - FIND(&quot;=&quot;;[.M31]));&quot;&quot;)">
            <text:p/>
          </table:table-cell>
          <table:table-cell table:formula="of:=[$Checklist.T164]" office:value-type="float" office:value="0" calcext:value-type="float">
            <text:p>0</text:p>
          </table:table-cell>
          <table:table-cell table:formula="of:=IF(ISNUMBER(FIND(&quot;:&quot;;[.P31])); RIGHT([.P31]; LEN([.P31]) - FIND(&quot;:&quot;;[.P31]));&quot;&quot;)">
            <text:p/>
          </table:table-cell>
          <table:table-cell table:formula="of:=IF(ISNUMBER(FIND(&quot; &quot;; [.Q31])); LEFT([.Q31]; FIND(&quot; &quot;; [.Q31] &amp; &quot; &quot;; FIND(&quot; &quot;;[.Q31])+1) - 1); [.Q31])">
            <text:p/>
          </table:table-cell>
          <table:table-cell table:formula="of:=IF(ISNUMBER(FIND(&quot;(&quot;; [.R31])); LEFT([.R31]; FIND(&quot;(&quot;; [.R31]) - 1); [.R31])">
            <text:p/>
          </table:table-cell>
          <table:table-cell table:formula="of:=IF(ISNUMBER(FIND(&quot;=&quot;;[.R31])); RIGHT([.R31]; LEN([.R31]) - FIND(&quot;=&quot;;[.R31]));&quot;&quot;)">
            <text:p/>
          </table:table-cell>
          <table:table-cell table:number-columns-repeated="16364"/>
        </table:table-row>
        <table:table-row table:style-name="ro2">
          <table:table-cell table:number-columns-repeated="10"/>
          <table:table-cell table:formula="of:=[$Checklist.T64]" office:value-type="float" office:value="0" calcext:value-type="float">
            <text:p>0</text:p>
          </table:table-cell>
          <table:table-cell table:formula="of:=IF(ISNUMBER(FIND(&quot;:&quot;;[.K32])); RIGHT([.K32]; LEN([.K32]) - FIND(&quot;:&quot;;[.K32]));&quot;&quot;)">
            <text:p/>
          </table:table-cell>
          <table:table-cell table:formula="of:=IF(ISNUMBER(FIND(&quot; &quot;; [.L32])); LEFT([.L32]; FIND(&quot; &quot;; [.L32] &amp; &quot; &quot;; FIND(&quot; &quot;;[.L32])+1) - 1); [.L32])">
            <text:p/>
          </table:table-cell>
          <table:table-cell table:formula="of:=IF(ISNUMBER(FIND(&quot;(&quot;; [.M32])); LEFT([.M32]; FIND(&quot;(&quot;; [.M32]) - 1); [.M32])">
            <text:p/>
          </table:table-cell>
          <table:table-cell table:formula="of:=IF(ISNUMBER(FIND(&quot;=&quot;;[.M32])); RIGHT([.M32]; LEN([.M32]) - FIND(&quot;=&quot;;[.M32]));&quot;&quot;)">
            <text:p/>
          </table:table-cell>
          <table:table-cell table:formula="of:=[$Checklist.T165]" office:value-type="float" office:value="0" calcext:value-type="float">
            <text:p>0</text:p>
          </table:table-cell>
          <table:table-cell table:formula="of:=IF(ISNUMBER(FIND(&quot;:&quot;;[.P32])); RIGHT([.P32]; LEN([.P32]) - FIND(&quot;:&quot;;[.P32]));&quot;&quot;)">
            <text:p/>
          </table:table-cell>
          <table:table-cell table:formula="of:=IF(ISNUMBER(FIND(&quot; &quot;; [.Q32])); LEFT([.Q32]; FIND(&quot; &quot;; [.Q32] &amp; &quot; &quot;; FIND(&quot; &quot;;[.Q32])+1) - 1); [.Q32])">
            <text:p/>
          </table:table-cell>
          <table:table-cell table:formula="of:=IF(ISNUMBER(FIND(&quot;(&quot;; [.R32])); LEFT([.R32]; FIND(&quot;(&quot;; [.R32]) - 1); [.R32])">
            <text:p/>
          </table:table-cell>
          <table:table-cell table:formula="of:=IF(ISNUMBER(FIND(&quot;=&quot;;[.R32])); RIGHT([.R32]; LEN([.R32]) - FIND(&quot;=&quot;;[.R32]));&quot;&quot;)">
            <text:p/>
          </table:table-cell>
          <table:table-cell table:number-columns-repeated="16364"/>
        </table:table-row>
        <table:table-row table:style-name="ro2">
          <table:table-cell table:number-columns-repeated="10"/>
          <table:table-cell table:formula="of:=[$Checklist.T65]" office:value-type="float" office:value="0" calcext:value-type="float">
            <text:p>0</text:p>
          </table:table-cell>
          <table:table-cell table:formula="of:=IF(ISNUMBER(FIND(&quot;:&quot;;[.K33])); RIGHT([.K33]; LEN([.K33]) - FIND(&quot;:&quot;;[.K33]));&quot;&quot;)">
            <text:p/>
          </table:table-cell>
          <table:table-cell table:formula="of:=IF(ISNUMBER(FIND(&quot; &quot;; [.L33])); LEFT([.L33]; FIND(&quot; &quot;; [.L33] &amp; &quot; &quot;; FIND(&quot; &quot;;[.L33])+1) - 1); [.L33])">
            <text:p/>
          </table:table-cell>
          <table:table-cell table:formula="of:=IF(ISNUMBER(FIND(&quot;(&quot;; [.M33])); LEFT([.M33]; FIND(&quot;(&quot;; [.M33]) - 1); [.M33])">
            <text:p/>
          </table:table-cell>
          <table:table-cell table:formula="of:=IF(ISNUMBER(FIND(&quot;=&quot;;[.M33])); RIGHT([.M33]; LEN([.M33]) - FIND(&quot;=&quot;;[.M33]));&quot;&quot;)">
            <text:p/>
          </table:table-cell>
          <table:table-cell table:formula="of:=[$Checklist.T166]" office:value-type="float" office:value="0" calcext:value-type="float">
            <text:p>0</text:p>
          </table:table-cell>
          <table:table-cell table:formula="of:=IF(ISNUMBER(FIND(&quot;:&quot;;[.P33])); RIGHT([.P33]; LEN([.P33]) - FIND(&quot;:&quot;;[.P33]));&quot;&quot;)">
            <text:p/>
          </table:table-cell>
          <table:table-cell table:formula="of:=IF(ISNUMBER(FIND(&quot; &quot;; [.Q33])); LEFT([.Q33]; FIND(&quot; &quot;; [.Q33] &amp; &quot; &quot;; FIND(&quot; &quot;;[.Q33])+1) - 1); [.Q33])">
            <text:p/>
          </table:table-cell>
          <table:table-cell table:formula="of:=IF(ISNUMBER(FIND(&quot;(&quot;; [.R33])); LEFT([.R33]; FIND(&quot;(&quot;; [.R33]) - 1); [.R33])">
            <text:p/>
          </table:table-cell>
          <table:table-cell table:formula="of:=IF(ISNUMBER(FIND(&quot;=&quot;;[.R33])); RIGHT([.R33]; LEN([.R33]) - FIND(&quot;=&quot;;[.R33]));&quot;&quot;)">
            <text:p/>
          </table:table-cell>
          <table:table-cell table:number-columns-repeated="16364"/>
        </table:table-row>
        <table:table-row table:style-name="ro2">
          <table:table-cell table:number-columns-repeated="10"/>
          <table:table-cell table:formula="of:=[$Checklist.T66]" office:value-type="float" office:value="0" calcext:value-type="float">
            <text:p>0</text:p>
          </table:table-cell>
          <table:table-cell table:formula="of:=IF(ISNUMBER(FIND(&quot;:&quot;;[.K34])); RIGHT([.K34]; LEN([.K34]) - FIND(&quot;:&quot;;[.K34]));&quot;&quot;)">
            <text:p/>
          </table:table-cell>
          <table:table-cell table:formula="of:=IF(ISNUMBER(FIND(&quot; &quot;; [.L34])); LEFT([.L34]; FIND(&quot; &quot;; [.L34] &amp; &quot; &quot;; FIND(&quot; &quot;;[.L34])+1) - 1); [.L34])">
            <text:p/>
          </table:table-cell>
          <table:table-cell table:formula="of:=IF(ISNUMBER(FIND(&quot;(&quot;; [.M34])); LEFT([.M34]; FIND(&quot;(&quot;; [.M34]) - 1); [.M34])">
            <text:p/>
          </table:table-cell>
          <table:table-cell table:formula="of:=IF(ISNUMBER(FIND(&quot;=&quot;;[.M34])); RIGHT([.M34]; LEN([.M34]) - FIND(&quot;=&quot;;[.M34]));&quot;&quot;)">
            <text:p/>
          </table:table-cell>
          <table:table-cell table:formula="of:=[$Checklist.T167]" office:value-type="float" office:value="0" calcext:value-type="float">
            <text:p>0</text:p>
          </table:table-cell>
          <table:table-cell table:formula="of:=IF(ISNUMBER(FIND(&quot;:&quot;;[.P34])); RIGHT([.P34]; LEN([.P34]) - FIND(&quot;:&quot;;[.P34]));&quot;&quot;)">
            <text:p/>
          </table:table-cell>
          <table:table-cell table:formula="of:=IF(ISNUMBER(FIND(&quot; &quot;; [.Q34])); LEFT([.Q34]; FIND(&quot; &quot;; [.Q34] &amp; &quot; &quot;; FIND(&quot; &quot;;[.Q34])+1) - 1); [.Q34])">
            <text:p/>
          </table:table-cell>
          <table:table-cell table:formula="of:=IF(ISNUMBER(FIND(&quot;(&quot;; [.R34])); LEFT([.R34]; FIND(&quot;(&quot;; [.R34]) - 1); [.R34])">
            <text:p/>
          </table:table-cell>
          <table:table-cell table:formula="of:=IF(ISNUMBER(FIND(&quot;=&quot;;[.R34])); RIGHT([.R34]; LEN([.R34]) - FIND(&quot;=&quot;;[.R34]));&quot;&quot;)">
            <text:p/>
          </table:table-cell>
          <table:table-cell table:number-columns-repeated="16364"/>
        </table:table-row>
        <table:table-row table:style-name="ro2">
          <table:table-cell table:number-columns-repeated="10"/>
          <table:table-cell table:formula="of:=[$Checklist.T67]" office:value-type="float" office:value="0" calcext:value-type="float">
            <text:p>0</text:p>
          </table:table-cell>
          <table:table-cell table:formula="of:=IF(ISNUMBER(FIND(&quot;:&quot;;[.K35])); RIGHT([.K35]; LEN([.K35]) - FIND(&quot;:&quot;;[.K35]));&quot;&quot;)">
            <text:p/>
          </table:table-cell>
          <table:table-cell table:formula="of:=IF(ISNUMBER(FIND(&quot; &quot;; [.L35])); LEFT([.L35]; FIND(&quot; &quot;; [.L35] &amp; &quot; &quot;; FIND(&quot; &quot;;[.L35])+1) - 1); [.L35])">
            <text:p/>
          </table:table-cell>
          <table:table-cell table:formula="of:=IF(ISNUMBER(FIND(&quot;(&quot;; [.M35])); LEFT([.M35]; FIND(&quot;(&quot;; [.M35]) - 1); [.M35])">
            <text:p/>
          </table:table-cell>
          <table:table-cell table:formula="of:=IF(ISNUMBER(FIND(&quot;=&quot;;[.M35])); RIGHT([.M35]; LEN([.M35]) - FIND(&quot;=&quot;;[.M35]));&quot;&quot;)">
            <text:p/>
          </table:table-cell>
          <table:table-cell table:formula="of:=[$Checklist.T168]" office:value-type="float" office:value="0" calcext:value-type="float">
            <text:p>0</text:p>
          </table:table-cell>
          <table:table-cell table:formula="of:=IF(ISNUMBER(FIND(&quot;:&quot;;[.P35])); RIGHT([.P35]; LEN([.P35]) - FIND(&quot;:&quot;;[.P35]));&quot;&quot;)">
            <text:p/>
          </table:table-cell>
          <table:table-cell table:formula="of:=IF(ISNUMBER(FIND(&quot; &quot;; [.Q35])); LEFT([.Q35]; FIND(&quot; &quot;; [.Q35] &amp; &quot; &quot;; FIND(&quot; &quot;;[.Q35])+1) - 1); [.Q35])">
            <text:p/>
          </table:table-cell>
          <table:table-cell table:formula="of:=IF(ISNUMBER(FIND(&quot;(&quot;; [.R35])); LEFT([.R35]; FIND(&quot;(&quot;; [.R35]) - 1); [.R35])">
            <text:p/>
          </table:table-cell>
          <table:table-cell table:formula="of:=IF(ISNUMBER(FIND(&quot;=&quot;;[.R35])); RIGHT([.R35]; LEN([.R35]) - FIND(&quot;=&quot;;[.R35]));&quot;&quot;)">
            <text:p/>
          </table:table-cell>
          <table:table-cell table:number-columns-repeated="16364"/>
        </table:table-row>
        <table:table-row table:style-name="ro2">
          <table:table-cell table:number-columns-repeated="10"/>
          <table:table-cell table:formula="of:=[$Checklist.T68]" office:value-type="float" office:value="0" calcext:value-type="float">
            <text:p>0</text:p>
          </table:table-cell>
          <table:table-cell table:formula="of:=IF(ISNUMBER(FIND(&quot;:&quot;;[.K36])); RIGHT([.K36]; LEN([.K36]) - FIND(&quot;:&quot;;[.K36]));&quot;&quot;)">
            <text:p/>
          </table:table-cell>
          <table:table-cell table:formula="of:=IF(ISNUMBER(FIND(&quot; &quot;; [.L36])); LEFT([.L36]; FIND(&quot; &quot;; [.L36] &amp; &quot; &quot;; FIND(&quot; &quot;;[.L36])+1) - 1); [.L36])">
            <text:p/>
          </table:table-cell>
          <table:table-cell table:formula="of:=IF(ISNUMBER(FIND(&quot;(&quot;; [.M36])); LEFT([.M36]; FIND(&quot;(&quot;; [.M36]) - 1); [.M36])">
            <text:p/>
          </table:table-cell>
          <table:table-cell table:formula="of:=IF(ISNUMBER(FIND(&quot;=&quot;;[.M36])); RIGHT([.M36]; LEN([.M36]) - FIND(&quot;=&quot;;[.M36]));&quot;&quot;)">
            <text:p/>
          </table:table-cell>
          <table:table-cell table:formula="of:=[$Checklist.T169]" office:value-type="float" office:value="0" calcext:value-type="float">
            <text:p>0</text:p>
          </table:table-cell>
          <table:table-cell table:formula="of:=IF(ISNUMBER(FIND(&quot;:&quot;;[.P36])); RIGHT([.P36]; LEN([.P36]) - FIND(&quot;:&quot;;[.P36]));&quot;&quot;)">
            <text:p/>
          </table:table-cell>
          <table:table-cell table:formula="of:=IF(ISNUMBER(FIND(&quot; &quot;; [.Q36])); LEFT([.Q36]; FIND(&quot; &quot;; [.Q36] &amp; &quot; &quot;; FIND(&quot; &quot;;[.Q36])+1) - 1); [.Q36])">
            <text:p/>
          </table:table-cell>
          <table:table-cell table:formula="of:=IF(ISNUMBER(FIND(&quot;(&quot;; [.R36])); LEFT([.R36]; FIND(&quot;(&quot;; [.R36]) - 1); [.R36])">
            <text:p/>
          </table:table-cell>
          <table:table-cell table:formula="of:=IF(ISNUMBER(FIND(&quot;=&quot;;[.R36])); RIGHT([.R36]; LEN([.R36]) - FIND(&quot;=&quot;;[.R36]));&quot;&quot;)">
            <text:p/>
          </table:table-cell>
          <table:table-cell table:number-columns-repeated="16364"/>
        </table:table-row>
        <table:table-row table:style-name="ro2">
          <table:table-cell table:number-columns-repeated="10"/>
          <table:table-cell table:formula="of:=[$Checklist.T69]" office:value-type="float" office:value="0" calcext:value-type="float">
            <text:p>0</text:p>
          </table:table-cell>
          <table:table-cell table:formula="of:=IF(ISNUMBER(FIND(&quot;:&quot;;[.K37])); RIGHT([.K37]; LEN([.K37]) - FIND(&quot;:&quot;;[.K37]));&quot;&quot;)">
            <text:p/>
          </table:table-cell>
          <table:table-cell table:formula="of:=IF(ISNUMBER(FIND(&quot; &quot;; [.L37])); LEFT([.L37]; FIND(&quot; &quot;; [.L37] &amp; &quot; &quot;; FIND(&quot; &quot;;[.L37])+1) - 1); [.L37])">
            <text:p/>
          </table:table-cell>
          <table:table-cell table:formula="of:=IF(ISNUMBER(FIND(&quot;(&quot;; [.M37])); LEFT([.M37]; FIND(&quot;(&quot;; [.M37]) - 1); [.M37])">
            <text:p/>
          </table:table-cell>
          <table:table-cell table:formula="of:=IF(ISNUMBER(FIND(&quot;=&quot;;[.M37])); RIGHT([.M37]; LEN([.M37]) - FIND(&quot;=&quot;;[.M37]));&quot;&quot;)">
            <text:p/>
          </table:table-cell>
          <table:table-cell table:formula="of:=[$Checklist.T170]" office:value-type="float" office:value="0" calcext:value-type="float">
            <text:p>0</text:p>
          </table:table-cell>
          <table:table-cell table:formula="of:=IF(ISNUMBER(FIND(&quot;:&quot;;[.P37])); RIGHT([.P37]; LEN([.P37]) - FIND(&quot;:&quot;;[.P37]));&quot;&quot;)">
            <text:p/>
          </table:table-cell>
          <table:table-cell table:formula="of:=IF(ISNUMBER(FIND(&quot; &quot;; [.Q37])); LEFT([.Q37]; FIND(&quot; &quot;; [.Q37] &amp; &quot; &quot;; FIND(&quot; &quot;;[.Q37])+1) - 1); [.Q37])">
            <text:p/>
          </table:table-cell>
          <table:table-cell table:formula="of:=IF(ISNUMBER(FIND(&quot;(&quot;; [.R37])); LEFT([.R37]; FIND(&quot;(&quot;; [.R37]) - 1); [.R37])">
            <text:p/>
          </table:table-cell>
          <table:table-cell table:formula="of:=IF(ISNUMBER(FIND(&quot;=&quot;;[.R37])); RIGHT([.R37]; LEN([.R37]) - FIND(&quot;=&quot;;[.R37]));&quot;&quot;)">
            <text:p/>
          </table:table-cell>
          <table:table-cell table:number-columns-repeated="16364"/>
        </table:table-row>
        <table:table-row table:style-name="ro2">
          <table:table-cell table:number-columns-repeated="10"/>
          <table:table-cell table:formula="of:=[$Checklist.T70]" office:value-type="float" office:value="0" calcext:value-type="float">
            <text:p>0</text:p>
          </table:table-cell>
          <table:table-cell table:formula="of:=IF(ISNUMBER(FIND(&quot;:&quot;;[.K38])); RIGHT([.K38]; LEN([.K38]) - FIND(&quot;:&quot;;[.K38]));&quot;&quot;)">
            <text:p/>
          </table:table-cell>
          <table:table-cell table:formula="of:=IF(ISNUMBER(FIND(&quot; &quot;; [.L38])); LEFT([.L38]; FIND(&quot; &quot;; [.L38] &amp; &quot; &quot;; FIND(&quot; &quot;;[.L38])+1) - 1); [.L38])">
            <text:p/>
          </table:table-cell>
          <table:table-cell table:formula="of:=IF(ISNUMBER(FIND(&quot;(&quot;; [.M38])); LEFT([.M38]; FIND(&quot;(&quot;; [.M38]) - 1); [.M38])">
            <text:p/>
          </table:table-cell>
          <table:table-cell table:formula="of:=IF(ISNUMBER(FIND(&quot;=&quot;;[.M38])); RIGHT([.M38]; LEN([.M38]) - FIND(&quot;=&quot;;[.M38]));&quot;&quot;)">
            <text:p/>
          </table:table-cell>
          <table:table-cell table:formula="of:=[$Checklist.T171]" office:value-type="float" office:value="0" calcext:value-type="float">
            <text:p>0</text:p>
          </table:table-cell>
          <table:table-cell table:formula="of:=IF(ISNUMBER(FIND(&quot;:&quot;;[.P38])); RIGHT([.P38]; LEN([.P38]) - FIND(&quot;:&quot;;[.P38]));&quot;&quot;)">
            <text:p/>
          </table:table-cell>
          <table:table-cell table:formula="of:=IF(ISNUMBER(FIND(&quot; &quot;; [.Q38])); LEFT([.Q38]; FIND(&quot; &quot;; [.Q38] &amp; &quot; &quot;; FIND(&quot; &quot;;[.Q38])+1) - 1); [.Q38])">
            <text:p/>
          </table:table-cell>
          <table:table-cell table:formula="of:=IF(ISNUMBER(FIND(&quot;(&quot;; [.R38])); LEFT([.R38]; FIND(&quot;(&quot;; [.R38]) - 1); [.R38])">
            <text:p/>
          </table:table-cell>
          <table:table-cell table:formula="of:=IF(ISNUMBER(FIND(&quot;=&quot;;[.R38])); RIGHT([.R38]; LEN([.R38]) - FIND(&quot;=&quot;;[.R38]));&quot;&quot;)">
            <text:p/>
          </table:table-cell>
          <table:table-cell table:number-columns-repeated="16364"/>
        </table:table-row>
        <table:table-row table:style-name="ro2">
          <table:table-cell table:number-columns-repeated="10"/>
          <table:table-cell table:formula="of:=[$Checklist.T71]" office:value-type="float" office:value="0" calcext:value-type="float">
            <text:p>0</text:p>
          </table:table-cell>
          <table:table-cell table:formula="of:=IF(ISNUMBER(FIND(&quot;:&quot;;[.K39])); RIGHT([.K39]; LEN([.K39]) - FIND(&quot;:&quot;;[.K39]));&quot;&quot;)">
            <text:p/>
          </table:table-cell>
          <table:table-cell table:formula="of:=IF(ISNUMBER(FIND(&quot; &quot;; [.L39])); LEFT([.L39]; FIND(&quot; &quot;; [.L39] &amp; &quot; &quot;; FIND(&quot; &quot;;[.L39])+1) - 1); [.L39])">
            <text:p/>
          </table:table-cell>
          <table:table-cell table:formula="of:=IF(ISNUMBER(FIND(&quot;(&quot;; [.M39])); LEFT([.M39]; FIND(&quot;(&quot;; [.M39]) - 1); [.M39])">
            <text:p/>
          </table:table-cell>
          <table:table-cell table:formula="of:=IF(ISNUMBER(FIND(&quot;=&quot;;[.M39])); RIGHT([.M39]; LEN([.M39]) - FIND(&quot;=&quot;;[.M39]));&quot;&quot;)">
            <text:p/>
          </table:table-cell>
          <table:table-cell table:formula="of:=[$Checklist.T172]" office:value-type="float" office:value="0" calcext:value-type="float">
            <text:p>0</text:p>
          </table:table-cell>
          <table:table-cell table:formula="of:=IF(ISNUMBER(FIND(&quot;:&quot;;[.P39])); RIGHT([.P39]; LEN([.P39]) - FIND(&quot;:&quot;;[.P39]));&quot;&quot;)">
            <text:p/>
          </table:table-cell>
          <table:table-cell table:formula="of:=IF(ISNUMBER(FIND(&quot; &quot;; [.Q39])); LEFT([.Q39]; FIND(&quot; &quot;; [.Q39] &amp; &quot; &quot;; FIND(&quot; &quot;;[.Q39])+1) - 1); [.Q39])">
            <text:p/>
          </table:table-cell>
          <table:table-cell table:formula="of:=IF(ISNUMBER(FIND(&quot;(&quot;; [.R39])); LEFT([.R39]; FIND(&quot;(&quot;; [.R39]) - 1); [.R39])">
            <text:p/>
          </table:table-cell>
          <table:table-cell table:formula="of:=IF(ISNUMBER(FIND(&quot;=&quot;;[.R39])); RIGHT([.R39]; LEN([.R39]) - FIND(&quot;=&quot;;[.R39]));&quot;&quot;)">
            <text:p/>
          </table:table-cell>
          <table:table-cell table:number-columns-repeated="16364"/>
        </table:table-row>
        <table:table-row table:style-name="ro2">
          <table:table-cell table:number-columns-repeated="10"/>
          <table:table-cell table:formula="of:=[$Checklist.T72]" office:value-type="float" office:value="0" calcext:value-type="float">
            <text:p>0</text:p>
          </table:table-cell>
          <table:table-cell table:formula="of:=IF(ISNUMBER(FIND(&quot;:&quot;;[.K40])); RIGHT([.K40]; LEN([.K40]) - FIND(&quot;:&quot;;[.K40]));&quot;&quot;)">
            <text:p/>
          </table:table-cell>
          <table:table-cell table:formula="of:=IF(ISNUMBER(FIND(&quot; &quot;; [.L40])); LEFT([.L40]; FIND(&quot; &quot;; [.L40] &amp; &quot; &quot;; FIND(&quot; &quot;;[.L40])+1) - 1); [.L40])">
            <text:p/>
          </table:table-cell>
          <table:table-cell table:formula="of:=IF(ISNUMBER(FIND(&quot;(&quot;; [.M40])); LEFT([.M40]; FIND(&quot;(&quot;; [.M40]) - 1); [.M40])">
            <text:p/>
          </table:table-cell>
          <table:table-cell table:formula="of:=IF(ISNUMBER(FIND(&quot;=&quot;;[.M40])); RIGHT([.M40]; LEN([.M40]) - FIND(&quot;=&quot;;[.M40]));&quot;&quot;)">
            <text:p/>
          </table:table-cell>
          <table:table-cell table:formula="of:=[$Checklist.T173]" office:value-type="float" office:value="0" calcext:value-type="float">
            <text:p>0</text:p>
          </table:table-cell>
          <table:table-cell table:formula="of:=IF(ISNUMBER(FIND(&quot;:&quot;;[.P40])); RIGHT([.P40]; LEN([.P40]) - FIND(&quot;:&quot;;[.P40]));&quot;&quot;)">
            <text:p/>
          </table:table-cell>
          <table:table-cell table:formula="of:=IF(ISNUMBER(FIND(&quot; &quot;; [.Q40])); LEFT([.Q40]; FIND(&quot; &quot;; [.Q40] &amp; &quot; &quot;; FIND(&quot; &quot;;[.Q40])+1) - 1); [.Q40])">
            <text:p/>
          </table:table-cell>
          <table:table-cell table:formula="of:=IF(ISNUMBER(FIND(&quot;(&quot;; [.R40])); LEFT([.R40]; FIND(&quot;(&quot;; [.R40]) - 1); [.R40])">
            <text:p/>
          </table:table-cell>
          <table:table-cell table:formula="of:=IF(ISNUMBER(FIND(&quot;=&quot;;[.R40])); RIGHT([.R40]; LEN([.R40]) - FIND(&quot;=&quot;;[.R40]));&quot;&quot;)">
            <text:p/>
          </table:table-cell>
          <table:table-cell table:number-columns-repeated="16364"/>
        </table:table-row>
        <table:table-row table:style-name="ro2">
          <table:table-cell table:number-columns-repeated="10"/>
          <table:table-cell table:formula="of:=[$Checklist.T73]" office:value-type="float" office:value="0" calcext:value-type="float">
            <text:p>0</text:p>
          </table:table-cell>
          <table:table-cell table:formula="of:=IF(ISNUMBER(FIND(&quot;:&quot;;[.K41])); RIGHT([.K41]; LEN([.K41]) - FIND(&quot;:&quot;;[.K41]));&quot;&quot;)">
            <text:p/>
          </table:table-cell>
          <table:table-cell table:formula="of:=IF(ISNUMBER(FIND(&quot; &quot;; [.L41])); LEFT([.L41]; FIND(&quot; &quot;; [.L41] &amp; &quot; &quot;; FIND(&quot; &quot;;[.L41])+1) - 1); [.L41])">
            <text:p/>
          </table:table-cell>
          <table:table-cell table:formula="of:=IF(ISNUMBER(FIND(&quot;(&quot;; [.M41])); LEFT([.M41]; FIND(&quot;(&quot;; [.M41]) - 1); [.M41])">
            <text:p/>
          </table:table-cell>
          <table:table-cell table:formula="of:=IF(ISNUMBER(FIND(&quot;=&quot;;[.M41])); RIGHT([.M41]; LEN([.M41]) - FIND(&quot;=&quot;;[.M41]));&quot;&quot;)">
            <text:p/>
          </table:table-cell>
          <table:table-cell table:formula="of:=[$Checklist.T174]" office:value-type="float" office:value="0" calcext:value-type="float">
            <text:p>0</text:p>
          </table:table-cell>
          <table:table-cell table:formula="of:=IF(ISNUMBER(FIND(&quot;:&quot;;[.P41])); RIGHT([.P41]; LEN([.P41]) - FIND(&quot;:&quot;;[.P41]));&quot;&quot;)">
            <text:p/>
          </table:table-cell>
          <table:table-cell table:formula="of:=IF(ISNUMBER(FIND(&quot; &quot;; [.Q41])); LEFT([.Q41]; FIND(&quot; &quot;; [.Q41] &amp; &quot; &quot;; FIND(&quot; &quot;;[.Q41])+1) - 1); [.Q41])">
            <text:p/>
          </table:table-cell>
          <table:table-cell table:formula="of:=IF(ISNUMBER(FIND(&quot;(&quot;; [.R41])); LEFT([.R41]; FIND(&quot;(&quot;; [.R41]) - 1); [.R41])">
            <text:p/>
          </table:table-cell>
          <table:table-cell table:formula="of:=IF(ISNUMBER(FIND(&quot;=&quot;;[.R41])); RIGHT([.R41]; LEN([.R41]) - FIND(&quot;=&quot;;[.R41]));&quot;&quot;)">
            <text:p/>
          </table:table-cell>
          <table:table-cell table:number-columns-repeated="16364"/>
        </table:table-row>
        <table:table-row table:style-name="ro2">
          <table:table-cell table:number-columns-repeated="10"/>
          <table:table-cell table:formula="of:=[$Checklist.T74]" office:value-type="float" office:value="0" calcext:value-type="float">
            <text:p>0</text:p>
          </table:table-cell>
          <table:table-cell table:formula="of:=IF(ISNUMBER(FIND(&quot;:&quot;;[.K42])); RIGHT([.K42]; LEN([.K42]) - FIND(&quot;:&quot;;[.K42]));&quot;&quot;)">
            <text:p/>
          </table:table-cell>
          <table:table-cell table:formula="of:=IF(ISNUMBER(FIND(&quot; &quot;; [.L42])); LEFT([.L42]; FIND(&quot; &quot;; [.L42] &amp; &quot; &quot;; FIND(&quot; &quot;;[.L42])+1) - 1); [.L42])">
            <text:p/>
          </table:table-cell>
          <table:table-cell table:formula="of:=IF(ISNUMBER(FIND(&quot;(&quot;; [.M42])); LEFT([.M42]; FIND(&quot;(&quot;; [.M42]) - 1); [.M42])">
            <text:p/>
          </table:table-cell>
          <table:table-cell table:formula="of:=IF(ISNUMBER(FIND(&quot;=&quot;;[.M42])); RIGHT([.M42]; LEN([.M42]) - FIND(&quot;=&quot;;[.M42]));&quot;&quot;)">
            <text:p/>
          </table:table-cell>
          <table:table-cell table:formula="of:=[$Checklist.T175]" office:value-type="float" office:value="0" calcext:value-type="float">
            <text:p>0</text:p>
          </table:table-cell>
          <table:table-cell table:formula="of:=IF(ISNUMBER(FIND(&quot;:&quot;;[.P42])); RIGHT([.P42]; LEN([.P42]) - FIND(&quot;:&quot;;[.P42]));&quot;&quot;)">
            <text:p/>
          </table:table-cell>
          <table:table-cell table:formula="of:=IF(ISNUMBER(FIND(&quot; &quot;; [.Q42])); LEFT([.Q42]; FIND(&quot; &quot;; [.Q42] &amp; &quot; &quot;; FIND(&quot; &quot;;[.Q42])+1) - 1); [.Q42])">
            <text:p/>
          </table:table-cell>
          <table:table-cell table:formula="of:=IF(ISNUMBER(FIND(&quot;(&quot;; [.R42])); LEFT([.R42]; FIND(&quot;(&quot;; [.R42]) - 1); [.R42])">
            <text:p/>
          </table:table-cell>
          <table:table-cell table:formula="of:=IF(ISNUMBER(FIND(&quot;=&quot;;[.R42])); RIGHT([.R42]; LEN([.R42]) - FIND(&quot;=&quot;;[.R42]));&quot;&quot;)">
            <text:p/>
          </table:table-cell>
          <table:table-cell table:number-columns-repeated="16364"/>
        </table:table-row>
        <table:table-row table:style-name="ro2">
          <table:table-cell table:number-columns-repeated="10"/>
          <table:table-cell table:formula="of:=[$Checklist.T75]" office:value-type="float" office:value="0" calcext:value-type="float">
            <text:p>0</text:p>
          </table:table-cell>
          <table:table-cell table:formula="of:=IF(ISNUMBER(FIND(&quot;:&quot;;[.K43])); RIGHT([.K43]; LEN([.K43]) - FIND(&quot;:&quot;;[.K43]));&quot;&quot;)">
            <text:p/>
          </table:table-cell>
          <table:table-cell table:formula="of:=IF(ISNUMBER(FIND(&quot; &quot;; [.L43])); LEFT([.L43]; FIND(&quot; &quot;; [.L43] &amp; &quot; &quot;; FIND(&quot; &quot;;[.L43])+1) - 1); [.L43])">
            <text:p/>
          </table:table-cell>
          <table:table-cell table:formula="of:=IF(ISNUMBER(FIND(&quot;(&quot;; [.M43])); LEFT([.M43]; FIND(&quot;(&quot;; [.M43]) - 1); [.M43])">
            <text:p/>
          </table:table-cell>
          <table:table-cell table:formula="of:=IF(ISNUMBER(FIND(&quot;=&quot;;[.M43])); RIGHT([.M43]; LEN([.M43]) - FIND(&quot;=&quot;;[.M43]));&quot;&quot;)">
            <text:p/>
          </table:table-cell>
          <table:table-cell table:formula="of:=[$Checklist.T176]" office:value-type="float" office:value="0" calcext:value-type="float">
            <text:p>0</text:p>
          </table:table-cell>
          <table:table-cell table:formula="of:=IF(ISNUMBER(FIND(&quot;:&quot;;[.P43])); RIGHT([.P43]; LEN([.P43]) - FIND(&quot;:&quot;;[.P43]));&quot;&quot;)">
            <text:p/>
          </table:table-cell>
          <table:table-cell table:formula="of:=IF(ISNUMBER(FIND(&quot; &quot;; [.Q43])); LEFT([.Q43]; FIND(&quot; &quot;; [.Q43] &amp; &quot; &quot;; FIND(&quot; &quot;;[.Q43])+1) - 1); [.Q43])">
            <text:p/>
          </table:table-cell>
          <table:table-cell table:formula="of:=IF(ISNUMBER(FIND(&quot;(&quot;; [.R43])); LEFT([.R43]; FIND(&quot;(&quot;; [.R43]) - 1); [.R43])">
            <text:p/>
          </table:table-cell>
          <table:table-cell table:formula="of:=IF(ISNUMBER(FIND(&quot;=&quot;;[.R43])); RIGHT([.R43]; LEN([.R43]) - FIND(&quot;=&quot;;[.R43]));&quot;&quot;)">
            <text:p/>
          </table:table-cell>
          <table:table-cell table:number-columns-repeated="16364"/>
        </table:table-row>
        <table:table-row table:style-name="ro2">
          <table:table-cell table:number-columns-repeated="10"/>
          <table:table-cell table:formula="of:=[$Checklist.T76]" office:value-type="float" office:value="0" calcext:value-type="float">
            <text:p>0</text:p>
          </table:table-cell>
          <table:table-cell table:formula="of:=IF(ISNUMBER(FIND(&quot;:&quot;;[.K44])); RIGHT([.K44]; LEN([.K44]) - FIND(&quot;:&quot;;[.K44]));&quot;&quot;)">
            <text:p/>
          </table:table-cell>
          <table:table-cell table:formula="of:=IF(ISNUMBER(FIND(&quot; &quot;; [.L44])); LEFT([.L44]; FIND(&quot; &quot;; [.L44] &amp; &quot; &quot;; FIND(&quot; &quot;;[.L44])+1) - 1); [.L44])">
            <text:p/>
          </table:table-cell>
          <table:table-cell table:formula="of:=IF(ISNUMBER(FIND(&quot;(&quot;; [.M44])); LEFT([.M44]; FIND(&quot;(&quot;; [.M44]) - 1); [.M44])">
            <text:p/>
          </table:table-cell>
          <table:table-cell table:formula="of:=IF(ISNUMBER(FIND(&quot;=&quot;;[.M44])); RIGHT([.M44]; LEN([.M44]) - FIND(&quot;=&quot;;[.M44]));&quot;&quot;)">
            <text:p/>
          </table:table-cell>
          <table:table-cell table:formula="of:=[$Checklist.T177]" office:value-type="float" office:value="0" calcext:value-type="float">
            <text:p>0</text:p>
          </table:table-cell>
          <table:table-cell table:formula="of:=IF(ISNUMBER(FIND(&quot;:&quot;;[.P44])); RIGHT([.P44]; LEN([.P44]) - FIND(&quot;:&quot;;[.P44]));&quot;&quot;)">
            <text:p/>
          </table:table-cell>
          <table:table-cell table:formula="of:=IF(ISNUMBER(FIND(&quot; &quot;; [.Q44])); LEFT([.Q44]; FIND(&quot; &quot;; [.Q44] &amp; &quot; &quot;; FIND(&quot; &quot;;[.Q44])+1) - 1); [.Q44])">
            <text:p/>
          </table:table-cell>
          <table:table-cell table:formula="of:=IF(ISNUMBER(FIND(&quot;(&quot;; [.R44])); LEFT([.R44]; FIND(&quot;(&quot;; [.R44]) - 1); [.R44])">
            <text:p/>
          </table:table-cell>
          <table:table-cell table:formula="of:=IF(ISNUMBER(FIND(&quot;=&quot;;[.R44])); RIGHT([.R44]; LEN([.R44]) - FIND(&quot;=&quot;;[.R44]));&quot;&quot;)">
            <text:p/>
          </table:table-cell>
          <table:table-cell table:number-columns-repeated="16364"/>
        </table:table-row>
        <table:table-row table:style-name="ro2">
          <table:table-cell table:number-columns-repeated="10"/>
          <table:table-cell table:formula="of:=[$Checklist.T77]" office:value-type="float" office:value="0" calcext:value-type="float">
            <text:p>0</text:p>
          </table:table-cell>
          <table:table-cell table:formula="of:=IF(ISNUMBER(FIND(&quot;:&quot;;[.K45])); RIGHT([.K45]; LEN([.K45]) - FIND(&quot;:&quot;;[.K45]));&quot;&quot;)">
            <text:p/>
          </table:table-cell>
          <table:table-cell table:formula="of:=IF(ISNUMBER(FIND(&quot; &quot;; [.L45])); LEFT([.L45]; FIND(&quot; &quot;; [.L45] &amp; &quot; &quot;; FIND(&quot; &quot;;[.L45])+1) - 1); [.L45])">
            <text:p/>
          </table:table-cell>
          <table:table-cell table:formula="of:=IF(ISNUMBER(FIND(&quot;(&quot;; [.M45])); LEFT([.M45]; FIND(&quot;(&quot;; [.M45]) - 1); [.M45])">
            <text:p/>
          </table:table-cell>
          <table:table-cell table:formula="of:=IF(ISNUMBER(FIND(&quot;=&quot;;[.M45])); RIGHT([.M45]; LEN([.M45]) - FIND(&quot;=&quot;;[.M45]));&quot;&quot;)">
            <text:p/>
          </table:table-cell>
          <table:table-cell table:formula="of:=[$Checklist.T178]" office:value-type="float" office:value="0" calcext:value-type="float">
            <text:p>0</text:p>
          </table:table-cell>
          <table:table-cell table:formula="of:=IF(ISNUMBER(FIND(&quot;:&quot;;[.P45])); RIGHT([.P45]; LEN([.P45]) - FIND(&quot;:&quot;;[.P45]));&quot;&quot;)">
            <text:p/>
          </table:table-cell>
          <table:table-cell table:formula="of:=IF(ISNUMBER(FIND(&quot; &quot;; [.Q45])); LEFT([.Q45]; FIND(&quot; &quot;; [.Q45] &amp; &quot; &quot;; FIND(&quot; &quot;;[.Q45])+1) - 1); [.Q45])">
            <text:p/>
          </table:table-cell>
          <table:table-cell table:formula="of:=IF(ISNUMBER(FIND(&quot;(&quot;; [.R45])); LEFT([.R45]; FIND(&quot;(&quot;; [.R45]) - 1); [.R45])">
            <text:p/>
          </table:table-cell>
          <table:table-cell table:formula="of:=IF(ISNUMBER(FIND(&quot;=&quot;;[.R45])); RIGHT([.R45]; LEN([.R45]) - FIND(&quot;=&quot;;[.R45]));&quot;&quot;)">
            <text:p/>
          </table:table-cell>
          <table:table-cell table:number-columns-repeated="16364"/>
        </table:table-row>
        <table:table-row table:style-name="ro2">
          <table:table-cell table:number-columns-repeated="10"/>
          <table:table-cell table:formula="of:=[$Checklist.T78]" office:value-type="float" office:value="0" calcext:value-type="float">
            <text:p>0</text:p>
          </table:table-cell>
          <table:table-cell table:formula="of:=IF(ISNUMBER(FIND(&quot;:&quot;;[.K46])); RIGHT([.K46]; LEN([.K46]) - FIND(&quot;:&quot;;[.K46]));&quot;&quot;)">
            <text:p/>
          </table:table-cell>
          <table:table-cell table:formula="of:=IF(ISNUMBER(FIND(&quot; &quot;; [.L46])); LEFT([.L46]; FIND(&quot; &quot;; [.L46] &amp; &quot; &quot;; FIND(&quot; &quot;;[.L46])+1) - 1); [.L46])">
            <text:p/>
          </table:table-cell>
          <table:table-cell table:formula="of:=IF(ISNUMBER(FIND(&quot;(&quot;; [.M46])); LEFT([.M46]; FIND(&quot;(&quot;; [.M46]) - 1); [.M46])">
            <text:p/>
          </table:table-cell>
          <table:table-cell table:formula="of:=IF(ISNUMBER(FIND(&quot;=&quot;;[.M46])); RIGHT([.M46]; LEN([.M46]) - FIND(&quot;=&quot;;[.M46]));&quot;&quot;)">
            <text:p/>
          </table:table-cell>
          <table:table-cell table:formula="of:=[$Checklist.T179]" office:value-type="float" office:value="0" calcext:value-type="float">
            <text:p>0</text:p>
          </table:table-cell>
          <table:table-cell table:formula="of:=IF(ISNUMBER(FIND(&quot;:&quot;;[.P46])); RIGHT([.P46]; LEN([.P46]) - FIND(&quot;:&quot;;[.P46]));&quot;&quot;)">
            <text:p/>
          </table:table-cell>
          <table:table-cell table:formula="of:=IF(ISNUMBER(FIND(&quot; &quot;; [.Q46])); LEFT([.Q46]; FIND(&quot; &quot;; [.Q46] &amp; &quot; &quot;; FIND(&quot; &quot;;[.Q46])+1) - 1); [.Q46])">
            <text:p/>
          </table:table-cell>
          <table:table-cell table:formula="of:=IF(ISNUMBER(FIND(&quot;(&quot;; [.R46])); LEFT([.R46]; FIND(&quot;(&quot;; [.R46]) - 1); [.R46])">
            <text:p/>
          </table:table-cell>
          <table:table-cell table:formula="of:=IF(ISNUMBER(FIND(&quot;=&quot;;[.R46])); RIGHT([.R46]; LEN([.R46]) - FIND(&quot;=&quot;;[.R46]));&quot;&quot;)">
            <text:p/>
          </table:table-cell>
          <table:table-cell table:number-columns-repeated="16364"/>
        </table:table-row>
        <table:table-row table:style-name="ro2">
          <table:table-cell table:number-columns-repeated="10"/>
          <table:table-cell table:formula="of:=[$Checklist.T79]" office:value-type="float" office:value="0" calcext:value-type="float">
            <text:p>0</text:p>
          </table:table-cell>
          <table:table-cell table:formula="of:=IF(ISNUMBER(FIND(&quot;:&quot;;[.K47])); RIGHT([.K47]; LEN([.K47]) - FIND(&quot;:&quot;;[.K47]));&quot;&quot;)">
            <text:p/>
          </table:table-cell>
          <table:table-cell table:formula="of:=IF(ISNUMBER(FIND(&quot; &quot;; [.L47])); LEFT([.L47]; FIND(&quot; &quot;; [.L47] &amp; &quot; &quot;; FIND(&quot; &quot;;[.L47])+1) - 1); [.L47])">
            <text:p/>
          </table:table-cell>
          <table:table-cell table:formula="of:=IF(ISNUMBER(FIND(&quot;(&quot;; [.M47])); LEFT([.M47]; FIND(&quot;(&quot;; [.M47]) - 1); [.M47])">
            <text:p/>
          </table:table-cell>
          <table:table-cell table:formula="of:=IF(ISNUMBER(FIND(&quot;=&quot;;[.M47])); RIGHT([.M47]; LEN([.M47]) - FIND(&quot;=&quot;;[.M47]));&quot;&quot;)">
            <text:p/>
          </table:table-cell>
          <table:table-cell table:formula="of:=[$Checklist.T180]" office:value-type="float" office:value="0" calcext:value-type="float">
            <text:p>0</text:p>
          </table:table-cell>
          <table:table-cell table:formula="of:=IF(ISNUMBER(FIND(&quot;:&quot;;[.P47])); RIGHT([.P47]; LEN([.P47]) - FIND(&quot;:&quot;;[.P47]));&quot;&quot;)">
            <text:p/>
          </table:table-cell>
          <table:table-cell table:formula="of:=IF(ISNUMBER(FIND(&quot; &quot;; [.Q47])); LEFT([.Q47]; FIND(&quot; &quot;; [.Q47] &amp; &quot; &quot;; FIND(&quot; &quot;;[.Q47])+1) - 1); [.Q47])">
            <text:p/>
          </table:table-cell>
          <table:table-cell table:formula="of:=IF(ISNUMBER(FIND(&quot;(&quot;; [.R47])); LEFT([.R47]; FIND(&quot;(&quot;; [.R47]) - 1); [.R47])">
            <text:p/>
          </table:table-cell>
          <table:table-cell table:formula="of:=IF(ISNUMBER(FIND(&quot;=&quot;;[.R47])); RIGHT([.R47]; LEN([.R47]) - FIND(&quot;=&quot;;[.R47]));&quot;&quot;)">
            <text:p/>
          </table:table-cell>
          <table:table-cell table:number-columns-repeated="16364"/>
        </table:table-row>
        <table:table-row table:style-name="ro2">
          <table:table-cell table:number-columns-repeated="10"/>
          <table:table-cell table:formula="of:=[$Checklist.T80]" office:value-type="float" office:value="0" calcext:value-type="float">
            <text:p>0</text:p>
          </table:table-cell>
          <table:table-cell table:formula="of:=IF(ISNUMBER(FIND(&quot;:&quot;;[.K48])); RIGHT([.K48]; LEN([.K48]) - FIND(&quot;:&quot;;[.K48]));&quot;&quot;)">
            <text:p/>
          </table:table-cell>
          <table:table-cell table:formula="of:=IF(ISNUMBER(FIND(&quot; &quot;; [.L48])); LEFT([.L48]; FIND(&quot; &quot;; [.L48] &amp; &quot; &quot;; FIND(&quot; &quot;;[.L48])+1) - 1); [.L48])">
            <text:p/>
          </table:table-cell>
          <table:table-cell table:formula="of:=IF(ISNUMBER(FIND(&quot;(&quot;; [.M48])); LEFT([.M48]; FIND(&quot;(&quot;; [.M48]) - 1); [.M48])">
            <text:p/>
          </table:table-cell>
          <table:table-cell table:formula="of:=IF(ISNUMBER(FIND(&quot;=&quot;;[.M48])); RIGHT([.M48]; LEN([.M48]) - FIND(&quot;=&quot;;[.M48]));&quot;&quot;)">
            <text:p/>
          </table:table-cell>
          <table:table-cell table:formula="of:=[$Checklist.T181]" office:value-type="float" office:value="0" calcext:value-type="float">
            <text:p>0</text:p>
          </table:table-cell>
          <table:table-cell table:formula="of:=IF(ISNUMBER(FIND(&quot;:&quot;;[.P48])); RIGHT([.P48]; LEN([.P48]) - FIND(&quot;:&quot;;[.P48]));&quot;&quot;)">
            <text:p/>
          </table:table-cell>
          <table:table-cell table:formula="of:=IF(ISNUMBER(FIND(&quot; &quot;; [.Q48])); LEFT([.Q48]; FIND(&quot; &quot;; [.Q48] &amp; &quot; &quot;; FIND(&quot; &quot;;[.Q48])+1) - 1); [.Q48])">
            <text:p/>
          </table:table-cell>
          <table:table-cell table:formula="of:=IF(ISNUMBER(FIND(&quot;(&quot;; [.R48])); LEFT([.R48]; FIND(&quot;(&quot;; [.R48]) - 1); [.R48])">
            <text:p/>
          </table:table-cell>
          <table:table-cell table:formula="of:=IF(ISNUMBER(FIND(&quot;=&quot;;[.R48])); RIGHT([.R48]; LEN([.R48]) - FIND(&quot;=&quot;;[.R48]));&quot;&quot;)">
            <text:p/>
          </table:table-cell>
          <table:table-cell table:number-columns-repeated="16364"/>
        </table:table-row>
        <table:table-row table:style-name="ro2">
          <table:table-cell table:number-columns-repeated="10"/>
          <table:table-cell table:formula="of:=[$Checklist.T81]" office:value-type="float" office:value="0" calcext:value-type="float">
            <text:p>0</text:p>
          </table:table-cell>
          <table:table-cell table:formula="of:=IF(ISNUMBER(FIND(&quot;:&quot;;[.K49])); RIGHT([.K49]; LEN([.K49]) - FIND(&quot;:&quot;;[.K49]));&quot;&quot;)">
            <text:p/>
          </table:table-cell>
          <table:table-cell table:formula="of:=IF(ISNUMBER(FIND(&quot; &quot;; [.L49])); LEFT([.L49]; FIND(&quot; &quot;; [.L49] &amp; &quot; &quot;; FIND(&quot; &quot;;[.L49])+1) - 1); [.L49])">
            <text:p/>
          </table:table-cell>
          <table:table-cell table:formula="of:=IF(ISNUMBER(FIND(&quot;(&quot;; [.M49])); LEFT([.M49]; FIND(&quot;(&quot;; [.M49]) - 1); [.M49])">
            <text:p/>
          </table:table-cell>
          <table:table-cell table:formula="of:=IF(ISNUMBER(FIND(&quot;=&quot;;[.M49])); RIGHT([.M49]; LEN([.M49]) - FIND(&quot;=&quot;;[.M49]));&quot;&quot;)">
            <text:p/>
          </table:table-cell>
          <table:table-cell table:formula="of:=[$Checklist.T182]" office:value-type="float" office:value="0" calcext:value-type="float">
            <text:p>0</text:p>
          </table:table-cell>
          <table:table-cell table:formula="of:=IF(ISNUMBER(FIND(&quot;:&quot;;[.P49])); RIGHT([.P49]; LEN([.P49]) - FIND(&quot;:&quot;;[.P49]));&quot;&quot;)">
            <text:p/>
          </table:table-cell>
          <table:table-cell table:formula="of:=IF(ISNUMBER(FIND(&quot; &quot;; [.Q49])); LEFT([.Q49]; FIND(&quot; &quot;; [.Q49] &amp; &quot; &quot;; FIND(&quot; &quot;;[.Q49])+1) - 1); [.Q49])">
            <text:p/>
          </table:table-cell>
          <table:table-cell table:formula="of:=IF(ISNUMBER(FIND(&quot;(&quot;; [.R49])); LEFT([.R49]; FIND(&quot;(&quot;; [.R49]) - 1); [.R49])">
            <text:p/>
          </table:table-cell>
          <table:table-cell table:formula="of:=IF(ISNUMBER(FIND(&quot;=&quot;;[.R49])); RIGHT([.R49]; LEN([.R49]) - FIND(&quot;=&quot;;[.R49]));&quot;&quot;)">
            <text:p/>
          </table:table-cell>
          <table:table-cell table:number-columns-repeated="16364"/>
        </table:table-row>
        <table:table-row table:style-name="ro2">
          <table:table-cell table:number-columns-repeated="10"/>
          <table:table-cell table:formula="of:=[$Checklist.T82]" office:value-type="float" office:value="0" calcext:value-type="float">
            <text:p>0</text:p>
          </table:table-cell>
          <table:table-cell table:formula="of:=IF(ISNUMBER(FIND(&quot;:&quot;;[.K50])); RIGHT([.K50]; LEN([.K50]) - FIND(&quot;:&quot;;[.K50]));&quot;&quot;)">
            <text:p/>
          </table:table-cell>
          <table:table-cell table:formula="of:=IF(ISNUMBER(FIND(&quot; &quot;; [.L50])); LEFT([.L50]; FIND(&quot; &quot;; [.L50] &amp; &quot; &quot;; FIND(&quot; &quot;;[.L50])+1) - 1); [.L50])">
            <text:p/>
          </table:table-cell>
          <table:table-cell table:formula="of:=IF(ISNUMBER(FIND(&quot;(&quot;; [.M50])); LEFT([.M50]; FIND(&quot;(&quot;; [.M50]) - 1); [.M50])">
            <text:p/>
          </table:table-cell>
          <table:table-cell table:formula="of:=IF(ISNUMBER(FIND(&quot;=&quot;;[.M50])); RIGHT([.M50]; LEN([.M50]) - FIND(&quot;=&quot;;[.M50]));&quot;&quot;)">
            <text:p/>
          </table:table-cell>
          <table:table-cell table:formula="of:=[$Checklist.T183]" office:value-type="float" office:value="0" calcext:value-type="float">
            <text:p>0</text:p>
          </table:table-cell>
          <table:table-cell table:formula="of:=IF(ISNUMBER(FIND(&quot;:&quot;;[.P50])); RIGHT([.P50]; LEN([.P50]) - FIND(&quot;:&quot;;[.P50]));&quot;&quot;)">
            <text:p/>
          </table:table-cell>
          <table:table-cell table:formula="of:=IF(ISNUMBER(FIND(&quot; &quot;; [.Q50])); LEFT([.Q50]; FIND(&quot; &quot;; [.Q50] &amp; &quot; &quot;; FIND(&quot; &quot;;[.Q50])+1) - 1); [.Q50])">
            <text:p/>
          </table:table-cell>
          <table:table-cell table:formula="of:=IF(ISNUMBER(FIND(&quot;(&quot;; [.R50])); LEFT([.R50]; FIND(&quot;(&quot;; [.R50]) - 1); [.R50])">
            <text:p/>
          </table:table-cell>
          <table:table-cell table:formula="of:=IF(ISNUMBER(FIND(&quot;=&quot;;[.R50])); RIGHT([.R50]; LEN([.R50]) - FIND(&quot;=&quot;;[.R50]));&quot;&quot;)">
            <text:p/>
          </table:table-cell>
          <table:table-cell table:number-columns-repeated="16364"/>
        </table:table-row>
        <table:table-row table:style-name="ro2">
          <table:table-cell table:number-columns-repeated="10"/>
          <table:table-cell table:formula="of:=[$Checklist.T83]" office:value-type="float" office:value="0" calcext:value-type="float">
            <text:p>0</text:p>
          </table:table-cell>
          <table:table-cell table:formula="of:=IF(ISNUMBER(FIND(&quot;:&quot;;[.K51])); RIGHT([.K51]; LEN([.K51]) - FIND(&quot;:&quot;;[.K51]));&quot;&quot;)">
            <text:p/>
          </table:table-cell>
          <table:table-cell table:formula="of:=IF(ISNUMBER(FIND(&quot; &quot;; [.L51])); LEFT([.L51]; FIND(&quot; &quot;; [.L51] &amp; &quot; &quot;; FIND(&quot; &quot;;[.L51])+1) - 1); [.L51])">
            <text:p/>
          </table:table-cell>
          <table:table-cell table:formula="of:=IF(ISNUMBER(FIND(&quot;(&quot;; [.M51])); LEFT([.M51]; FIND(&quot;(&quot;; [.M51]) - 1); [.M51])">
            <text:p/>
          </table:table-cell>
          <table:table-cell table:formula="of:=IF(ISNUMBER(FIND(&quot;=&quot;;[.M51])); RIGHT([.M51]; LEN([.M51]) - FIND(&quot;=&quot;;[.M51]));&quot;&quot;)">
            <text:p/>
          </table:table-cell>
          <table:table-cell table:formula="of:=[$Checklist.T184]" office:value-type="float" office:value="0" calcext:value-type="float">
            <text:p>0</text:p>
          </table:table-cell>
          <table:table-cell table:formula="of:=IF(ISNUMBER(FIND(&quot;:&quot;;[.P51])); RIGHT([.P51]; LEN([.P51]) - FIND(&quot;:&quot;;[.P51]));&quot;&quot;)">
            <text:p/>
          </table:table-cell>
          <table:table-cell table:formula="of:=IF(ISNUMBER(FIND(&quot; &quot;; [.Q51])); LEFT([.Q51]; FIND(&quot; &quot;; [.Q51] &amp; &quot; &quot;; FIND(&quot; &quot;;[.Q51])+1) - 1); [.Q51])">
            <text:p/>
          </table:table-cell>
          <table:table-cell table:formula="of:=IF(ISNUMBER(FIND(&quot;(&quot;; [.R51])); LEFT([.R51]; FIND(&quot;(&quot;; [.R51]) - 1); [.R51])">
            <text:p/>
          </table:table-cell>
          <table:table-cell table:formula="of:=IF(ISNUMBER(FIND(&quot;=&quot;;[.R51])); RIGHT([.R51]; LEN([.R51]) - FIND(&quot;=&quot;;[.R51]));&quot;&quot;)">
            <text:p/>
          </table:table-cell>
          <table:table-cell table:number-columns-repeated="16364"/>
        </table:table-row>
        <table:table-row table:style-name="ro2">
          <table:table-cell table:number-columns-repeated="10"/>
          <table:table-cell table:formula="of:=[$Checklist.T84]" office:value-type="float" office:value="0" calcext:value-type="float">
            <text:p>0</text:p>
          </table:table-cell>
          <table:table-cell table:formula="of:=IF(ISNUMBER(FIND(&quot;:&quot;;[.K52])); RIGHT([.K52]; LEN([.K52]) - FIND(&quot;:&quot;;[.K52]));&quot;&quot;)">
            <text:p/>
          </table:table-cell>
          <table:table-cell table:formula="of:=IF(ISNUMBER(FIND(&quot; &quot;; [.L52])); LEFT([.L52]; FIND(&quot; &quot;; [.L52] &amp; &quot; &quot;; FIND(&quot; &quot;;[.L52])+1) - 1); [.L52])">
            <text:p/>
          </table:table-cell>
          <table:table-cell table:formula="of:=IF(ISNUMBER(FIND(&quot;(&quot;; [.M52])); LEFT([.M52]; FIND(&quot;(&quot;; [.M52]) - 1); [.M52])">
            <text:p/>
          </table:table-cell>
          <table:table-cell table:formula="of:=IF(ISNUMBER(FIND(&quot;=&quot;;[.M52])); RIGHT([.M52]; LEN([.M52]) - FIND(&quot;=&quot;;[.M52]));&quot;&quot;)">
            <text:p/>
          </table:table-cell>
          <table:table-cell table:formula="of:=[$Checklist.T185]" office:value-type="float" office:value="0" calcext:value-type="float">
            <text:p>0</text:p>
          </table:table-cell>
          <table:table-cell table:formula="of:=IF(ISNUMBER(FIND(&quot;:&quot;;[.P52])); RIGHT([.P52]; LEN([.P52]) - FIND(&quot;:&quot;;[.P52]));&quot;&quot;)">
            <text:p/>
          </table:table-cell>
          <table:table-cell table:formula="of:=IF(ISNUMBER(FIND(&quot; &quot;; [.Q52])); LEFT([.Q52]; FIND(&quot; &quot;; [.Q52] &amp; &quot; &quot;; FIND(&quot; &quot;;[.Q52])+1) - 1); [.Q52])">
            <text:p/>
          </table:table-cell>
          <table:table-cell table:formula="of:=IF(ISNUMBER(FIND(&quot;(&quot;; [.R52])); LEFT([.R52]; FIND(&quot;(&quot;; [.R52]) - 1); [.R52])">
            <text:p/>
          </table:table-cell>
          <table:table-cell table:formula="of:=IF(ISNUMBER(FIND(&quot;=&quot;;[.R52])); RIGHT([.R52]; LEN([.R52]) - FIND(&quot;=&quot;;[.R52]));&quot;&quot;)">
            <text:p/>
          </table:table-cell>
          <table:table-cell table:number-columns-repeated="16364"/>
        </table:table-row>
        <table:table-row table:style-name="ro2">
          <table:table-cell table:number-columns-repeated="10"/>
          <table:table-cell table:formula="of:=[$Checklist.T85]" office:value-type="float" office:value="0" calcext:value-type="float">
            <text:p>0</text:p>
          </table:table-cell>
          <table:table-cell table:formula="of:=IF(ISNUMBER(FIND(&quot;:&quot;;[.K53])); RIGHT([.K53]; LEN([.K53]) - FIND(&quot;:&quot;;[.K53]));&quot;&quot;)">
            <text:p/>
          </table:table-cell>
          <table:table-cell table:formula="of:=IF(ISNUMBER(FIND(&quot; &quot;; [.L53])); LEFT([.L53]; FIND(&quot; &quot;; [.L53] &amp; &quot; &quot;; FIND(&quot; &quot;;[.L53])+1) - 1); [.L53])">
            <text:p/>
          </table:table-cell>
          <table:table-cell table:formula="of:=IF(ISNUMBER(FIND(&quot;(&quot;; [.M53])); LEFT([.M53]; FIND(&quot;(&quot;; [.M53]) - 1); [.M53])">
            <text:p/>
          </table:table-cell>
          <table:table-cell table:formula="of:=IF(ISNUMBER(FIND(&quot;=&quot;;[.M53])); RIGHT([.M53]; LEN([.M53]) - FIND(&quot;=&quot;;[.M53]));&quot;&quot;)">
            <text:p/>
          </table:table-cell>
          <table:table-cell table:formula="of:=[$Checklist.T186]" office:value-type="float" office:value="0" calcext:value-type="float">
            <text:p>0</text:p>
          </table:table-cell>
          <table:table-cell table:formula="of:=IF(ISNUMBER(FIND(&quot;:&quot;;[.P53])); RIGHT([.P53]; LEN([.P53]) - FIND(&quot;:&quot;;[.P53]));&quot;&quot;)">
            <text:p/>
          </table:table-cell>
          <table:table-cell table:formula="of:=IF(ISNUMBER(FIND(&quot; &quot;; [.Q53])); LEFT([.Q53]; FIND(&quot; &quot;; [.Q53] &amp; &quot; &quot;; FIND(&quot; &quot;;[.Q53])+1) - 1); [.Q53])">
            <text:p/>
          </table:table-cell>
          <table:table-cell table:formula="of:=IF(ISNUMBER(FIND(&quot;(&quot;; [.R53])); LEFT([.R53]; FIND(&quot;(&quot;; [.R53]) - 1); [.R53])">
            <text:p/>
          </table:table-cell>
          <table:table-cell table:formula="of:=IF(ISNUMBER(FIND(&quot;=&quot;;[.R53])); RIGHT([.R53]; LEN([.R53]) - FIND(&quot;=&quot;;[.R53]));&quot;&quot;)">
            <text:p/>
          </table:table-cell>
          <table:table-cell table:number-columns-repeated="16364"/>
        </table:table-row>
        <table:table-row table:style-name="ro2">
          <table:table-cell table:number-columns-repeated="10"/>
          <table:table-cell table:formula="of:=[$Checklist.T86]" office:value-type="float" office:value="0" calcext:value-type="float">
            <text:p>0</text:p>
          </table:table-cell>
          <table:table-cell table:formula="of:=IF(ISNUMBER(FIND(&quot;:&quot;;[.K54])); RIGHT([.K54]; LEN([.K54]) - FIND(&quot;:&quot;;[.K54]));&quot;&quot;)">
            <text:p/>
          </table:table-cell>
          <table:table-cell table:formula="of:=IF(ISNUMBER(FIND(&quot; &quot;; [.L54])); LEFT([.L54]; FIND(&quot; &quot;; [.L54] &amp; &quot; &quot;; FIND(&quot; &quot;;[.L54])+1) - 1); [.L54])">
            <text:p/>
          </table:table-cell>
          <table:table-cell table:formula="of:=IF(ISNUMBER(FIND(&quot;(&quot;; [.M54])); LEFT([.M54]; FIND(&quot;(&quot;; [.M54]) - 1); [.M54])">
            <text:p/>
          </table:table-cell>
          <table:table-cell table:formula="of:=IF(ISNUMBER(FIND(&quot;=&quot;;[.M54])); RIGHT([.M54]; LEN([.M54]) - FIND(&quot;=&quot;;[.M54]));&quot;&quot;)">
            <text:p/>
          </table:table-cell>
          <table:table-cell table:formula="of:=[$Checklist.T187]" office:value-type="float" office:value="0" calcext:value-type="float">
            <text:p>0</text:p>
          </table:table-cell>
          <table:table-cell table:formula="of:=IF(ISNUMBER(FIND(&quot;:&quot;;[.P54])); RIGHT([.P54]; LEN([.P54]) - FIND(&quot;:&quot;;[.P54]));&quot;&quot;)">
            <text:p/>
          </table:table-cell>
          <table:table-cell table:formula="of:=IF(ISNUMBER(FIND(&quot; &quot;; [.Q54])); LEFT([.Q54]; FIND(&quot; &quot;; [.Q54] &amp; &quot; &quot;; FIND(&quot; &quot;;[.Q54])+1) - 1); [.Q54])">
            <text:p/>
          </table:table-cell>
          <table:table-cell table:formula="of:=IF(ISNUMBER(FIND(&quot;(&quot;; [.R54])); LEFT([.R54]; FIND(&quot;(&quot;; [.R54]) - 1); [.R54])">
            <text:p/>
          </table:table-cell>
          <table:table-cell table:formula="of:=IF(ISNUMBER(FIND(&quot;=&quot;;[.R54])); RIGHT([.R54]; LEN([.R54]) - FIND(&quot;=&quot;;[.R54]));&quot;&quot;)">
            <text:p/>
          </table:table-cell>
          <table:table-cell table:number-columns-repeated="16364"/>
        </table:table-row>
        <table:table-row table:style-name="ro2">
          <table:table-cell table:number-columns-repeated="10"/>
          <table:table-cell table:formula="of:=[$Checklist.T87]" office:value-type="float" office:value="0" calcext:value-type="float">
            <text:p>0</text:p>
          </table:table-cell>
          <table:table-cell table:formula="of:=IF(ISNUMBER(FIND(&quot;:&quot;;[.K55])); RIGHT([.K55]; LEN([.K55]) - FIND(&quot;:&quot;;[.K55]));&quot;&quot;)">
            <text:p/>
          </table:table-cell>
          <table:table-cell table:formula="of:=IF(ISNUMBER(FIND(&quot; &quot;; [.L55])); LEFT([.L55]; FIND(&quot; &quot;; [.L55] &amp; &quot; &quot;; FIND(&quot; &quot;;[.L55])+1) - 1); [.L55])">
            <text:p/>
          </table:table-cell>
          <table:table-cell table:formula="of:=IF(ISNUMBER(FIND(&quot;(&quot;; [.M55])); LEFT([.M55]; FIND(&quot;(&quot;; [.M55]) - 1); [.M55])">
            <text:p/>
          </table:table-cell>
          <table:table-cell table:formula="of:=IF(ISNUMBER(FIND(&quot;=&quot;;[.M55])); RIGHT([.M55]; LEN([.M55]) - FIND(&quot;=&quot;;[.M55]));&quot;&quot;)">
            <text:p/>
          </table:table-cell>
          <table:table-cell table:formula="of:=[$Checklist.T189]" office:value-type="float" office:value="0" calcext:value-type="float">
            <text:p>0</text:p>
          </table:table-cell>
          <table:table-cell table:formula="of:=IF(ISNUMBER(FIND(&quot;:&quot;;[.P55])); RIGHT([.P55]; LEN([.P55]) - FIND(&quot;:&quot;;[.P55]));&quot;&quot;)">
            <text:p/>
          </table:table-cell>
          <table:table-cell table:formula="of:=IF(ISNUMBER(FIND(&quot; &quot;; [.Q55])); LEFT([.Q55]; FIND(&quot; &quot;; [.Q55] &amp; &quot; &quot;; FIND(&quot; &quot;;[.Q55])+1) - 1); [.Q55])">
            <text:p/>
          </table:table-cell>
          <table:table-cell table:formula="of:=IF(ISNUMBER(FIND(&quot;(&quot;; [.R55])); LEFT([.R55]; FIND(&quot;(&quot;; [.R55]) - 1); [.R55])">
            <text:p/>
          </table:table-cell>
          <table:table-cell table:formula="of:=IF(ISNUMBER(FIND(&quot;=&quot;;[.R55])); RIGHT([.R55]; LEN([.R55]) - FIND(&quot;=&quot;;[.R55]));&quot;&quot;)">
            <text:p/>
          </table:table-cell>
          <table:table-cell table:number-columns-repeated="16364"/>
        </table:table-row>
        <table:table-row table:style-name="ro2">
          <table:table-cell table:number-columns-repeated="10"/>
          <table:table-cell table:formula="of:=[$Checklist.T88]" office:value-type="float" office:value="0" calcext:value-type="float">
            <text:p>0</text:p>
          </table:table-cell>
          <table:table-cell table:formula="of:=IF(ISNUMBER(FIND(&quot;:&quot;;[.K56])); RIGHT([.K56]; LEN([.K56]) - FIND(&quot;:&quot;;[.K56]));&quot;&quot;)">
            <text:p/>
          </table:table-cell>
          <table:table-cell table:formula="of:=IF(ISNUMBER(FIND(&quot; &quot;; [.L56])); LEFT([.L56]; FIND(&quot; &quot;; [.L56] &amp; &quot; &quot;; FIND(&quot; &quot;;[.L56])+1) - 1); [.L56])">
            <text:p/>
          </table:table-cell>
          <table:table-cell table:formula="of:=IF(ISNUMBER(FIND(&quot;(&quot;; [.M56])); LEFT([.M56]; FIND(&quot;(&quot;; [.M56]) - 1); [.M56])">
            <text:p/>
          </table:table-cell>
          <table:table-cell table:formula="of:=IF(ISNUMBER(FIND(&quot;=&quot;;[.M56])); RIGHT([.M56]; LEN([.M56]) - FIND(&quot;=&quot;;[.M56]));&quot;&quot;)">
            <text:p/>
          </table:table-cell>
          <table:table-cell table:formula="of:=[$Checklist.T190]" office:value-type="float" office:value="0" calcext:value-type="float">
            <text:p>0</text:p>
          </table:table-cell>
          <table:table-cell table:formula="of:=IF(ISNUMBER(FIND(&quot;:&quot;;[.P56])); RIGHT([.P56]; LEN([.P56]) - FIND(&quot;:&quot;;[.P56]));&quot;&quot;)">
            <text:p/>
          </table:table-cell>
          <table:table-cell table:formula="of:=IF(ISNUMBER(FIND(&quot; &quot;; [.Q56])); LEFT([.Q56]; FIND(&quot; &quot;; [.Q56] &amp; &quot; &quot;; FIND(&quot; &quot;;[.Q56])+1) - 1); [.Q56])">
            <text:p/>
          </table:table-cell>
          <table:table-cell table:formula="of:=IF(ISNUMBER(FIND(&quot;(&quot;; [.R56])); LEFT([.R56]; FIND(&quot;(&quot;; [.R56]) - 1); [.R56])">
            <text:p/>
          </table:table-cell>
          <table:table-cell table:formula="of:=IF(ISNUMBER(FIND(&quot;=&quot;;[.R56])); RIGHT([.R56]; LEN([.R56]) - FIND(&quot;=&quot;;[.R56]));&quot;&quot;)">
            <text:p/>
          </table:table-cell>
          <table:table-cell table:number-columns-repeated="16364"/>
        </table:table-row>
        <table:table-row table:style-name="ro2">
          <table:table-cell table:number-columns-repeated="10"/>
          <table:table-cell table:formula="of:=[$Checklist.T89]" office:value-type="float" office:value="0" calcext:value-type="float">
            <text:p>0</text:p>
          </table:table-cell>
          <table:table-cell table:formula="of:=IF(ISNUMBER(FIND(&quot;:&quot;;[.K57])); RIGHT([.K57]; LEN([.K57]) - FIND(&quot;:&quot;;[.K57]));&quot;&quot;)">
            <text:p/>
          </table:table-cell>
          <table:table-cell table:formula="of:=IF(ISNUMBER(FIND(&quot; &quot;; [.L57])); LEFT([.L57]; FIND(&quot; &quot;; [.L57] &amp; &quot; &quot;; FIND(&quot; &quot;;[.L57])+1) - 1); [.L57])">
            <text:p/>
          </table:table-cell>
          <table:table-cell table:formula="of:=IF(ISNUMBER(FIND(&quot;(&quot;; [.M57])); LEFT([.M57]; FIND(&quot;(&quot;; [.M57]) - 1); [.M57])">
            <text:p/>
          </table:table-cell>
          <table:table-cell table:formula="of:=IF(ISNUMBER(FIND(&quot;=&quot;;[.M57])); RIGHT([.M57]; LEN([.M57]) - FIND(&quot;=&quot;;[.M57]));&quot;&quot;)">
            <text:p/>
          </table:table-cell>
          <table:table-cell table:formula="of:=[$Checklist.T191]" office:value-type="float" office:value="0" calcext:value-type="float">
            <text:p>0</text:p>
          </table:table-cell>
          <table:table-cell table:formula="of:=IF(ISNUMBER(FIND(&quot;:&quot;;[.P57])); RIGHT([.P57]; LEN([.P57]) - FIND(&quot;:&quot;;[.P57]));&quot;&quot;)">
            <text:p/>
          </table:table-cell>
          <table:table-cell table:formula="of:=IF(ISNUMBER(FIND(&quot; &quot;; [.Q57])); LEFT([.Q57]; FIND(&quot; &quot;; [.Q57] &amp; &quot; &quot;; FIND(&quot; &quot;;[.Q57])+1) - 1); [.Q57])">
            <text:p/>
          </table:table-cell>
          <table:table-cell table:formula="of:=IF(ISNUMBER(FIND(&quot;(&quot;; [.R57])); LEFT([.R57]; FIND(&quot;(&quot;; [.R57]) - 1); [.R57])">
            <text:p/>
          </table:table-cell>
          <table:table-cell table:formula="of:=IF(ISNUMBER(FIND(&quot;=&quot;;[.R57])); RIGHT([.R57]; LEN([.R57]) - FIND(&quot;=&quot;;[.R57]));&quot;&quot;)">
            <text:p/>
          </table:table-cell>
          <table:table-cell table:number-columns-repeated="16364"/>
        </table:table-row>
        <table:table-row table:style-name="ro2">
          <table:table-cell table:number-columns-repeated="10"/>
          <table:table-cell table:formula="of:=[$Checklist.T90]" office:value-type="float" office:value="0" calcext:value-type="float">
            <text:p>0</text:p>
          </table:table-cell>
          <table:table-cell table:formula="of:=IF(ISNUMBER(FIND(&quot;:&quot;;[.K58])); RIGHT([.K58]; LEN([.K58]) - FIND(&quot;:&quot;;[.K58]));&quot;&quot;)">
            <text:p/>
          </table:table-cell>
          <table:table-cell table:formula="of:=IF(ISNUMBER(FIND(&quot; &quot;; [.L58])); LEFT([.L58]; FIND(&quot; &quot;; [.L58] &amp; &quot; &quot;; FIND(&quot; &quot;;[.L58])+1) - 1); [.L58])">
            <text:p/>
          </table:table-cell>
          <table:table-cell table:formula="of:=IF(ISNUMBER(FIND(&quot;(&quot;; [.M58])); LEFT([.M58]; FIND(&quot;(&quot;; [.M58]) - 1); [.M58])">
            <text:p/>
          </table:table-cell>
          <table:table-cell table:formula="of:=IF(ISNUMBER(FIND(&quot;=&quot;;[.M58])); RIGHT([.M58]; LEN([.M58]) - FIND(&quot;=&quot;;[.M58]));&quot;&quot;)">
            <text:p/>
          </table:table-cell>
          <table:table-cell table:formula="of:=[$Checklist.T192]" office:value-type="float" office:value="0" calcext:value-type="float">
            <text:p>0</text:p>
          </table:table-cell>
          <table:table-cell table:formula="of:=IF(ISNUMBER(FIND(&quot;:&quot;;[.P58])); RIGHT([.P58]; LEN([.P58]) - FIND(&quot;:&quot;;[.P58]));&quot;&quot;)">
            <text:p/>
          </table:table-cell>
          <table:table-cell table:formula="of:=IF(ISNUMBER(FIND(&quot; &quot;; [.Q58])); LEFT([.Q58]; FIND(&quot; &quot;; [.Q58] &amp; &quot; &quot;; FIND(&quot; &quot;;[.Q58])+1) - 1); [.Q58])">
            <text:p/>
          </table:table-cell>
          <table:table-cell table:formula="of:=IF(ISNUMBER(FIND(&quot;(&quot;; [.R58])); LEFT([.R58]; FIND(&quot;(&quot;; [.R58]) - 1); [.R58])">
            <text:p/>
          </table:table-cell>
          <table:table-cell table:formula="of:=IF(ISNUMBER(FIND(&quot;=&quot;;[.R58])); RIGHT([.R58]; LEN([.R58]) - FIND(&quot;=&quot;;[.R58]));&quot;&quot;)">
            <text:p/>
          </table:table-cell>
          <table:table-cell table:number-columns-repeated="16364"/>
        </table:table-row>
        <table:table-row table:style-name="ro2">
          <table:table-cell table:number-columns-repeated="10"/>
          <table:table-cell table:formula="of:=[$Checklist.T91]" office:value-type="float" office:value="0" calcext:value-type="float">
            <text:p>0</text:p>
          </table:table-cell>
          <table:table-cell table:formula="of:=IF(ISNUMBER(FIND(&quot;:&quot;;[.K59])); RIGHT([.K59]; LEN([.K59]) - FIND(&quot;:&quot;;[.K59]));&quot;&quot;)">
            <text:p/>
          </table:table-cell>
          <table:table-cell table:formula="of:=IF(ISNUMBER(FIND(&quot; &quot;; [.L59])); LEFT([.L59]; FIND(&quot; &quot;; [.L59] &amp; &quot; &quot;; FIND(&quot; &quot;;[.L59])+1) - 1); [.L59])">
            <text:p/>
          </table:table-cell>
          <table:table-cell table:formula="of:=IF(ISNUMBER(FIND(&quot;(&quot;; [.M59])); LEFT([.M59]; FIND(&quot;(&quot;; [.M59]) - 1); [.M59])">
            <text:p/>
          </table:table-cell>
          <table:table-cell table:formula="of:=IF(ISNUMBER(FIND(&quot;=&quot;;[.M59])); RIGHT([.M59]; LEN([.M59]) - FIND(&quot;=&quot;;[.M59]));&quot;&quot;)">
            <text:p/>
          </table:table-cell>
          <table:table-cell table:formula="of:=[$Checklist.T193]" office:value-type="float" office:value="0" calcext:value-type="float">
            <text:p>0</text:p>
          </table:table-cell>
          <table:table-cell table:formula="of:=IF(ISNUMBER(FIND(&quot;:&quot;;[.P59])); RIGHT([.P59]; LEN([.P59]) - FIND(&quot;:&quot;;[.P59]));&quot;&quot;)">
            <text:p/>
          </table:table-cell>
          <table:table-cell table:formula="of:=IF(ISNUMBER(FIND(&quot; &quot;; [.Q59])); LEFT([.Q59]; FIND(&quot; &quot;; [.Q59] &amp; &quot; &quot;; FIND(&quot; &quot;;[.Q59])+1) - 1); [.Q59])">
            <text:p/>
          </table:table-cell>
          <table:table-cell table:formula="of:=IF(ISNUMBER(FIND(&quot;(&quot;; [.R59])); LEFT([.R59]; FIND(&quot;(&quot;; [.R59]) - 1); [.R59])">
            <text:p/>
          </table:table-cell>
          <table:table-cell table:formula="of:=IF(ISNUMBER(FIND(&quot;=&quot;;[.R59])); RIGHT([.R59]; LEN([.R59]) - FIND(&quot;=&quot;;[.R59]));&quot;&quot;)">
            <text:p/>
          </table:table-cell>
          <table:table-cell table:number-columns-repeated="16364"/>
        </table:table-row>
        <table:table-row table:style-name="ro2">
          <table:table-cell table:number-columns-repeated="10"/>
          <table:table-cell table:formula="of:=[$Checklist.T92]" office:value-type="float" office:value="0" calcext:value-type="float">
            <text:p>0</text:p>
          </table:table-cell>
          <table:table-cell table:formula="of:=IF(ISNUMBER(FIND(&quot;:&quot;;[.K60])); RIGHT([.K60]; LEN([.K60]) - FIND(&quot;:&quot;;[.K60]));&quot;&quot;)">
            <text:p/>
          </table:table-cell>
          <table:table-cell table:formula="of:=IF(ISNUMBER(FIND(&quot; &quot;; [.L60])); LEFT([.L60]; FIND(&quot; &quot;; [.L60] &amp; &quot; &quot;; FIND(&quot; &quot;;[.L60])+1) - 1); [.L60])">
            <text:p/>
          </table:table-cell>
          <table:table-cell table:formula="of:=IF(ISNUMBER(FIND(&quot;(&quot;; [.M60])); LEFT([.M60]; FIND(&quot;(&quot;; [.M60]) - 1); [.M60])">
            <text:p/>
          </table:table-cell>
          <table:table-cell table:formula="of:=IF(ISNUMBER(FIND(&quot;=&quot;;[.M60])); RIGHT([.M60]; LEN([.M60]) - FIND(&quot;=&quot;;[.M60]));&quot;&quot;)">
            <text:p/>
          </table:table-cell>
          <table:table-cell table:formula="of:=[$Checklist.T194]" office:value-type="float" office:value="0" calcext:value-type="float">
            <text:p>0</text:p>
          </table:table-cell>
          <table:table-cell table:formula="of:=IF(ISNUMBER(FIND(&quot;:&quot;;[.P60])); RIGHT([.P60]; LEN([.P60]) - FIND(&quot;:&quot;;[.P60]));&quot;&quot;)">
            <text:p/>
          </table:table-cell>
          <table:table-cell table:formula="of:=IF(ISNUMBER(FIND(&quot; &quot;; [.Q60])); LEFT([.Q60]; FIND(&quot; &quot;; [.Q60] &amp; &quot; &quot;; FIND(&quot; &quot;;[.Q60])+1) - 1); [.Q60])">
            <text:p/>
          </table:table-cell>
          <table:table-cell table:formula="of:=IF(ISNUMBER(FIND(&quot;(&quot;; [.R60])); LEFT([.R60]; FIND(&quot;(&quot;; [.R60]) - 1); [.R60])">
            <text:p/>
          </table:table-cell>
          <table:table-cell table:formula="of:=IF(ISNUMBER(FIND(&quot;=&quot;;[.R60])); RIGHT([.R60]; LEN([.R60]) - FIND(&quot;=&quot;;[.R60]));&quot;&quot;)">
            <text:p/>
          </table:table-cell>
          <table:table-cell table:number-columns-repeated="16364"/>
        </table:table-row>
        <table:table-row table:style-name="ro2">
          <table:table-cell table:number-columns-repeated="10"/>
          <table:table-cell table:formula="of:=[$Checklist.T93]" office:value-type="float" office:value="0" calcext:value-type="float">
            <text:p>0</text:p>
          </table:table-cell>
          <table:table-cell table:formula="of:=IF(ISNUMBER(FIND(&quot;:&quot;;[.K61])); RIGHT([.K61]; LEN([.K61]) - FIND(&quot;:&quot;;[.K61]));&quot;&quot;)">
            <text:p/>
          </table:table-cell>
          <table:table-cell table:formula="of:=IF(ISNUMBER(FIND(&quot; &quot;; [.L61])); LEFT([.L61]; FIND(&quot; &quot;; [.L61] &amp; &quot; &quot;; FIND(&quot; &quot;;[.L61])+1) - 1); [.L61])">
            <text:p/>
          </table:table-cell>
          <table:table-cell table:formula="of:=IF(ISNUMBER(FIND(&quot;(&quot;; [.M61])); LEFT([.M61]; FIND(&quot;(&quot;; [.M61]) - 1); [.M61])">
            <text:p/>
          </table:table-cell>
          <table:table-cell table:formula="of:=IF(ISNUMBER(FIND(&quot;=&quot;;[.M61])); RIGHT([.M61]; LEN([.M61]) - FIND(&quot;=&quot;;[.M61]));&quot;&quot;)">
            <text:p/>
          </table:table-cell>
          <table:table-cell table:formula="of:=[$Checklist.T195]" office:value-type="float" office:value="0" calcext:value-type="float">
            <text:p>0</text:p>
          </table:table-cell>
          <table:table-cell table:formula="of:=IF(ISNUMBER(FIND(&quot;:&quot;;[.P61])); RIGHT([.P61]; LEN([.P61]) - FIND(&quot;:&quot;;[.P61]));&quot;&quot;)">
            <text:p/>
          </table:table-cell>
          <table:table-cell table:formula="of:=IF(ISNUMBER(FIND(&quot; &quot;; [.Q61])); LEFT([.Q61]; FIND(&quot; &quot;; [.Q61] &amp; &quot; &quot;; FIND(&quot; &quot;;[.Q61])+1) - 1); [.Q61])">
            <text:p/>
          </table:table-cell>
          <table:table-cell table:formula="of:=IF(ISNUMBER(FIND(&quot;(&quot;; [.R61])); LEFT([.R61]; FIND(&quot;(&quot;; [.R61]) - 1); [.R61])">
            <text:p/>
          </table:table-cell>
          <table:table-cell table:formula="of:=IF(ISNUMBER(FIND(&quot;=&quot;;[.R61])); RIGHT([.R61]; LEN([.R61]) - FIND(&quot;=&quot;;[.R61]));&quot;&quot;)">
            <text:p/>
          </table:table-cell>
          <table:table-cell table:number-columns-repeated="16364"/>
        </table:table-row>
        <table:table-row table:style-name="ro2">
          <table:table-cell table:number-columns-repeated="10"/>
          <table:table-cell table:formula="of:=[$Checklist.T94]" office:value-type="float" office:value="0" calcext:value-type="float">
            <text:p>0</text:p>
          </table:table-cell>
          <table:table-cell table:formula="of:=IF(ISNUMBER(FIND(&quot;:&quot;;[.K62])); RIGHT([.K62]; LEN([.K62]) - FIND(&quot;:&quot;;[.K62]));&quot;&quot;)">
            <text:p/>
          </table:table-cell>
          <table:table-cell table:formula="of:=IF(ISNUMBER(FIND(&quot; &quot;; [.L62])); LEFT([.L62]; FIND(&quot; &quot;; [.L62] &amp; &quot; &quot;; FIND(&quot; &quot;;[.L62])+1) - 1); [.L62])">
            <text:p/>
          </table:table-cell>
          <table:table-cell table:formula="of:=IF(ISNUMBER(FIND(&quot;(&quot;; [.M62])); LEFT([.M62]; FIND(&quot;(&quot;; [.M62]) - 1); [.M62])">
            <text:p/>
          </table:table-cell>
          <table:table-cell table:formula="of:=IF(ISNUMBER(FIND(&quot;=&quot;;[.M62])); RIGHT([.M62]; LEN([.M62]) - FIND(&quot;=&quot;;[.M62]));&quot;&quot;)">
            <text:p/>
          </table:table-cell>
          <table:table-cell table:formula="of:=[$Checklist.T196]" office:value-type="float" office:value="0" calcext:value-type="float">
            <text:p>0</text:p>
          </table:table-cell>
          <table:table-cell table:formula="of:=IF(ISNUMBER(FIND(&quot;:&quot;;[.P62])); RIGHT([.P62]; LEN([.P62]) - FIND(&quot;:&quot;;[.P62]));&quot;&quot;)">
            <text:p/>
          </table:table-cell>
          <table:table-cell table:formula="of:=IF(ISNUMBER(FIND(&quot; &quot;; [.Q62])); LEFT([.Q62]; FIND(&quot; &quot;; [.Q62] &amp; &quot; &quot;; FIND(&quot; &quot;;[.Q62])+1) - 1); [.Q62])">
            <text:p/>
          </table:table-cell>
          <table:table-cell table:formula="of:=IF(ISNUMBER(FIND(&quot;(&quot;; [.R62])); LEFT([.R62]; FIND(&quot;(&quot;; [.R62]) - 1); [.R62])">
            <text:p/>
          </table:table-cell>
          <table:table-cell table:formula="of:=IF(ISNUMBER(FIND(&quot;=&quot;;[.R62])); RIGHT([.R62]; LEN([.R62]) - FIND(&quot;=&quot;;[.R62]));&quot;&quot;)">
            <text:p/>
          </table:table-cell>
          <table:table-cell table:number-columns-repeated="16364"/>
        </table:table-row>
        <table:table-row table:style-name="ro2">
          <table:table-cell table:number-columns-repeated="10"/>
          <table:table-cell table:formula="of:=[$Checklist.T95]" office:value-type="float" office:value="0" calcext:value-type="float">
            <text:p>0</text:p>
          </table:table-cell>
          <table:table-cell table:formula="of:=IF(ISNUMBER(FIND(&quot;:&quot;;[.K63])); RIGHT([.K63]; LEN([.K63]) - FIND(&quot;:&quot;;[.K63]));&quot;&quot;)">
            <text:p/>
          </table:table-cell>
          <table:table-cell table:formula="of:=IF(ISNUMBER(FIND(&quot; &quot;; [.L63])); LEFT([.L63]; FIND(&quot; &quot;; [.L63] &amp; &quot; &quot;; FIND(&quot; &quot;;[.L63])+1) - 1); [.L63])">
            <text:p/>
          </table:table-cell>
          <table:table-cell table:formula="of:=IF(ISNUMBER(FIND(&quot;(&quot;; [.M63])); LEFT([.M63]; FIND(&quot;(&quot;; [.M63]) - 1); [.M63])">
            <text:p/>
          </table:table-cell>
          <table:table-cell table:formula="of:=IF(ISNUMBER(FIND(&quot;=&quot;;[.M63])); RIGHT([.M63]; LEN([.M63]) - FIND(&quot;=&quot;;[.M63]));&quot;&quot;)">
            <text:p/>
          </table:table-cell>
          <table:table-cell table:formula="of:=[$Checklist.T197]" office:value-type="float" office:value="0" calcext:value-type="float">
            <text:p>0</text:p>
          </table:table-cell>
          <table:table-cell table:formula="of:=IF(ISNUMBER(FIND(&quot;:&quot;;[.P63])); RIGHT([.P63]; LEN([.P63]) - FIND(&quot;:&quot;;[.P63]));&quot;&quot;)">
            <text:p/>
          </table:table-cell>
          <table:table-cell table:formula="of:=IF(ISNUMBER(FIND(&quot; &quot;; [.Q63])); LEFT([.Q63]; FIND(&quot; &quot;; [.Q63] &amp; &quot; &quot;; FIND(&quot; &quot;;[.Q63])+1) - 1); [.Q63])">
            <text:p/>
          </table:table-cell>
          <table:table-cell table:formula="of:=IF(ISNUMBER(FIND(&quot;(&quot;; [.R63])); LEFT([.R63]; FIND(&quot;(&quot;; [.R63]) - 1); [.R63])">
            <text:p/>
          </table:table-cell>
          <table:table-cell table:formula="of:=IF(ISNUMBER(FIND(&quot;=&quot;;[.R63])); RIGHT([.R63]; LEN([.R63]) - FIND(&quot;=&quot;;[.R63]));&quot;&quot;)">
            <text:p/>
          </table:table-cell>
          <table:table-cell table:number-columns-repeated="16364"/>
        </table:table-row>
        <table:table-row table:style-name="ro2">
          <table:table-cell table:number-columns-repeated="10"/>
          <table:table-cell table:formula="of:=[$Checklist.T96]" office:value-type="float" office:value="0" calcext:value-type="float">
            <text:p>0</text:p>
          </table:table-cell>
          <table:table-cell table:formula="of:=IF(ISNUMBER(FIND(&quot;:&quot;;[.K64])); RIGHT([.K64]; LEN([.K64]) - FIND(&quot;:&quot;;[.K64]));&quot;&quot;)">
            <text:p/>
          </table:table-cell>
          <table:table-cell table:formula="of:=IF(ISNUMBER(FIND(&quot; &quot;; [.L64])); LEFT([.L64]; FIND(&quot; &quot;; [.L64] &amp; &quot; &quot;; FIND(&quot; &quot;;[.L64])+1) - 1); [.L64])">
            <text:p/>
          </table:table-cell>
          <table:table-cell table:formula="of:=IF(ISNUMBER(FIND(&quot;(&quot;; [.M64])); LEFT([.M64]; FIND(&quot;(&quot;; [.M64]) - 1); [.M64])">
            <text:p/>
          </table:table-cell>
          <table:table-cell table:formula="of:=IF(ISNUMBER(FIND(&quot;=&quot;;[.M64])); RIGHT([.M64]; LEN([.M64]) - FIND(&quot;=&quot;;[.M64]));&quot;&quot;)">
            <text:p/>
          </table:table-cell>
          <table:table-cell table:formula="of:=[$Checklist.T198]" office:value-type="float" office:value="0" calcext:value-type="float">
            <text:p>0</text:p>
          </table:table-cell>
          <table:table-cell table:formula="of:=IF(ISNUMBER(FIND(&quot;:&quot;;[.P64])); RIGHT([.P64]; LEN([.P64]) - FIND(&quot;:&quot;;[.P64]));&quot;&quot;)">
            <text:p/>
          </table:table-cell>
          <table:table-cell table:formula="of:=IF(ISNUMBER(FIND(&quot; &quot;; [.Q64])); LEFT([.Q64]; FIND(&quot; &quot;; [.Q64] &amp; &quot; &quot;; FIND(&quot; &quot;;[.Q64])+1) - 1); [.Q64])">
            <text:p/>
          </table:table-cell>
          <table:table-cell table:formula="of:=IF(ISNUMBER(FIND(&quot;(&quot;; [.R64])); LEFT([.R64]; FIND(&quot;(&quot;; [.R64]) - 1); [.R64])">
            <text:p/>
          </table:table-cell>
          <table:table-cell table:formula="of:=IF(ISNUMBER(FIND(&quot;=&quot;;[.R64])); RIGHT([.R64]; LEN([.R64]) - FIND(&quot;=&quot;;[.R64]));&quot;&quot;)">
            <text:p/>
          </table:table-cell>
          <table:table-cell table:number-columns-repeated="16364"/>
        </table:table-row>
        <table:table-row table:style-name="ro2">
          <table:table-cell table:number-columns-repeated="10"/>
          <table:table-cell table:formula="of:=[$Checklist.T97]" office:value-type="float" office:value="0" calcext:value-type="float">
            <text:p>0</text:p>
          </table:table-cell>
          <table:table-cell table:formula="of:=IF(ISNUMBER(FIND(&quot;:&quot;;[.K65])); RIGHT([.K65]; LEN([.K65]) - FIND(&quot;:&quot;;[.K65]));&quot;&quot;)">
            <text:p/>
          </table:table-cell>
          <table:table-cell table:formula="of:=IF(ISNUMBER(FIND(&quot; &quot;; [.L65])); LEFT([.L65]; FIND(&quot; &quot;; [.L65] &amp; &quot; &quot;; FIND(&quot; &quot;;[.L65])+1) - 1); [.L65])">
            <text:p/>
          </table:table-cell>
          <table:table-cell table:formula="of:=IF(ISNUMBER(FIND(&quot;(&quot;; [.M65])); LEFT([.M65]; FIND(&quot;(&quot;; [.M65]) - 1); [.M65])">
            <text:p/>
          </table:table-cell>
          <table:table-cell table:formula="of:=IF(ISNUMBER(FIND(&quot;=&quot;;[.M65])); RIGHT([.M65]; LEN([.M65]) - FIND(&quot;=&quot;;[.M65]));&quot;&quot;)">
            <text:p/>
          </table:table-cell>
          <table:table-cell table:formula="of:=[$Checklist.T199]" office:value-type="float" office:value="0" calcext:value-type="float">
            <text:p>0</text:p>
          </table:table-cell>
          <table:table-cell table:formula="of:=IF(ISNUMBER(FIND(&quot;:&quot;;[.P65])); RIGHT([.P65]; LEN([.P65]) - FIND(&quot;:&quot;;[.P65]));&quot;&quot;)">
            <text:p/>
          </table:table-cell>
          <table:table-cell table:formula="of:=IF(ISNUMBER(FIND(&quot; &quot;; [.Q65])); LEFT([.Q65]; FIND(&quot; &quot;; [.Q65] &amp; &quot; &quot;; FIND(&quot; &quot;;[.Q65])+1) - 1); [.Q65])">
            <text:p/>
          </table:table-cell>
          <table:table-cell table:formula="of:=IF(ISNUMBER(FIND(&quot;(&quot;; [.R65])); LEFT([.R65]; FIND(&quot;(&quot;; [.R65]) - 1); [.R65])">
            <text:p/>
          </table:table-cell>
          <table:table-cell table:formula="of:=IF(ISNUMBER(FIND(&quot;=&quot;;[.R65])); RIGHT([.R65]; LEN([.R65]) - FIND(&quot;=&quot;;[.R65]));&quot;&quot;)">
            <text:p/>
          </table:table-cell>
          <table:table-cell table:number-columns-repeated="16364"/>
        </table:table-row>
        <table:table-row table:style-name="ro2">
          <table:table-cell table:number-columns-repeated="10"/>
          <table:table-cell table:formula="of:=[$Checklist.T98]" office:value-type="float" office:value="0" calcext:value-type="float">
            <text:p>0</text:p>
          </table:table-cell>
          <table:table-cell table:formula="of:=IF(ISNUMBER(FIND(&quot;:&quot;;[.K66])); RIGHT([.K66]; LEN([.K66]) - FIND(&quot;:&quot;;[.K66]));&quot;&quot;)">
            <text:p/>
          </table:table-cell>
          <table:table-cell table:formula="of:=IF(ISNUMBER(FIND(&quot; &quot;; [.L66])); LEFT([.L66]; FIND(&quot; &quot;; [.L66] &amp; &quot; &quot;; FIND(&quot; &quot;;[.L66])+1) - 1); [.L66])">
            <text:p/>
          </table:table-cell>
          <table:table-cell table:formula="of:=IF(ISNUMBER(FIND(&quot;(&quot;; [.M66])); LEFT([.M66]; FIND(&quot;(&quot;; [.M66]) - 1); [.M66])">
            <text:p/>
          </table:table-cell>
          <table:table-cell table:formula="of:=IF(ISNUMBER(FIND(&quot;=&quot;;[.M66])); RIGHT([.M66]; LEN([.M66]) - FIND(&quot;=&quot;;[.M66]));&quot;&quot;)">
            <text:p/>
          </table:table-cell>
          <table:table-cell table:formula="of:=[$Checklist.T200]" office:value-type="float" office:value="0" calcext:value-type="float">
            <text:p>0</text:p>
          </table:table-cell>
          <table:table-cell table:formula="of:=IF(ISNUMBER(FIND(&quot;:&quot;;[.P66])); RIGHT([.P66]; LEN([.P66]) - FIND(&quot;:&quot;;[.P66]));&quot;&quot;)">
            <text:p/>
          </table:table-cell>
          <table:table-cell table:formula="of:=IF(ISNUMBER(FIND(&quot; &quot;; [.Q66])); LEFT([.Q66]; FIND(&quot; &quot;; [.Q66] &amp; &quot; &quot;; FIND(&quot; &quot;;[.Q66])+1) - 1); [.Q66])">
            <text:p/>
          </table:table-cell>
          <table:table-cell table:formula="of:=IF(ISNUMBER(FIND(&quot;(&quot;; [.R66])); LEFT([.R66]; FIND(&quot;(&quot;; [.R66]) - 1); [.R66])">
            <text:p/>
          </table:table-cell>
          <table:table-cell table:formula="of:=IF(ISNUMBER(FIND(&quot;=&quot;;[.R66])); RIGHT([.R66]; LEN([.R66]) - FIND(&quot;=&quot;;[.R66]));&quot;&quot;)">
            <text:p/>
          </table:table-cell>
          <table:table-cell table:number-columns-repeated="16364"/>
        </table:table-row>
        <table:table-row table:style-name="ro2">
          <table:table-cell table:number-columns-repeated="10"/>
          <table:table-cell table:formula="of:=[$Checklist.T99]" office:value-type="float" office:value="0" calcext:value-type="float">
            <text:p>0</text:p>
          </table:table-cell>
          <table:table-cell table:formula="of:=IF(ISNUMBER(FIND(&quot;:&quot;;[.K67])); RIGHT([.K67]; LEN([.K67]) - FIND(&quot;:&quot;;[.K67]));&quot;&quot;)">
            <text:p/>
          </table:table-cell>
          <table:table-cell table:formula="of:=IF(ISNUMBER(FIND(&quot; &quot;; [.L67])); LEFT([.L67]; FIND(&quot; &quot;; [.L67] &amp; &quot; &quot;; FIND(&quot; &quot;;[.L67])+1) - 1); [.L67])">
            <text:p/>
          </table:table-cell>
          <table:table-cell table:formula="of:=IF(ISNUMBER(FIND(&quot;(&quot;; [.M67])); LEFT([.M67]; FIND(&quot;(&quot;; [.M67]) - 1); [.M67])">
            <text:p/>
          </table:table-cell>
          <table:table-cell table:formula="of:=IF(ISNUMBER(FIND(&quot;=&quot;;[.M67])); RIGHT([.M67]; LEN([.M67]) - FIND(&quot;=&quot;;[.M67]));&quot;&quot;)">
            <text:p/>
          </table:table-cell>
          <table:table-cell table:formula="of:=[$Checklist.T201]" office:value-type="float" office:value="0" calcext:value-type="float">
            <text:p>0</text:p>
          </table:table-cell>
          <table:table-cell table:formula="of:=IF(ISNUMBER(FIND(&quot;:&quot;;[.P67])); RIGHT([.P67]; LEN([.P67]) - FIND(&quot;:&quot;;[.P67]));&quot;&quot;)">
            <text:p/>
          </table:table-cell>
          <table:table-cell table:formula="of:=IF(ISNUMBER(FIND(&quot; &quot;; [.Q67])); LEFT([.Q67]; FIND(&quot; &quot;; [.Q67] &amp; &quot; &quot;; FIND(&quot; &quot;;[.Q67])+1) - 1); [.Q67])">
            <text:p/>
          </table:table-cell>
          <table:table-cell table:formula="of:=IF(ISNUMBER(FIND(&quot;(&quot;; [.R67])); LEFT([.R67]; FIND(&quot;(&quot;; [.R67]) - 1); [.R67])">
            <text:p/>
          </table:table-cell>
          <table:table-cell table:formula="of:=IF(ISNUMBER(FIND(&quot;=&quot;;[.R67])); RIGHT([.R67]; LEN([.R67]) - FIND(&quot;=&quot;;[.R67]));&quot;&quot;)">
            <text:p/>
          </table:table-cell>
          <table:table-cell table:number-columns-repeated="16364"/>
        </table:table-row>
        <table:table-row table:style-name="ro2">
          <table:table-cell table:number-columns-repeated="10"/>
          <table:table-cell table:formula="of:=[$Checklist.T100]" office:value-type="float" office:value="0" calcext:value-type="float">
            <text:p>0</text:p>
          </table:table-cell>
          <table:table-cell table:formula="of:=IF(ISNUMBER(FIND(&quot;:&quot;;[.K68])); RIGHT([.K68]; LEN([.K68]) - FIND(&quot;:&quot;;[.K68]));&quot;&quot;)">
            <text:p/>
          </table:table-cell>
          <table:table-cell table:formula="of:=IF(ISNUMBER(FIND(&quot; &quot;; [.L68])); LEFT([.L68]; FIND(&quot; &quot;; [.L68] &amp; &quot; &quot;; FIND(&quot; &quot;;[.L68])+1) - 1); [.L68])">
            <text:p/>
          </table:table-cell>
          <table:table-cell table:formula="of:=IF(ISNUMBER(FIND(&quot;(&quot;; [.M68])); LEFT([.M68]; FIND(&quot;(&quot;; [.M68]) - 1); [.M68])">
            <text:p/>
          </table:table-cell>
          <table:table-cell table:formula="of:=IF(ISNUMBER(FIND(&quot;=&quot;;[.M68])); RIGHT([.M68]; LEN([.M68]) - FIND(&quot;=&quot;;[.M68]));&quot;&quot;)">
            <text:p/>
          </table:table-cell>
          <table:table-cell table:formula="of:=[$Checklist.T202]" office:value-type="float" office:value="0" calcext:value-type="float">
            <text:p>0</text:p>
          </table:table-cell>
          <table:table-cell table:formula="of:=IF(ISNUMBER(FIND(&quot;:&quot;;[.P68])); RIGHT([.P68]; LEN([.P68]) - FIND(&quot;:&quot;;[.P68]));&quot;&quot;)">
            <text:p/>
          </table:table-cell>
          <table:table-cell table:formula="of:=IF(ISNUMBER(FIND(&quot; &quot;; [.Q68])); LEFT([.Q68]; FIND(&quot; &quot;; [.Q68] &amp; &quot; &quot;; FIND(&quot; &quot;;[.Q68])+1) - 1); [.Q68])">
            <text:p/>
          </table:table-cell>
          <table:table-cell table:formula="of:=IF(ISNUMBER(FIND(&quot;(&quot;; [.R68])); LEFT([.R68]; FIND(&quot;(&quot;; [.R68]) - 1); [.R68])">
            <text:p/>
          </table:table-cell>
          <table:table-cell table:formula="of:=IF(ISNUMBER(FIND(&quot;=&quot;;[.R68])); RIGHT([.R68]; LEN([.R68]) - FIND(&quot;=&quot;;[.R68]));&quot;&quot;)">
            <text:p/>
          </table:table-cell>
          <table:table-cell table:number-columns-repeated="16364"/>
        </table:table-row>
        <table:table-row table:style-name="ro2">
          <table:table-cell table:number-columns-repeated="10"/>
          <table:table-cell table:formula="of:=[$Checklist.T101]" office:value-type="float" office:value="0" calcext:value-type="float">
            <text:p>0</text:p>
          </table:table-cell>
          <table:table-cell table:formula="of:=IF(ISNUMBER(FIND(&quot;:&quot;;[.K69])); RIGHT([.K69]; LEN([.K69]) - FIND(&quot;:&quot;;[.K69]));&quot;&quot;)">
            <text:p/>
          </table:table-cell>
          <table:table-cell table:formula="of:=IF(ISNUMBER(FIND(&quot; &quot;; [.L69])); LEFT([.L69]; FIND(&quot; &quot;; [.L69] &amp; &quot; &quot;; FIND(&quot; &quot;;[.L69])+1) - 1); [.L69])">
            <text:p/>
          </table:table-cell>
          <table:table-cell table:formula="of:=IF(ISNUMBER(FIND(&quot;(&quot;; [.M69])); LEFT([.M69]; FIND(&quot;(&quot;; [.M69]) - 1); [.M69])">
            <text:p/>
          </table:table-cell>
          <table:table-cell table:formula="of:=IF(ISNUMBER(FIND(&quot;=&quot;;[.M69])); RIGHT([.M69]; LEN([.M69]) - FIND(&quot;=&quot;;[.M69]));&quot;&quot;)">
            <text:p/>
          </table:table-cell>
          <table:table-cell table:formula="of:=[$Checklist.T203]" office:value-type="float" office:value="0" calcext:value-type="float">
            <text:p>0</text:p>
          </table:table-cell>
          <table:table-cell table:formula="of:=IF(ISNUMBER(FIND(&quot;:&quot;;[.P69])); RIGHT([.P69]; LEN([.P69]) - FIND(&quot;:&quot;;[.P69]));&quot;&quot;)">
            <text:p/>
          </table:table-cell>
          <table:table-cell table:formula="of:=IF(ISNUMBER(FIND(&quot; &quot;; [.Q69])); LEFT([.Q69]; FIND(&quot; &quot;; [.Q69] &amp; &quot; &quot;; FIND(&quot; &quot;;[.Q69])+1) - 1); [.Q69])">
            <text:p/>
          </table:table-cell>
          <table:table-cell table:formula="of:=IF(ISNUMBER(FIND(&quot;(&quot;; [.R69])); LEFT([.R69]; FIND(&quot;(&quot;; [.R69]) - 1); [.R69])">
            <text:p/>
          </table:table-cell>
          <table:table-cell table:formula="of:=IF(ISNUMBER(FIND(&quot;=&quot;;[.R69])); RIGHT([.R69]; LEN([.R69]) - FIND(&quot;=&quot;;[.R69]));&quot;&quot;)">
            <text:p/>
          </table:table-cell>
          <table:table-cell table:number-columns-repeated="16364"/>
        </table:table-row>
        <table:table-row table:style-name="ro2">
          <table:table-cell table:number-columns-repeated="10"/>
          <table:table-cell table:formula="of:=[$Checklist.T102]" office:value-type="float" office:value="0" calcext:value-type="float">
            <text:p>0</text:p>
          </table:table-cell>
          <table:table-cell table:formula="of:=IF(ISNUMBER(FIND(&quot;:&quot;;[.K70])); RIGHT([.K70]; LEN([.K70]) - FIND(&quot;:&quot;;[.K70]));&quot;&quot;)">
            <text:p/>
          </table:table-cell>
          <table:table-cell table:formula="of:=IF(ISNUMBER(FIND(&quot; &quot;; [.L70])); LEFT([.L70]; FIND(&quot; &quot;; [.L70] &amp; &quot; &quot;; FIND(&quot; &quot;;[.L70])+1) - 1); [.L70])">
            <text:p/>
          </table:table-cell>
          <table:table-cell table:formula="of:=IF(ISNUMBER(FIND(&quot;(&quot;; [.M70])); LEFT([.M70]; FIND(&quot;(&quot;; [.M70]) - 1); [.M70])">
            <text:p/>
          </table:table-cell>
          <table:table-cell table:style-name="ce229" table:formula="of:=IF(ISNUMBER(FIND(&quot;=&quot;;[.M70])); RIGHT([.M70]; LEN([.M70]) - FIND(&quot;=&quot;;[.M70]));&quot;&quot;)">
            <text:p/>
          </table:table-cell>
          <table:table-cell table:style-name="ce230" table:formula="of:=[$Checklist.T204]" office:value-type="float" office:value="0" calcext:value-type="float">
            <text:p>0</text:p>
          </table:table-cell>
          <table:table-cell table:style-name="ce231" table:formula="of:=IF(ISNUMBER(FIND(&quot;:&quot;;[.P70])); RIGHT([.P70]; LEN([.P70]) - FIND(&quot;:&quot;;[.P70]));&quot;&quot;)">
            <text:p/>
          </table:table-cell>
          <table:table-cell table:style-name="ce231" table:formula="of:=IF(ISNUMBER(FIND(&quot; &quot;; [.Q70])); LEFT([.Q70]; FIND(&quot; &quot;; [.Q70] &amp; &quot; &quot;; FIND(&quot; &quot;;[.Q70])+1) - 1); [.Q70])">
            <text:p/>
          </table:table-cell>
          <table:table-cell table:style-name="ce231" table:formula="of:=IF(ISNUMBER(FIND(&quot;(&quot;; [.R70])); LEFT([.R70]; FIND(&quot;(&quot;; [.R70]) - 1); [.R70])">
            <text:p/>
          </table:table-cell>
          <table:table-cell table:style-name="ce229" table:formula="of:=IF(ISNUMBER(FIND(&quot;=&quot;;[.R70])); RIGHT([.R70]; LEN([.R70]) - FIND(&quot;=&quot;;[.R70]));&quot;&quot;)">
            <text:p/>
          </table:table-cell>
          <table:table-cell table:number-columns-repeated="16364"/>
        </table:table-row>
      </table:table>
      <table:table table:name="automation-nation" table:style-name="ta3">
        <table:table-column table:style-name="co14" table:number-columns-repeated="16384" table:default-cell-style-name="Default"/>
        <table:table-row table:style-name="ro2">
          <table:table-cell table:number-columns-repeated="16384"/>
        </table:table-row>
      </table:table>
      <table:table table:name="NOTES" table:style-name="ta4">
        <table:table-column table:style-name="co14" table:number-columns-repeated="16384" table:default-cell-style-name="Default"/>
        <table:table-row table:style-name="ro2">
          <table:table-cell office:value-type="string" calcext:value-type="string">
            <text:p>NOTES</text:p>
          </table:table-cell>
          <table:table-cell table:number-columns-repeated="16383"/>
        </table:table-row>
        <table:table-row table:style-name="ro2">
          <table:table-cell office:value-type="string" calcext:value-type="string">
            <text:p>This Top section can be pulled by code with Sensor Tracker, Would need to test this</text:p>
          </table:table-cell>
          <table:table-cell table:number-columns-repeated="16383"/>
        </table:table-row>
        <table:table-row table:style-name="ro2">
          <table:table-cell office:value-type="string" calcext:value-type="string">
            <text:p>Idea I have is you start your prep on gliderlab webpage and download a zip file with all the basic stuff input for you. In a hidden sheet baserd off the glider you are working on</text:p>
          </table:table-cell>
          <table:table-cell table:number-columns-repeated="16383"/>
        </table:table-row>
        <table:table-row table:style-name="ro2">
          <table:table-cell office:value-type="string" calcext:value-type="string">
            <text:p>Cells D3:D18 get completed for you as you fill in the sheet</text:p>
          </table:table-cell>
          <table:table-cell table:number-columns-repeated="16383"/>
        </table:table-row>
        <table:table-row table:style-name="ro2">
          <table:table-cell office:value-type="string" calcext:value-type="string">
            <text:p>Cells G3:G8(adding more for specific sensors this is just an example) again get added based off sensor tracker</text:p>
          </table:table-cell>
          <table:table-cell table:number-columns-repeated="16383"/>
        </table:table-row>
        <table:table-row table:style-name="ro2">
          <table:table-cell office:value-type="string" calcext:value-type="string">
            <text:p>Meta data will be inputs of SN. Should not be nessisary just thought maybe…. </text:p>
          </table:table-cell>
          <table:table-cell table:number-columns-repeated="16383"/>
        </table:table-row>
        <table:table-row table:style-name="ro2">
          <table:table-cell office:value-type="string" calcext:value-type="string">
            <text:p>You fill in y or n for the task complete row in the form below</text:p>
          </table:table-cell>
          <table:table-cell table:number-columns-repeated="16383"/>
        </table:table-row>
        <table:table-row table:style-name="ro2">
          <table:table-cell office:value-type="string" calcext:value-type="string">
            <text:p>the section done will bne auto filled based off formula</text:p>
          </table:table-cell>
          <table:table-cell table:number-columns-repeated="16383"/>
        </table:table-row>
        <table:table-row table:style-name="ro2">
          <table:table-cell office:value-type="string" calcext:value-type="string">
            <text:p>Macro (steve, I do not understand excel macros, I hate excel for stuff like that, so someone else could take that on) once Section task is complete, it gets hidden after you press update button or whatever</text:p>
          </table:table-cell>
          <table:table-cell table:number-columns-repeated="16383"/>
        </table:table-row>
        <table:table-row table:style-name="ro2">
          <table:table-cell office:value-type="string" calcext:value-type="string">
            <text:p>This is just an example, based of the preliminary list Ben gave. We would have to add more details as we go. </text:p>
          </table:table-cell>
          <table:table-cell table:number-columns-repeated="16383"/>
        </table:table-row>
        <table:table-row table:style-name="ro2">
          <table:table-cell office:value-type="string" calcext:value-type="string">
            <text:p>Specific sections could warent an SOP. Some may not need one. Sections for comments if needed for individual tasks. Like if you changed your pump mid way, add that in as a comment </text:p>
          </table:table-cell>
          <table:table-cell table:number-columns-repeated="16383"/>
        </table:table-row>
      </table:table>
      <table:table table:name="Change Log" table:style-name="ta5">
        <table:table-column table:style-name="co17" table:default-cell-style-name="ce233"/>
        <table:table-column table:style-name="co18" table:default-cell-style-name="ce233"/>
        <table:table-column table:style-name="co19" table:default-cell-style-name="ce233"/>
        <table:table-column table:style-name="co14" table:number-columns-repeated="16381" table:default-cell-style-name="Default"/>
        <table:table-row table:style-name="ro2">
          <table:table-cell table:style-name="ce232" office:value-type="string" calcext:value-type="string">
            <text:p>Version</text:p>
          </table:table-cell>
          <table:table-cell table:style-name="ce232" office:value-type="string" calcext:value-type="string">
            <text:p>Contributor</text:p>
          </table:table-cell>
          <table:table-cell table:style-name="ce232" office:value-type="string" calcext:value-type="string">
            <text:p>Change Log</text:p>
          </table:table-cell>
          <table:table-cell table:number-columns-repeated="16381"/>
        </table:table-row>
        <table:table-row table:style-name="ro25">
          <table:table-cell office:value-type="string" calcext:value-type="string">
            <text:p>1.1 in progress</text:p>
          </table:table-cell>
          <table:table-cell office:value-type="string" calcext:value-type="string">
            <text:p>alexcerra</text:p>
          </table:table-cell>
          <table:table-cell office:value-type="string" calcext:value-type="string">
            <text:p>started adding nas</text:p>
          </table:table-cell>
          <table:table-cell table:number-columns-repeated="16381"/>
        </table:table-row>
        <table:table-row table:style-name="ro25">
          <table:table-cell office:value-type="float" office:value="1.2" calcext:value-type="float">
            <text:p>1.2</text:p>
          </table:table-cell>
          <table:table-cell office:value-type="string" calcext:value-type="string">
            <text:p>AC</text:p>
          </table:table-cell>
          <table:table-cell office:value-type="string" calcext:value-type="string">
            <text:p>Fixed some g3 macros</text:p>
          </table:table-cell>
          <table:table-cell table:number-columns-repeated="16381"/>
        </table:table-row>
        <table:table-row table:style-name="ro25">
          <table:table-cell office:value-type="float" office:value="1.3" calcext:value-type="float">
            <text:p>1.3</text:p>
          </table:table-cell>
          <table:table-cell office:value-type="string" calcext:value-type="string">
            <text:p>AC</text:p>
          </table:table-cell>
          <table:table-cell office:value-type="string" calcext:value-type="string">
            <text:p>Made changes based of Bens recommendations for order and automation</text:p>
          </table:table-cell>
          <table:table-cell table:number-columns-repeated="16381"/>
        </table:table-row>
        <table:table-row table:style-name="ro25">
          <table:table-cell office:value-type="float" office:value="1.4" calcext:value-type="float">
            <text:p>1.4</text:p>
          </table:table-cell>
          <table:table-cell office:value-type="string" calcext:value-type="string">
            <text:p>AC / BA</text:p>
          </table:table-cell>
          <table:table-cell office:value-type="string" calcext:value-type="string">
            <text:p>Made some chenged off BA's recent use of the sheet to make things more clear and stream lined</text:p>
          </table:table-cell>
          <table:table-cell table:number-columns-repeated="16381"/>
        </table:table-row>
        <table:table-row table:style-name="ro25">
          <table:table-cell office:value-type="float" office:value="1.5" calcext:value-type="float">
            <text:p>1.5</text:p>
          </table:table-cell>
          <table:table-cell office:value-type="string" calcext:value-type="string">
            <text:p>AC / SW </text:p>
          </table:table-cell>
          <table:table-cell office:value-type="string" calcext:value-type="string">
            <text:p>Made some changes based on recommendation. Reporting m_batttery durring wiggle and some formating fixes</text:p>
          </table:table-cell>
          <table:table-cell table:number-columns-repeated="16381"/>
        </table:table-row>
        <table:table-row table:style-name="ro25">
          <table:table-cell office:value-type="float" office:value="2" calcext:value-type="float">
            <text:p>2</text:p>
          </table:table-cell>
          <table:table-cell office:value-type="string" calcext:value-type="string">
            <text:p>AC</text:p>
          </table:table-cell>
          <table:table-cell office:value-type="string" calcext:value-type="string">
            <text:p>Mike found bug, dellog all in the incoming refurd FCP. For obvious reasons, this is not okay. Re formated the entire sheet with this change as well. </text:p>
          </table:table-cell>
          <table:table-cell table:number-columns-repeated="16381"/>
        </table:table-row>
        <table:table-row table:style-name="ro25" table:number-rows-repeated="38">
          <table:table-cell table:number-columns-repeated="16384"/>
        </table:table-row>
        <table:table-row table:style-name="ro25">
          <table:table-cell table:number-columns-repeated="16384"/>
        </table:table-row>
      </table:table>
      <table:named-expressions>
        <table:named-range table:name="altimeter_type" table:base-cell-address="$Checklist.$A$1" table:cell-range-address="$Checklist.$H$101"/>
        <table:named-range table:name="batt_type" table:base-cell-address="$Checklist.$A$1" table:cell-range-address="$Checklist.$I$19"/>
        <table:named-range table:name="fcp_location" table:base-cell-address="$Checklist.$A$1" table:cell-range-address="$Checklist.$I$16"/>
        <table:named-range table:name="first_cat" table:base-cell-address="$Checklist.$A$1" table:cell-range-address="$Checklist.$H$50"/>
        <table:named-range table:name="glider_type" table:base-cell-address="$Checklist.$A$1" table:cell-range-address="$Checklist.$I$17"/>
        <table:named-range table:name="in_out_going" table:base-cell-address="$Checklist.$A$1" table:cell-range-address="$Checklist.$I$22"/>
        <table:named-range table:name="nose_installed" table:base-cell-address="$Checklist.$A$1" table:cell-range-address="$Checklist.$I$21"/>
        <table:named-range table:name="pump_type" table:base-cell-address="$Checklist.$A$1" table:cell-range-address="$Checklist.$I$18"/>
        <table:named-range table:name="second_cat" table:base-cell-address="$Checklist.$A$1" table:cell-range-address="$Checklist.$H$162"/>
        <table:named-range table:name="thruster_installed" table:base-cell-address="$Checklist.$A$1" table:cell-range-address="$Checklist.$I$20"/>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onsolas" svg:font-family="Consolas" style:font-family-generic="modern"/>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number:time-style style:name="N152">
      <number:hours number:style="long"/>
      <number:text>:</number:text>
      <number:minutes number:style="long"/>
      <number:text>:</number:text>
      <number:seconds number:style="long"/>
      <number:text> </number:text>
      <number:am-pm/>
    </number:time-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41" style:display-name="ConditionalStyle_41" style:family="table-cell" style:parent-style-name="Default">
      <style:table-cell-properties fo:background-color="#f2f2f2">
        <loext:background-complex-color loext:theme-type="light1" loext:color-type="theme">
          <loext:transformation loext:type="lummod" loext:value="9500"/>
        </loext:background-complex-color>
      </style:table-cell-properties>
      <style:text-properties fo:color="#f2f2f2">
        <loext:char-complex-color loext:theme-type="light1" loext:color-type="theme">
          <loext:transformation loext:type="lummod" loext:value="9500"/>
        </loext:char-complex-color>
      </style:text-properties>
    </style:style>
    <style:style style:name="ConditionalStyle_5f_16" style:display-name="ConditionalStyle_16" style:family="table-cell" style:parent-style-name="Default">
      <style:table-cell-properties fo:background-color="#ffeb9c"/>
      <style:text-properties fo:color="#9c5700"/>
    </style:style>
    <style:style style:name="ConditionalStyle_5f_15" style:display-name="ConditionalStyle_15" style:family="table-cell" style:parent-style-name="Default">
      <style:table-cell-properties fo:background-color="#ffeb9c"/>
      <style:text-properties fo:color="#9c5700"/>
    </style:style>
    <style:style style:name="ConditionalStyle_5f_14" style:display-name="ConditionalStyle_14" style:family="table-cell" style:parent-style-name="Default">
      <style:table-cell-properties fo:background-color="#c6efce"/>
      <style:text-properties fo:color="#006100"/>
    </style:style>
    <style:style style:name="ConditionalStyle_5f_13" style:display-name="ConditionalStyle_13" style:family="table-cell" style:parent-style-name="Default">
      <style:table-cell-properties fo:background-color="#ffc7ce"/>
      <style:text-properties fo:color="#9c0006"/>
    </style:style>
    <style:style style:name="ConditionalStyle_5f_34" style:display-name="ConditionalStyle_34" style:family="table-cell" style:parent-style-name="Default">
      <style:table-cell-properties fo:background-color="#ffeb9c"/>
      <style:text-properties fo:color="#9c5700"/>
    </style:style>
    <style:style style:name="ConditionalStyle_5f_33" style:display-name="ConditionalStyle_33" style:family="table-cell" style:parent-style-name="Default">
      <style:table-cell-properties fo:background-color="#ffeb9c"/>
      <style:text-properties fo:color="#9c5700"/>
    </style:style>
    <style:style style:name="ConditionalStyle_5f_32" style:display-name="ConditionalStyle_32" style:family="table-cell" style:parent-style-name="Default">
      <style:table-cell-properties fo:background-color="#c6efce"/>
      <style:text-properties fo:color="#006100"/>
    </style:style>
    <style:style style:name="ConditionalStyle_5f_31" style:display-name="ConditionalStyle_31" style:family="table-cell" style:parent-style-name="Default">
      <style:table-cell-properties fo:background-color="#ffc7ce"/>
      <style:text-properties fo:color="#9c0006"/>
    </style:style>
    <style:style style:name="ConditionalStyle_5f_25" style:display-name="ConditionalStyle_25" style:family="table-cell" style:parent-style-name="Default">
      <style:table-cell-properties fo:background-color="#c6efce"/>
      <style:text-properties fo:color="#006100"/>
    </style:style>
    <style:style style:name="ConditionalStyle_5f_24" style:display-name="ConditionalStyle_24" style:family="table-cell" style:parent-style-name="Default">
      <style:table-cell-properties fo:background-color="#ffc7ce"/>
      <style:text-properties fo:color="#9c0006"/>
    </style:style>
    <style:style style:name="ConditionalStyle_5f_23" style:display-name="ConditionalStyle_23" style:family="table-cell" style:parent-style-name="Default">
      <style:table-cell-properties fo:background-color="#ffeb9c"/>
      <style:text-properties fo:color="#9c5700"/>
    </style:style>
    <style:style style:name="ConditionalStyle_5f_22" style:display-name="ConditionalStyle_22" style:family="table-cell" style:parent-style-name="Default">
      <style:table-cell-properties fo:background-color="#ffeb9c"/>
      <style:text-properties fo:color="#9c5700"/>
    </style:style>
    <style:style style:name="ConditionalStyle_5f_30" style:display-name="ConditionalStyle_30" style:family="table-cell" style:parent-style-name="Default">
      <style:table-cell-properties fo:background-color="#0d0d0d">
        <loext:background-complex-color loext:theme-type="dark1" loext:color-type="theme">
          <loext:transformation loext:type="lummod" loext:value="9500"/>
          <loext:transformation loext:type="lumoff" loext:value="499"/>
        </loext:background-complex-color>
      </style:table-cell-properties>
      <style:text-properties fo:color="#0d0d0d">
        <loext:char-complex-color loext:theme-type="dark1" loext:color-type="theme">
          <loext:transformation loext:type="lummod" loext:value="9500"/>
          <loext:transformation loext:type="lumoff" loext:value="499"/>
        </loext:char-complex-color>
      </style:text-properties>
    </style:style>
    <style:style style:name="ConditionalStyle_5f_35" style:display-name="ConditionalStyle_35" style:family="table-cell" style:parent-style-name="Default">
      <style:table-cell-properties fo:background-color="#0d0d0d">
        <loext:background-complex-color loext:theme-type="dark1" loext:color-type="theme">
          <loext:transformation loext:type="lummod" loext:value="9500"/>
          <loext:transformation loext:type="lumoff" loext:value="499"/>
        </loext:background-complex-color>
      </style:table-cell-properties>
      <style:text-properties fo:color="#0d0d0d">
        <loext:char-complex-color loext:theme-type="dark1" loext:color-type="theme">
          <loext:transformation loext:type="lummod" loext:value="9500"/>
          <loext:transformation loext:type="lumoff" loext:value="499"/>
        </loext:char-complex-color>
      </style:text-properties>
    </style:style>
    <style:style style:name="ConditionalStyle_5f_40" style:display-name="ConditionalStyle_40" style:family="table-cell" style:parent-style-name="Default">
      <style:table-cell-properties fo:background-color="#ffeb9c"/>
      <style:text-properties fo:color="#9c5700"/>
    </style:style>
    <style:style style:name="ConditionalStyle_5f_39" style:display-name="ConditionalStyle_39" style:family="table-cell" style:parent-style-name="Default">
      <style:table-cell-properties fo:background-color="#ffeb9c"/>
      <style:text-properties fo:color="#9c5700"/>
    </style:style>
    <style:style style:name="ConditionalStyle_5f_38" style:display-name="ConditionalStyle_38" style:family="table-cell" style:parent-style-name="Default">
      <style:table-cell-properties fo:background-color="#c6efce"/>
      <style:text-properties fo:color="#006100"/>
    </style:style>
    <style:style style:name="ConditionalStyle_5f_37" style:display-name="ConditionalStyle_37" style:family="table-cell" style:parent-style-name="Default">
      <style:table-cell-properties fo:background-color="#ffc7ce"/>
      <style:text-properties fo:color="#9c0006"/>
    </style:style>
    <style:style style:name="ConditionalStyle_5f_8" style:display-name="ConditionalStyle_8" style:family="table-cell" style:parent-style-name="Default">
      <style:table-cell-properties fo:background-color="#0d0d0d">
        <loext:background-complex-color loext:theme-type="dark1" loext:color-type="theme">
          <loext:transformation loext:type="lummod" loext:value="9500"/>
          <loext:transformation loext:type="lumoff" loext:value="499"/>
        </loext:background-complex-color>
      </style:table-cell-properties>
      <style:text-properties fo:color="#0d0d0d">
        <loext:char-complex-color loext:theme-type="dark1" loext:color-type="theme">
          <loext:transformation loext:type="lummod" loext:value="9500"/>
          <loext:transformation loext:type="lumoff" loext:value="499"/>
        </loext:char-complex-color>
      </style:text-properties>
    </style:style>
    <style:style style:name="ConditionalStyle_5f_9" style:display-name="ConditionalStyle_9" style:family="table-cell" style:parent-style-name="Default">
      <style:table-cell-properties fo:background-color="#ffeb9c"/>
      <style:text-properties fo:color="#9c5700"/>
    </style:style>
    <style:style style:name="ConditionalStyle_5f_12" style:display-name="ConditionalStyle_12" style:family="table-cell" style:parent-style-name="Default">
      <style:table-cell-properties fo:background-color="#ffeb9c"/>
      <style:text-properties fo:color="#9c5700"/>
    </style:style>
    <style:style style:name="ConditionalStyle_5f_11" style:display-name="ConditionalStyle_11" style:family="table-cell" style:parent-style-name="Default">
      <style:table-cell-properties fo:background-color="#c6efce"/>
      <style:text-properties fo:color="#006100"/>
    </style:style>
    <style:style style:name="ConditionalStyle_5f_10" style:display-name="ConditionalStyle_10" style:family="table-cell" style:parent-style-name="Default">
      <style:table-cell-properties fo:background-color="#ffc7ce"/>
      <style:text-properties fo:color="#9c0006"/>
    </style:style>
    <style:style style:name="ConditionalStyle_5f_17" style:display-name="ConditionalStyle_17" style:family="table-cell" style:parent-style-name="Default">
      <style:table-cell-properties fo:background-color="#0d0d0d">
        <loext:background-complex-color loext:theme-type="dark1" loext:color-type="theme">
          <loext:transformation loext:type="lummod" loext:value="9500"/>
          <loext:transformation loext:type="lumoff" loext:value="499"/>
        </loext:background-complex-color>
      </style:table-cell-properties>
      <style:text-properties fo:color="#0d0d0d">
        <loext:char-complex-color loext:theme-type="dark1" loext:color-type="theme">
          <loext:transformation loext:type="lummod" loext:value="9500"/>
          <loext:transformation loext:type="lumoff" loext:value="499"/>
        </loext:char-complex-color>
      </style:text-properties>
    </style:style>
    <style:style style:name="ConditionalStyle_5f_21" style:display-name="ConditionalStyle_21" style:family="table-cell" style:parent-style-name="Default">
      <style:table-cell-properties fo:background-color="#ffeb9c"/>
      <style:text-properties fo:color="#9c5700"/>
    </style:style>
    <style:style style:name="ConditionalStyle_5f_20" style:display-name="ConditionalStyle_20" style:family="table-cell" style:parent-style-name="Default">
      <style:table-cell-properties fo:background-color="#ffeb9c"/>
      <style:text-properties fo:color="#9c5700"/>
    </style:style>
    <style:style style:name="ConditionalStyle_5f_19" style:display-name="ConditionalStyle_19" style:family="table-cell" style:parent-style-name="Default">
      <style:table-cell-properties fo:background-color="#c6efce"/>
      <style:text-properties fo:color="#006100"/>
    </style:style>
    <style:style style:name="ConditionalStyle_5f_18" style:display-name="ConditionalStyle_18" style:family="table-cell" style:parent-style-name="Default">
      <style:table-cell-properties fo:background-color="#ffc7ce"/>
      <style:text-properties fo:color="#9c0006"/>
    </style:style>
    <style:style style:name="ConditionalStyle_5f_36" style:display-name="ConditionalStyle_36" style:family="table-cell" style:parent-style-name="Default">
      <style:table-cell-properties fo:background-color="#0d0d0d">
        <loext:background-complex-color loext:theme-type="dark1" loext:color-type="theme">
          <loext:transformation loext:type="lummod" loext:value="9500"/>
          <loext:transformation loext:type="lumoff" loext:value="499"/>
        </loext:background-complex-color>
      </style:table-cell-properties>
      <style:text-properties fo:color="#0d0d0d">
        <loext:char-complex-color loext:theme-type="dark1" loext:color-type="theme">
          <loext:transformation loext:type="lummod" loext:value="9500"/>
          <loext:transformation loext:type="lumoff" loext:value="499"/>
        </loext:char-complex-color>
      </style:text-properties>
    </style:style>
    <style:style style:name="ConditionalStyle_5f_29" style:display-name="ConditionalStyle_29" style:family="table-cell" style:parent-style-name="Default">
      <style:table-cell-properties fo:background-color="#ffeb9c"/>
      <style:text-properties fo:color="#9c5700"/>
    </style:style>
    <style:style style:name="ConditionalStyle_5f_28" style:display-name="ConditionalStyle_28" style:family="table-cell" style:parent-style-name="Default">
      <style:table-cell-properties fo:background-color="#ffeb9c"/>
      <style:text-properties fo:color="#9c5700"/>
    </style:style>
    <style:style style:name="ConditionalStyle_5f_27" style:display-name="ConditionalStyle_27" style:family="table-cell" style:parent-style-name="Default">
      <style:table-cell-properties fo:background-color="#c6efce"/>
      <style:text-properties fo:color="#006100"/>
    </style:style>
    <style:style style:name="ConditionalStyle_5f_26" style:display-name="ConditionalStyle_26" style:family="table-cell" style:parent-style-name="Default">
      <style:table-cell-properties fo:background-color="#ffc7ce"/>
      <style:text-properties fo:color="#9c0006"/>
    </style:style>
    <style:style style:name="ConditionalStyle_5f_3" style:display-name="ConditionalStyle_3" style:family="table-cell" style:parent-style-name="Default">
      <style:table-cell-properties fo:background-color="#c6efce"/>
      <style:text-properties fo:color="#006100"/>
    </style:style>
    <style:style style:name="ConditionalStyle_5f_2" style:display-name="ConditionalStyle_2" style:family="table-cell" style:parent-style-name="Default">
      <style:table-cell-properties fo:background-color="#ffc7ce"/>
      <style:text-properties fo:color="#9c0006"/>
    </style:style>
    <style:style style:name="ConditionalStyle_5f_1" style:display-name="ConditionalStyle_1" style:family="table-cell" style:parent-style-name="Default">
      <style:table-cell-properties fo:background-color="#ffc7ce"/>
      <style:text-properties fo:color="#9c0006"/>
    </style:style>
    <style:style style:name="ConditionalStyle_5f_5" style:display-name="ConditionalStyle_5" style:family="table-cell" style:parent-style-name="Default">
      <style:table-cell-properties fo:background-color="#c6efce"/>
      <style:text-properties fo:color="#006100"/>
    </style:style>
    <style:style style:name="ConditionalStyle_5f_4" style:display-name="ConditionalStyle_4" style:family="table-cell" style:parent-style-name="Default">
      <style:table-cell-properties fo:background-color="#ffc7ce"/>
      <style:text-properties fo:color="#9c0006"/>
    </style:style>
    <style:style style:name="ConditionalStyle_5f_7" style:display-name="ConditionalStyle_7" style:family="table-cell" style:parent-style-name="Default">
      <style:table-cell-properties fo:background-color="#c6efce"/>
      <style:text-properties fo:color="#006100"/>
    </style:style>
    <style:style style:name="ConditionalStyle_5f_6" style:display-name="ConditionalStyle_6" style:family="table-cell" style:parent-style-name="Default">
      <style:table-cell-properties fo:background-color="#ffc7ce"/>
      <style:text-properties fo:color="#9c0006"/>
    </style:style>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automation-nation" style:display-name="PageStyle_automation-n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NOTES" style:display-name="PageStyle_NOTES" style:page-layout-name="Mpm3">
      <style:header style:display="false"/>
      <style:header-left style:display="false"/>
      <style:header-first style:display="false"/>
      <style:footer style:display="false"/>
      <style:footer-left style:display="false"/>
      <style:footer-first style:display="false"/>
    </style:master-page>
    <style:master-page style:name="PageStyle_5f_Checklist" style:display-name="PageStyle_Checklist" style:page-layout-name="Mpm4">
      <style:header style:display="false"/>
      <style:header-left style:display="false"/>
      <style:header-first style:display="false"/>
      <style:footer style:display="false"/>
      <style:footer-left style:display="false"/>
      <style:footer-first style:display="false"/>
    </style:master-page>
    <style:master-page style:name="PageStyle_5f_Change_20_Log" style:display-name="PageStyle_Change Log" style:page-layout-name="Mpm3">
      <style:header style:display="false"/>
      <style:header-left style:display="false"/>
      <style:header-first style:display="false"/>
      <style:footer style:display="false"/>
      <style:footer-left style:display="false"/>
      <style:footer-first style:display="false"/>
    </style:master-page>
    <style:master-page style:name="PageStyle_5f_hidden_5f_lists" style:display-name="PageStyle_hidden_lis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erra, Alexander</meta:initial-creator>
    <meta:creation-date>2023-03-17T18:06:21</meta:creation-date>
    <dc:date>2026-06-13T16:39:44.948424742</dc:date>
    <meta:generator>LibreOffice/24.2.7.2$Linux_X86_64 LibreOffice_project/420$Build-2</meta:generator>
    <meta:editing-duration>PT3M43S</meta:editing-duration>
    <meta:editing-cycles>1</meta:editing-cycles>
    <meta:document-statistic meta:table-count="5" meta:cell-count="1974" meta:object-count="0"/>
    <meta:user-defined meta:name="AppVersion">16.0300</meta:user-defined>
    <meta:user-defined meta:name="ContentTypeId">0x0101002C831EF6EA18E04CAA1B72C5E1797CB8001B8A60E4C323084A862A754358135CA7</meta:user-defined>
    <meta:user-defined meta:name="MediaServiceImageTags"/>
  </office:meta>
</office:document-meta>
</file>